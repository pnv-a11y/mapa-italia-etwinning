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  <manifest:file-entry manifest:full-path="media/image9.jpeg" manifest:media-type="image/jpeg"/>
  <manifest:file-entry manifest:full-path="media/image10.jpeg" manifest:media-type="image/jpeg"/>
  <manifest:file-entry manifest:full-path="media/image11.jpeg" manifest:media-type="image/jpeg"/>
  <manifest:file-entry manifest:full-path="media/image12.jpeg" manifest:media-type="image/jpeg"/>
  <manifest:file-entry manifest:full-path="settings.xml" manifest:media-type="text/xml"/>
  <manifest:file-entry manifest:full-path="styles.xml" manifest:media-type="text/xml"/>
  <manifest:file-entry manifest:full-path="media/image13.jpe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graphic" style:name="a1640">
      <style:graphic-properties fo:wrap-option="wrap" fo:padding-top="0.05in" fo:padding-bottom="0.05in" fo:padding-left="0.1in" fo:padding-right="0.1in" draw:textarea-vertical-align="middle" draw:textarea-horizontal-align="center" draw:fill="solid" draw:fill-color="#155767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3">
      <style:graphic-properties fo:wrap-option="wrap" fo:padding-top="0.05in" fo:padding-bottom="0.05in" fo:padding-left="0.1in" fo:padding-right="0.1in" draw:textarea-vertical-align="middle" draw:textarea-horizontal-align="center" draw:fill="solid" draw:fill-color="#f0ecec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644">
      <style:text-properties fo:text-transform="uppercase" fo:color="#0b425e" style:text-line-through-type="none" style:text-line-through-style="none" style:text-line-through-width="auto" style:text-line-through-color="font-color" style:text-position="0% 100%" fo:font-family="Walbaum Display Light" fo:font-size="0.91667in" style:font-size-asian="0.91667in" style:font-size-complex="0.91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5">
      <style:text-properties fo:text-transform="uppercase" fo:color="#0b425e" style:text-line-through-type="none" style:text-line-through-style="none" style:text-line-through-width="auto" style:text-line-through-color="font-color" style:text-position="0% 100%" fo:font-family="Walbaum Display Light" fo:font-size="0.91667in" style:font-size-asian="0.91667in" style:font-size-complex="0.91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6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Walbaum Display Light" fo:font-size="0.91667in" style:font-size-asian="0.91667in" style:font-size-complex="0.91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0">
      <style:graphic-properties draw:fill="none" fo:clip="rect(0in, 1.78317in, 0in, 1.78317in)" draw:stroke="none"/>
    </style:style>
    <style:style style:family="text" style:name="a1647">
      <style:text-properties fo:text-transform="uppercase" fo:color="#155767" style:text-line-through-type="none" style:text-line-through-style="none" style:text-line-through-width="auto" style:text-line-through-color="font-color" style:text-position="0% 100%" fo:font-family="Walbaum Display Light" fo:font-size="0.91667in" style:font-size-asian="0.91667in" style:font-size-complex="0.91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8">
      <style:text-properties fo:text-transform="uppercase" fo:color="#0b425e" style:text-line-through-type="none" style:text-line-through-style="none" style:text-line-through-width="auto" style:text-line-through-color="font-color" style:text-position="0% 100%" fo:font-family="Walbaum Display Light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9">
      <style:text-properties fo:text-transform="uppercase" fo:color="#0b425e" style:text-line-through-type="none" style:text-line-through-style="none" style:text-line-through-width="auto" style:text-line-through-color="font-color" style:text-position="0% 100%" fo:font-family="Walbaum Display Light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74">
      <style:graphic-properties draw:fill="none" draw:stroke="solid" svg:stroke-width="0.01389in" svg:stroke-color="#000000" svg:stroke-opacity="100%"/>
    </style:style>
    <style:style style:family="presentation" style:name="a18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0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Nyal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1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Nyal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2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Nyal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3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Nyal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4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Nyal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5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Nyal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6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Nyal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7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Nyal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8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Nyal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0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9">
      <style:paragraph-properties fo:line-height="100%" fo:text-align="left" style:tab-stop-distance="1in" fo:margin-left="0in" fo:margin-right="0in" fo:text-indent="0in" fo:margin-top="0.13889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1">
      <style:paragraph-properties fo:line-height="100%" fo:text-align="left" style:tab-stop-distance="1in" fo:margin-left="0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3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4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5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6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7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8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9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0">
      <style:text-properties fo:text-transform="uppercase" fo:color="#155767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1">
      <style:text-properties fo:text-transform="uppercase" fo:color="#155767" style:text-line-through-type="none" style:text-line-through-style="none" style:text-line-through-width="auto" style:text-line-through-color="font-color" style:text-position="0% 100%" fo:font-family="Walbaum Display Light" fo:font-size="0.91667in" style:font-size-asian="0.91667in" style:font-size-complex="0.91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2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Walbaum Display Light" fo:font-size="0.91667in" style:font-size-asian="0.91667in" style:font-size-complex="0.91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55">
      <style:graphic-properties draw:fill="none" fo:clip="rect(0in, 2.4195in, 0.00017in, 2.41925in)" draw:stroke="none"/>
    </style:style>
    <style:style style:family="graphic" style:name="a1656">
      <style:graphic-properties draw:fill="none" draw:stroke="solid" svg:stroke-width="0.01389in" svg:stroke-color="#ba9ca0" svg:stroke-opacity="70%" draw:stroke-linejoin="miter" svg:stroke-linecap="butt" draw:decorative="true" style:protect="position size"/>
    </style:style>
    <style:style style:family="drawing-page" style:name="a18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57">
      <style:graphic-properties draw:fill="none" draw:stroke="solid" svg:stroke-width="0.01389in" svg:stroke-color="#000000" svg:stroke-opacity="100%"/>
    </style:style>
    <style:style style:family="drawing-page" style:name="a18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2">
      <style:text-properties fo:text-transform="uppercase" fo:color="#0b425e" style:text-line-through-type="none" style:text-line-through-style="none" style:text-line-through-width="auto" style:text-line-through-color="font-color" style:text-position="0% 100%" fo:font-family="Walbaum Display Light" fo:font-size="0.5in" style:font-size-asian="0.5in" style:font-size-complex="0.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3">
      <style:text-properties fo:text-transform="uppercase" fo:color="#0b425e" style:text-line-through-type="none" style:text-line-through-style="none" style:text-line-through-width="auto" style:text-line-through-color="font-color" style:text-position="0% 100%" fo:font-family="Walbaum Display Light" fo:font-size="0.5in" style:font-size-asian="0.5in" style:font-size-complex="0.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4">
      <style:text-properties fo:text-transform="uppercase" fo:color="#0b425e" style:text-line-through-type="none" style:text-line-through-style="none" style:text-line-through-width="auto" style:text-line-through-color="font-color" style:text-position="0% 100%" fo:font-family="Walbaum Display Light" fo:font-size="0.5in" style:font-size-asian="0.5in" style:font-size-complex="0.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1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Nyal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87">
      <style:graphic-properties draw:fill="none" fo:clip="rect(0in, 4.57612in, 0in, 4.57612in)" draw:stroke="none"/>
    </style:style>
    <style:style style:family="text" style:name="a2092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Nyal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8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Nyal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3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Nyal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9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Nyal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4">
      <style:paragraph-properties fo:line-height="100%" fo:text-align="left" style:tab-stop-distance="1in" fo:margin-left="0in" fo:margin-right="0in" fo:text-indent="0in" fo:margin-top="0.13889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6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Nyal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7">
      <style:paragraph-properties fo:line-height="100%" fo:text-align="left" style:tab-stop-distance="1in" fo:margin-left="0in" fo:margin-right="0in" fo:text-indent="0in" fo:margin-top="0.13889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0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9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Nyal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1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2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3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4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5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6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7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8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9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64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665">
      <style:graphic-properties draw:fill="none" draw:stroke="solid" svg:stroke-width="0.01389in" svg:stroke-color="#ba9ca0" svg:stroke-opacity="70%" draw:stroke-linejoin="miter" svg:stroke-linecap="butt" draw:decorative="true" style:protect="position size"/>
    </style:style>
    <style:style style:family="graphic" style:name="a1666">
      <style:graphic-properties draw:fill="none" draw:stroke="solid" svg:stroke-width="0.01389in" svg:stroke-color="#ba9ca0" svg:stroke-opacity="70%" draw:stroke-linejoin="miter" svg:stroke-linecap="butt" draw:decorative="true" style:protect="position size"/>
    </style:style>
    <style:style style:family="text" style:name="a1890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Nyal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67">
      <style:graphic-properties draw:fill="none" draw:stroke="solid" svg:stroke-width="0.01389in" svg:stroke-color="#ba9ca0" svg:stroke-opacity="70%" draw:stroke-linejoin="miter" svg:stroke-linecap="butt" draw:decorative="true" style:protect="position size"/>
    </style:style>
    <style:style style:family="text" style:name="a1891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Nyal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68">
      <style:graphic-properties draw:fill="none" draw:stroke="solid" svg:stroke-width="0.01389in" svg:stroke-color="#ba9ca0" svg:stroke-opacity="70%" draw:stroke-linejoin="miter" svg:stroke-linecap="butt" draw:decorative="true" style:protect="position size"/>
    </style:style>
    <style:style style:family="text" style:name="a1892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Nyal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69">
      <style:graphic-properties draw:fill="none" draw:stroke="solid" svg:stroke-width="0.01389in" svg:stroke-color="#ba9ca0" svg:stroke-opacity="70%" draw:stroke-linejoin="miter" svg:stroke-linecap="butt" draw:decorative="true" style:protect="position size"/>
    </style:style>
    <style:style style:family="text" style:name="a1893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Nyal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4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Nyal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5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Nyal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6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Nyal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7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Nyal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8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Nyal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0">
      <style:paragraph-properties fo:line-height="100%" fo:text-align="left" style:tab-stop-distance="1in" fo:margin-left="0in" fo:margin-right="0in" fo:text-indent="0in" fo:margin-top="0.13889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9">
      <style:paragraph-properties fo:line-height="100%" fo:text-align="left" style:tab-stop-distance="1in" fo:margin-left="0.25in" fo:margin-right="0in" fo:text-indent="-0.25in" fo:margin-top="0.13889in" fo:margin-bottom="0.20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2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Nyal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3">
      <style:paragraph-properties fo:line-height="100%" fo:text-align="left" style:tab-stop-distance="1in" fo:margin-left="0in" fo:margin-right="0in" fo:text-indent="0in" fo:margin-top="0.13889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5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Nyal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6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Nyal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0">
      <style:paragraph-properties fo:line-height="100%" fo:text-align="left" style:tab-stop-distance="1in" fo:margin-left="0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7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Nyal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8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Nyal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09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Nyal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3">
      <style:graphic-properties draw:fill="none" fo:clip="rect(0in, 2.54817in, 0in, 2.7565in)" draw:stroke="none"/>
    </style:style>
    <style:style style:family="graphic" style:name="a2334">
      <style:graphic-properties draw:fill="none" draw:stroke="solid" svg:stroke-width="0.01389in" svg:stroke-color="#ba9ca0" svg:stroke-opacity="70%" draw:stroke-linejoin="miter" svg:stroke-linecap="butt" draw:decorative="true" style:protect="position size"/>
    </style:style>
    <style:style style:family="graphic" style:name="a2335">
      <style:graphic-properties draw:fill="none" draw:stroke="solid" svg:stroke-width="0.01389in" svg:stroke-color="#ba9ca0" svg:stroke-opacity="70%" draw:stroke-linejoin="miter" svg:stroke-linecap="butt" draw:decorative="true" style:protect="position size"/>
    </style:style>
    <style:style style:family="graphic" style:name="a2336">
      <style:graphic-properties draw:fill="none" draw:stroke="solid" svg:stroke-width="0.01389in" svg:stroke-color="#ba9ca0" svg:stroke-opacity="70%" draw:stroke-linejoin="miter" svg:stroke-linecap="butt" draw:decorative="true" style:protect="position size"/>
    </style:style>
    <style:style style:family="drawing-page" style:name="a2337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2338">
      <style:graphic-properties draw:fill="none" draw:stroke="solid" svg:stroke-width="0.01389in" svg:stroke-color="#ba9ca0" svg:stroke-opacity="70%" draw:stroke-linejoin="miter" svg:stroke-linecap="butt" draw:decorative="true" style:protect="position size"/>
    </style:style>
    <style:style style:family="graphic" style:name="a2339">
      <style:graphic-properties draw:fill="none" draw:stroke="solid" svg:stroke-width="0.01389in" svg:stroke-color="#ba9ca0" svg:stroke-opacity="70%" draw:stroke-linejoin="miter" svg:stroke-linecap="butt" draw:decorative="true" style:protect="position size"/>
    </style:style>
    <style:style style:family="graphic" style:name="a1670">
      <style:graphic-properties draw:fill="none" draw:stroke="solid" svg:stroke-width="0.01389in" svg:stroke-color="#ba9ca0" svg:stroke-opacity="70%" draw:stroke-linejoin="miter" svg:stroke-linecap="butt" draw:decorative="true" style:protect="position size"/>
    </style:style>
    <style:style style:family="graphic" style:name="a1671">
      <style:graphic-properties draw:fill="none" draw:stroke="solid" svg:stroke-width="0.01389in" svg:stroke-color="#ba9ca0" svg:stroke-opacity="70%" draw:stroke-linejoin="miter" svg:stroke-linecap="butt" draw:decorative="true" style:protect="position size"/>
    </style:style>
    <style:style style:family="text" style:name="a1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4">
      <style:graphic-properties fo:wrap-option="wrap" fo:padding-top="0.05in" fo:padding-bottom="0.05in" fo:padding-left="0.1in" fo:padding-right="0.1in" draw:textarea-vertical-align="middle" draw:textarea-horizontal-align="center" draw:fill="solid" draw:fill-color="#155767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675">
      <style:text-properties fo:text-transform="uppercase" fo:color="#0b425e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6">
      <style:text-properties fo:text-transform="uppercase" fo:color="#0b425e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7">
      <style:text-properties fo:text-transform="uppercase" fo:color="#0b425e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8">
      <style:text-properties fo:text-transform="uppercase" fo:color="#0b425e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9">
      <style:text-properties fo:text-transform="uppercase" fo:color="#0b425e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1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Nyal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2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Nyal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3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Nyal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4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Nyal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5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Nyal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0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Nyal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6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Nyal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1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Nyal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7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Nyal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2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Nyal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8">
      <style:paragraph-properties fo:line-height="100%" fo:text-align="left" style:tab-stop-distance="1in" fo:margin-left="0.25in" fo:margin-right="0in" fo:text-indent="-0.25in" fo:margin-top="0.13889in" fo:margin-bottom="0.20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3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Nyal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4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Nyal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5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Nyal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6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Nyal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40">
      <style:graphic-properties draw:fill="none" draw:stroke="solid" svg:stroke-width="0.01389in" svg:stroke-color="#ba9ca0" svg:stroke-opacity="70%" draw:stroke-linejoin="miter" svg:stroke-linecap="butt" draw:decorative="true" style:protect="position size"/>
    </style:style>
    <style:style style:family="text" style:name="a2117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Nyal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41">
      <style:graphic-properties draw:fill="none" draw:stroke="solid" svg:stroke-width="0.01389in" svg:stroke-color="#ba9ca0" svg:stroke-opacity="70%" draw:stroke-linejoin="miter" svg:stroke-linecap="butt" draw:decorative="true" style:protect="position size"/>
    </style:style>
    <style:style style:family="text" style:name="a2118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Nyal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42">
      <style:graphic-properties draw:fill="none" draw:stroke="solid" svg:stroke-width="0.01389in" svg:stroke-color="#ba9ca0" svg:stroke-opacity="70%" draw:stroke-linejoin="miter" svg:stroke-linecap="butt" draw:decorative="true" style:protect="position size"/>
    </style:style>
    <style:style style:family="text" style:name="a2119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Nyal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43">
      <style:graphic-properties draw:fill="none" draw:stroke="solid" svg:stroke-width="0.01389in" svg:stroke-color="#ba9ca0" svg:stroke-opacity="70%" draw:stroke-linejoin="miter" svg:stroke-linecap="butt" draw:decorative="true" style:protect="position size"/>
    </style:style>
    <style:style style:family="graphic" style:name="a2344">
      <style:graphic-properties draw:fill="none" draw:stroke="solid" svg:stroke-width="0.01389in" svg:stroke-color="#ba9ca0" svg:stroke-opacity="70%" draw:stroke-linejoin="miter" svg:stroke-linecap="butt" draw:decorative="true" style:protect="position size"/>
    </style:style>
    <style:style style:family="text" style:name="a2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47">
      <style:graphic-properties fo:wrap-option="wrap" fo:padding-top="0.05in" fo:padding-bottom="0.05in" fo:padding-left="0.1in" fo:padding-right="0.1in" draw:textarea-vertical-align="middle" draw:textarea-horizontal-align="center" draw:fill="solid" draw:fill-color="#155767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2348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Walbaum Display Light" fo:font-size="0.51389in" style:font-size-asian="0.51389in" style:font-size-complex="0.513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2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Nyala" style:font-family-asian="STXingkai" style:font-family-complex="Shrut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3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Nyala" style:font-family-asian="STXingkai" style:font-family-complex="Shrut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4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Nyala" style:font-family-asian="STXingkai" style:font-family-complex="Shrut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5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Nyala" style:font-family-asian="STXingkai" style:font-family-complex="Shrut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6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Nyala" style:font-family-asian="STXingkai" style:font-family-complex="Shrut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7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Nyala" style:font-family-asian="STXingkai" style:font-family-complex="Shrut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8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Nyala" style:font-family-asian="STXingkai" style:font-family-complex="Shrut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0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Nyal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9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Nyala" style:font-family-asian="STXingkai" style:font-family-complex="Shrut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1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Nyal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2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Nyal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3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Nyal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4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Nyal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5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Nyal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0">
      <style:paragraph-properties fo:line-height="100%" fo:text-align="left" style:tab-stop-distance="1in" fo:margin-left="0in" fo:margin-right="0in" fo:text-indent="0in" fo:margin-top="0.13889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6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Nyal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7">
      <style:paragraph-properties fo:line-height="100%" fo:text-align="left" style:tab-stop-distance="1in" fo:margin-left="0.25in" fo:margin-right="0in" fo:text-indent="-0.25in" fo:margin-top="0.13889in" fo:margin-bottom="0.20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23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9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Nyal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6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51">
      <style:graphic-properties draw:fill="none" draw:stroke="solid" svg:stroke-width="0.01389in" svg:stroke-color="#ba9ca0" svg:stroke-opacity="70%" draw:stroke-linejoin="miter" svg:stroke-linecap="butt" draw:decorative="true" style:protect="position size"/>
    </style:style>
    <style:style style:family="graphic" style:name="a2352">
      <style:graphic-properties draw:fill="none" draw:stroke="solid" svg:stroke-width="0.01389in" svg:stroke-color="#ba9ca0" svg:stroke-opacity="70%" draw:stroke-linejoin="miter" svg:stroke-linecap="butt" draw:decorative="true" style:protect="position size"/>
    </style:style>
    <style:style style:family="presentation" style:name="a21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353">
      <style:graphic-properties draw:fill="none" draw:stroke="solid" svg:stroke-width="0.01389in" svg:stroke-color="#ba9ca0" svg:stroke-opacity="70%" draw:stroke-linejoin="miter" svg:stroke-linecap="butt" draw:decorative="true" style:protect="position size"/>
    </style:style>
    <style:style style:family="presentation" style:name="a2354">
      <style:graphic-properties draw:fill="none" draw:stroke="none"/>
    </style:style>
    <style:style style:family="text" style:name="a2355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6">
      <style:paragraph-properties fo:line-height="100%" fo:text-align="left" style:tab-stop-distance="1in" fo:margin-left="0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8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9">
      <style:paragraph-properties fo:line-height="100%" fo:text-align="left" style:tab-stop-distance="1in" fo:margin-left="0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0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Nyala" style:font-family-asian="STXingkai" style:font-family-complex="Shrut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3">
      <style:text-properties fo:font-variant="normal" fo:text-transform="none" fo:color="#191919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ff"/>
    </style:style>
    <style:style style:family="text" style:name="a1694">
      <style:text-properties fo:font-variant="normal" fo:text-transform="none" fo:color="#191919" style:text-line-through-type="none" style:text-line-through-style="none" style:text-line-through-width="auto" style:text-line-through-color="font-color" style:text-position="0% 100%" fo:font-family="Nyala" style:font-family-asian="Roboto" style:font-family-complex="Roboto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ff"/>
    </style:style>
    <style:style style:family="text" style:name="a1695">
      <style:text-properties fo:font-variant="normal" fo:text-transform="none" fo:color="#191919" style:text-line-through-type="none" style:text-line-through-style="none" style:text-line-through-width="auto" style:text-line-through-color="font-color" style:text-position="0% 100%" fo:font-family="Nyala" style:font-family-asian="Roboto" style:font-family-complex="Roboto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ff"/>
    </style:style>
    <style:style style:family="paragraph" style:name="a1696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8">
      <style:text-properties fo:font-variant="normal" fo:text-transform="none" fo:color="#191919" style:text-line-through-type="none" style:text-line-through-style="none" style:text-line-through-width="auto" style:text-line-through-color="font-color" style:text-position="0% 100%" fo:font-family="Nyala" style:font-family-asian="Roboto" style:font-family-complex="Roboto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ff"/>
    </style:style>
    <style:style style:family="text" style:name="a1920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Nyal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9">
      <style:text-properties fo:font-variant="normal" fo:text-transform="none" fo:color="#191919" style:text-line-through-type="none" style:text-line-through-style="none" style:text-line-through-width="auto" style:text-line-through-color="font-color" style:text-position="0% 100%" fo:font-family="Nyala" style:font-family-asian="Roboto" style:font-family-complex="Roboto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ff"/>
    </style:style>
    <style:style style:family="text" style:name="a1921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Nyal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2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Nyal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3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Nyal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4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Nyal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5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Nyal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0">
      <style:graphic-properties draw:fill="none" draw:stroke="solid" svg:stroke-width="0.01389in" svg:stroke-color="#000000" svg:stroke-opacity="100%"/>
    </style:style>
    <style:style style:family="paragraph" style:name="a1926">
      <style:paragraph-properties fo:line-height="100%" fo:text-align="left" style:tab-stop-distance="1in" fo:margin-left="0.25in" fo:margin-right="0in" fo:text-indent="-0.25in" fo:margin-top="0.13889in" fo:margin-bottom="0.20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8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Nyal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9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Nyal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137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23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62">
      <style:graphic-properties draw:fill="none" draw:stroke="solid" svg:stroke-width="0.01389in" svg:stroke-color="#ba9ca0" svg:stroke-opacity="70%" draw:stroke-linejoin="miter" svg:stroke-linecap="butt" draw:decorative="true" style:protect="position size"/>
    </style:style>
    <style:style style:family="paragraph" style:name="a21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0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2">
      <style:text-properties fo:font-variant="normal" fo:text-transform="none" fo:color="#191919" style:text-line-through-type="none" style:text-line-through-style="none" style:text-line-through-width="auto" style:text-line-through-color="font-color" style:text-position="0% 100%" fo:font-family="Nyala" style:font-family-asian="Roboto" style:font-family-complex="Roboto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ff"/>
    </style:style>
    <style:style style:family="text" style:name="a1703">
      <style:text-properties fo:font-variant="normal" fo:text-transform="none" fo:color="#191919" style:text-line-through-type="none" style:text-line-through-style="none" style:text-line-through-width="auto" style:text-line-through-color="font-color" style:text-position="0% 100%" fo:font-family="Nyala" style:font-family-asian="Roboto" style:font-family-complex="Roboto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ff"/>
    </style:style>
    <style:style style:family="text" style:name="a1704">
      <style:text-properties fo:font-variant="normal" fo:text-transform="none" fo:color="#191919" style:text-line-through-type="none" style:text-line-through-style="none" style:text-line-through-width="auto" style:text-line-through-color="font-color" style:text-position="0% 100%" fo:font-family="Nyala" style:font-family-asian="Roboto" style:font-family-complex="Roboto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ff"/>
    </style:style>
    <style:style style:family="text" style:name="a1705">
      <style:text-properties fo:font-variant="normal" fo:text-transform="none" fo:color="#191919" style:text-line-through-type="none" style:text-line-through-style="none" style:text-line-through-width="auto" style:text-line-through-color="font-color" style:text-position="0% 100%" fo:font-family="Nyala" style:font-family-asian="Roboto" style:font-family-complex="Roboto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ff"/>
    </style:style>
    <style:style style:family="text" style:name="a1706">
      <style:text-properties fo:font-variant="normal" fo:text-transform="none" fo:color="#191919" style:text-line-through-type="none" style:text-line-through-style="none" style:text-line-through-width="auto" style:text-line-through-color="font-color" style:text-position="0% 100%" fo:font-family="Nyala" style:font-family-asian="Roboto" style:font-family-complex="Roboto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ff"/>
    </style:style>
    <style:style style:family="text" style:name="a1930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Nyal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7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1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Nyal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2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Nyal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9">
      <style:text-properties fo:font-variant="normal" fo:text-transform="none" fo:color="#191919" style:text-line-through-type="none" style:text-line-through-style="none" style:text-line-through-width="auto" style:text-line-through-color="font-color" style:text-position="0% 100%" fo:font-family="Nyala" style:font-family-asian="Roboto" style:font-family-complex="Roboto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ff"/>
    </style:style>
    <style:style style:family="text" style:name="a1933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Nyal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4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Nyal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5">
      <style:paragraph-properties fo:line-height="100%" fo:text-align="left" style:tab-stop-distance="1in" fo:margin-left="0.25in" fo:margin-right="0in" fo:text-indent="-0.25in" fo:margin-top="0.13889in" fo:margin-bottom="0.20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0">
      <style:graphic-properties fo:wrap-option="wrap" fo:padding-top="0.05in" fo:padding-bottom="0.05in" fo:padding-left="0.1in" fo:padding-right="0.1in" draw:textarea-vertical-align="middle" draw:textarea-horizontal-align="center" draw:fill="solid" draw:fill-color="#155767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2141" style:parent-style-name="Graphics">
      <style:graphic-properties draw:fill="none" fo:clip="rect(0in, 1.58956in, -0.00004in, 1.46469in)" draw:stroke="none"/>
    </style:style>
    <style:style style:family="text" style:name="a1937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Nyal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2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Nyala" style:font-family-asian="Roboto" style:font-family-complex="Roboto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8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Nyal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3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Nyala" style:font-family-asian="Roboto" style:font-family-complex="Roboto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9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Nyal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4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Nyala" style:font-family-asian="Roboto" style:font-family-complex="Roboto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147">
      <style:graphic-properties draw:fill="none" draw:stroke="solid" svg:stroke-width="0.01389in" svg:stroke-color="#ba9ca0" svg:stroke-opacity="70%" draw:stroke-linejoin="miter" svg:stroke-linecap="butt" draw:decorative="true" style:protect="position size"/>
    </style:style>
    <style:style style:family="text" style:name="a2148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Nyala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9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Nyala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0">
      <style:text-properties fo:font-variant="normal" fo:text-transform="none" fo:color="#191919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ff"/>
    </style:style>
    <style:style style:family="text" style:name="a1711">
      <style:text-properties fo:font-variant="normal" fo:text-transform="none" fo:color="#191919" style:text-line-through-type="none" style:text-line-through-style="none" style:text-line-through-width="auto" style:text-line-through-color="font-color" style:text-position="0% 100%" fo:font-family="Nyala" style:font-family-asian="Roboto" style:font-family-complex="Roboto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ff"/>
    </style:style>
    <style:style style:family="text" style:name="a1712">
      <style:text-properties fo:font-variant="normal" fo:text-transform="none" fo:color="#191919" style:text-line-through-type="none" style:text-line-through-style="none" style:text-line-through-width="auto" style:text-line-through-color="font-color" style:text-position="0% 100%" fo:font-family="Nyala" style:font-family-asian="Roboto" style:font-family-complex="Roboto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ff"/>
    </style:style>
    <style:style style:family="paragraph" style:name="a1713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5">
      <style:text-properties fo:font-variant="normal" fo:text-transform="none" fo:color="#191919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ff"/>
    </style:style>
    <style:style style:family="text" style:name="a1716">
      <style:text-properties fo:font-variant="normal" fo:text-transform="none" fo:color="#191919" style:text-line-through-type="none" style:text-line-through-style="none" style:text-line-through-width="auto" style:text-line-through-color="font-color" style:text-position="0% 100%" fo:font-family="Nyala" style:font-family-asian="Roboto" style:font-family-complex="Roboto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ff"/>
    </style:style>
    <style:style style:family="text" style:name="a1940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Nyal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7">
      <style:text-properties fo:font-variant="normal" fo:text-transform="none" fo:color="#191919" style:text-line-through-type="none" style:text-line-through-style="none" style:text-line-through-width="auto" style:text-line-through-color="font-color" style:text-position="0% 100%" fo:font-family="Nyala" style:font-family-asian="Roboto" style:font-family-complex="Roboto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ff"/>
    </style:style>
    <style:style style:family="text" style:name="a1941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Nyal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8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2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Nyal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9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3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Nyal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4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Nyal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5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Nyal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0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Nyala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6">
      <style:paragraph-properties fo:line-height="100%" fo:text-align="left" style:tab-stop-distance="1in" fo:margin-left="0.25in" fo:margin-right="0in" fo:text-indent="-0.25in" fo:margin-top="0.13889in" fo:margin-bottom="0.20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1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Nyala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2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Nyala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3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Nyala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9">
      <style:graphic-properties draw:fill="none" draw:stroke="solid" svg:stroke-width="0.01389in" svg:stroke-color="#000000" svg:stroke-opacity="100%"/>
    </style:style>
    <style:style style:family="text" style:name="a2154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Nyala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58">
      <style:graphic-properties draw:fill="none" draw:stroke="solid" svg:stroke-width="0.01389in" svg:stroke-color="#000000" svg:stroke-opacity="100%"/>
    </style:style>
    <style:style style:family="presentation" style:name="a2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1">
      <style:text-properties fo:font-variant="normal" fo:text-transform="none" fo:color="#191919" style:text-line-through-type="none" style:text-line-through-style="none" style:text-line-through-width="auto" style:text-line-through-color="font-color" style:text-position="0% 100%" fo:font-family="Nyala" style:font-family-asian="Roboto" style:font-family-complex="Roboto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ff"/>
    </style:style>
    <style:style style:family="text" style:name="a1722">
      <style:text-properties fo:font-variant="normal" fo:text-transform="none" fo:color="#191919" style:text-line-through-type="none" style:text-line-through-style="none" style:text-line-through-width="auto" style:text-line-through-color="font-color" style:text-position="0% 100%" fo:font-family="Nyala" style:font-family-asian="Roboto" style:font-family-complex="Roboto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ff"/>
    </style:style>
    <style:style style:family="text" style:name="a1723">
      <style:text-properties fo:font-variant="normal" fo:text-transform="none" fo:color="#191919" style:text-line-through-type="none" style:text-line-through-style="none" style:text-line-through-width="auto" style:text-line-through-color="font-color" style:text-position="0% 100%" fo:font-family="Nyala" style:font-family-asian="Roboto" style:font-family-complex="Roboto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ff"/>
    </style:style>
    <style:style style:family="paragraph" style:name="a1724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6">
      <style:text-properties fo:font-variant="normal" fo:text-transform="none" fo:color="#191919" style:text-line-through-type="none" style:text-line-through-style="none" style:text-line-through-width="auto" style:text-line-through-color="font-color" style:text-position="0% 100%" fo:font-family="Nyala" style:font-family-asian="Roboto" style:font-family-complex="Roboto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ff"/>
    </style:style>
    <style:style style:family="presentation" style:name="a19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7">
      <style:text-properties fo:font-variant="normal" fo:text-transform="none" fo:color="#191919" style:text-line-through-type="none" style:text-line-through-style="none" style:text-line-through-width="auto" style:text-line-through-color="font-color" style:text-position="0% 100%" fo:font-family="Nyala" style:font-family-asian="Roboto" style:font-family-complex="Roboto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ff"/>
    </style:style>
    <style:style style:family="text" style:name="a1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8">
      <style:text-properties fo:font-variant="normal" fo:text-transform="none" fo:color="#191919" style:text-line-through-type="none" style:text-line-through-style="none" style:text-line-through-width="auto" style:text-line-through-color="font-color" style:text-position="0% 100%" fo:font-family="Nyala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ff"/>
    </style:style>
    <style:style style:family="text" style:name="a1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9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7">
      <style:text-properties fo:text-transform="uppercase" fo:color="#0b425e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8">
      <style:text-properties fo:text-transform="uppercase" fo:color="#0b425e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9">
      <style:text-properties fo:text-transform="uppercase" fo:color="#0b425e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16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68">
      <style:graphic-properties fo:wrap-option="wrap" fo:padding-top="0.05in" fo:padding-bottom="0.05in" fo:padding-left="0.1in" fo:padding-right="0.1in" draw:textarea-vertical-align="middle" draw:textarea-horizontal-align="center" draw:fill="solid" draw:fill-color="#155767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2169" style:parent-style-name="Graphics">
      <style:graphic-properties draw:fill="none" fo:clip="rect(0in, 14.70366in, 0in, 11.68928in)" draw:stroke="none"/>
    </style:style>
    <style:style style:family="text" style:name="a1731">
      <style:text-properties fo:font-variant="normal" fo:text-transform="none" fo:color="#191919" style:text-line-through-type="none" style:text-line-through-style="none" style:text-line-through-width="auto" style:text-line-through-color="font-color" style:text-position="0% 100%" fo:font-family="Nyala" style:font-family-asian="Roboto" style:font-family-complex="Roboto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ff"/>
    </style:style>
    <style:style style:family="text" style:name="a1732">
      <style:text-properties fo:font-variant="normal" fo:text-transform="none" fo:color="#191919" style:text-line-through-type="none" style:text-line-through-style="none" style:text-line-through-width="auto" style:text-line-through-color="font-color" style:text-position="0% 100%" fo:font-family="Nyala" style:font-family-asian="Roboto" style:font-family-complex="Roboto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ff"/>
    </style:style>
    <style:style style:family="text" style:name="a1733">
      <style:text-properties fo:font-variant="normal" fo:text-transform="none" fo:color="#191919" style:text-line-through-type="none" style:text-line-through-style="none" style:text-line-through-width="auto" style:text-line-through-color="font-color" style:text-position="0% 100%" fo:font-family="Nyala" style:font-family-asian="Roboto" style:font-family-complex="Roboto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ff"/>
    </style:style>
    <style:style style:family="paragraph" style:name="a1734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6">
      <style:text-properties fo:font-variant="normal" fo:text-transform="none" fo:color="#191919" style:text-line-through-type="none" style:text-line-through-style="none" style:text-line-through-width="auto" style:text-line-through-color="font-color" style:text-position="0% 100%" fo:font-family="Nyala" style:font-family-asian="Roboto" style:font-family-complex="Roboto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ff"/>
    </style:style>
    <style:style style:family="text" style:name="a1960">
      <style:text-properties fo:text-transform="uppercase" fo:color="#0b425e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7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style:font-family-asian="Roboto" style:font-family-complex="Roboto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1">
      <style:text-properties fo:text-transform="uppercase" fo:color="#0b425e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8">
      <style:paragraph-properties fo:line-height="14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64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Nyala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5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Nyala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6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Nyala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0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Nyala" fo:font-size="0.61111in" style:font-size-asian="0.61111in" style:font-size-complex="0.61111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1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Nyala" fo:font-size="0.61111in" style:font-size-asian="0.61111in" style:font-size-complex="0.61111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2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Nyala" fo:font-size="0.61111in" style:font-size-asian="0.61111in" style:font-size-complex="0.61111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9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Nyala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175">
      <style:graphic-properties draw:fill="none" draw:stroke="solid" svg:stroke-width="0.01389in" svg:stroke-color="#ba9ca0" svg:stroke-opacity="70%" draw:stroke-linejoin="miter" svg:stroke-linecap="butt" draw:decorative="true" style:protect="position size"/>
    </style:style>
    <style:style style:family="text" style:name="a2176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Nyala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7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Nyala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8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Nyala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9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0">
      <style:text-properties fo:font-variant="normal" fo:text-transform="none" fo:color="#191919" style:text-line-through-type="none" style:text-line-through-style="none" style:text-line-through-width="auto" style:text-line-through-color="font-color" style:text-position="0% 100%" fo:font-family="Nyala" style:font-family-asian="Roboto" style:font-family-complex="Roboto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ff"/>
    </style:style>
    <style:style style:family="paragraph" style:name="a1741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3">
      <style:text-properties fo:font-variant="normal" fo:text-transform="none" fo:color="#191919" style:text-line-through-type="none" style:text-line-through-style="none" style:text-line-through-width="auto" style:text-line-through-color="font-color" style:text-position="0% 100%" fo:font-family="Nyala" style:font-family-asian="Roboto" style:font-family-complex="Roboto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ff"/>
    </style:style>
    <style:style style:family="paragraph" style:name="a1744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6">
      <style:text-properties fo:font-variant="normal" fo:text-transform="none" fo:color="#191919" style:text-line-through-type="none" style:text-line-through-style="none" style:text-line-through-width="auto" style:text-line-through-color="font-color" style:text-position="0% 100%" fo:font-family="Nyala" style:font-family-asian="Roboto" style:font-family-complex="Roboto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ff"/>
    </style:style>
    <style:style style:family="paragraph" style:name="a1747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2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Nyala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9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Nyala" style:font-family-asian="STXingkai" style:font-family-complex="Shrut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5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Nyala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8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Nyala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8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979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Nyala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83">
      <style:graphic-properties draw:fill="none" draw:stroke="solid" svg:stroke-width="0.01389in" svg:stroke-color="#ba9ca0" svg:stroke-opacity="70%" draw:stroke-linejoin="miter" svg:stroke-linecap="butt" draw:decorative="true" style:protect="position size"/>
    </style:style>
    <style:style style:family="graphic" style:name="a2184">
      <style:graphic-properties draw:fill="none" draw:stroke="solid" svg:stroke-width="0.01389in" svg:stroke-color="#ba9ca0" svg:stroke-opacity="70%" draw:stroke-linejoin="miter" svg:stroke-linecap="butt" draw:decorative="true" style:protect="position size"/>
    </style:style>
    <style:style style:family="graphic" style:name="a2185">
      <style:graphic-properties draw:fill="none" draw:stroke="solid" svg:stroke-width="0.01389in" svg:stroke-color="#ba9ca0" svg:stroke-opacity="70%" draw:stroke-linejoin="miter" svg:stroke-linecap="butt" draw:decorative="true" style:protect="position size"/>
    </style:style>
    <style:style style:family="graphic" style:name="a2186">
      <style:graphic-properties draw:fill="none" draw:stroke="solid" svg:stroke-width="0.01389in" svg:stroke-color="#ba9ca0" svg:stroke-opacity="70%" draw:stroke-linejoin="miter" svg:stroke-linecap="butt" draw:decorative="true" style:protect="position size"/>
    </style:style>
    <style:style style:family="graphic" style:name="a2187">
      <style:graphic-properties draw:fill="none" draw:stroke="solid" svg:stroke-width="0.01389in" svg:stroke-color="#ba9ca0" svg:stroke-opacity="70%" draw:stroke-linejoin="miter" svg:stroke-linecap="butt" draw:decorative="true" style:protect="position size"/>
    </style:style>
    <style:style style:family="graphic" style:name="a2188">
      <style:graphic-properties draw:fill="none" draw:stroke="solid" svg:stroke-width="0.01389in" svg:stroke-color="#ba9ca0" svg:stroke-opacity="70%" draw:stroke-linejoin="miter" svg:stroke-linecap="butt" draw:decorative="true" style:protect="position size"/>
    </style:style>
    <style:style style:family="graphic" style:name="a2189">
      <style:graphic-properties draw:fill="none" draw:stroke="solid" svg:stroke-width="0.01389in" svg:stroke-color="#ba9ca0" svg:stroke-opacity="70%" draw:stroke-linejoin="miter" svg:stroke-linecap="butt" draw:decorative="true" style:protect="position size"/>
    </style:style>
    <style:style style:family="paragraph" style:name="a1750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2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Nyala" style:font-family-asian="STXingkai" style:font-family-complex="Shrut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756">
      <style:graphic-properties draw:fill="none" draw:stroke="solid" svg:stroke-width="0.01389in" svg:stroke-color="#ba9ca0" svg:stroke-opacity="70%" draw:stroke-linejoin="miter" svg:stroke-linecap="butt" draw:decorative="true" style:protect="position size"/>
    </style:style>
    <style:style style:family="paragraph" style:name="a198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7">
      <style:graphic-properties draw:fill="none" draw:stroke="solid" svg:stroke-width="0.01389in" svg:stroke-color="#ba9ca0" svg:stroke-opacity="70%" draw:stroke-linejoin="miter" svg:stroke-linecap="butt" draw:decorative="true" style:protect="position size"/>
    </style:style>
    <style:style style:family="presentation" style:name="a1758">
      <style:graphic-properties draw:fill="none" fo:clip="rect(0in, 0.63557in, 0in, 0.53359in)" draw:stroke="none"/>
    </style:style>
    <style:style style:family="text" style:name="a1982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Nyala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 Ligh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86">
      <style:graphic-properties draw:fill="none" draw:stroke="solid" svg:stroke-width="0.01389in" svg:stroke-color="#000000" svg:stroke-opacity="100%"/>
    </style:style>
    <style:style style:family="paragraph" style:name="a21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92">
      <style:graphic-properties fo:wrap-option="wrap" fo:padding-top="0.05in" fo:padding-bottom="0.05in" fo:padding-left="0.1in" fo:padding-right="0.1in" draw:textarea-vertical-align="middle" draw:textarea-horizontal-align="center" draw:fill="solid" draw:fill-color="#155767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93">
      <style:graphic-properties draw:fill="none" fo:clip="rect(0in, 4.301in, 0in, 3.68225in)" draw:stroke="none"/>
    </style:style>
    <style:style style:family="text" style:name="a1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4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197">
      <style:graphic-properties draw:fill="none" draw:stroke="solid" svg:stroke-width="0.01389in" svg:stroke-color="#ba9ca0" svg:stroke-opacity="70%" draw:stroke-linejoin="miter" svg:stroke-linecap="butt" draw:decorative="true" style:protect="position size"/>
    </style:style>
    <style:style style:family="text" style:name="a2198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9">
      <style:paragraph-properties fo:line-height="100%" fo:text-align="left" style:tab-stop-distance="1in" fo:margin-left="0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0">
      <style:paragraph-properties fo:line-height="9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62">
      <style:graphic-properties draw:fill="none" draw:stroke="solid" svg:stroke-width="0.01389in" svg:stroke-color="#000000" svg:stroke-opacity="100%"/>
    </style:style>
    <style:style style:family="presentation" style:name="a17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9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9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94">
      <style:text-properties fo:text-transform="uppercase" fo:color="#0b425e" style:text-line-through-type="none" style:text-line-through-style="none" style:text-line-through-width="auto" style:text-line-through-color="font-color" style:text-position="0% 100%" fo:font-family="Walbaum Display Light" fo:font-size="0.5in" style:font-size-asian="0.5in" style:font-size-complex="0.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5">
      <style:text-properties fo:text-transform="uppercase" fo:color="#0b425e" style:text-line-through-type="none" style:text-line-through-style="none" style:text-line-through-width="auto" style:text-line-through-color="font-color" style:text-position="0% 100%" fo:font-family="Walbaum Display Light" fo:font-size="0.5in" style:font-size-asian="0.5in" style:font-size-complex="0.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8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Nyal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9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Nyal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1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2">
      <style:paragraph-properties fo:line-height="100%" fo:text-align="left" style:tab-stop-distance="1in" fo:margin-left="0.75in" fo:margin-right="0in" fo:text-indent="-0.25in" fo:margin-top="0.13889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4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5">
      <style:paragraph-properties fo:line-height="100%" fo:text-align="left" style:tab-stop-distance="1in" fo:margin-left="0.75in" fo:margin-right="0in" fo:text-indent="-0.25in" fo:margin-top="0.13889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208">
      <style:graphic-properties draw:fill="none" draw:stroke="solid" svg:stroke-width="0.01389in" svg:stroke-color="#000000" svg:stroke-opacity="100%"/>
    </style:style>
    <style:style style:family="presentation" style:name="a22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0">
      <style:text-properties fo:text-transform="uppercase" fo:color="#0b425e" style:text-line-through-type="none" style:text-line-through-style="none" style:text-line-through-width="auto" style:text-line-through-color="font-color" style:text-position="0% 100%" fo:font-family="Walbaum Display Light" fo:font-size="0.44444in" style:font-size-asian="0.44444in" style:font-size-complex="0.44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1">
      <style:text-properties fo:text-transform="uppercase" fo:color="#0b425e" style:text-line-through-type="none" style:text-line-through-style="none" style:text-line-through-width="auto" style:text-line-through-color="font-color" style:text-position="0% 100%" fo:font-family="Walbaum Display Light" fo:font-size="0.44444in" style:font-size-asian="0.44444in" style:font-size-complex="0.44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74">
      <style:graphic-properties draw:fill="none" fo:clip="rect(0in, 0.11669in, 0in, 0.11669in)" draw:stroke="none"/>
    </style:style>
    <style:style style:family="text" style:name="a1775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Nyala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6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Nyala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7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Nyala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8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Nyala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9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Nyala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21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2216">
      <style:graphic-properties draw:fill="none" draw:stroke="solid" svg:stroke-width="0.01389in" svg:stroke-color="#ba9ca0" svg:stroke-opacity="70%" draw:stroke-linejoin="miter" svg:stroke-linecap="butt" draw:decorative="true" style:protect="position size"/>
    </style:style>
    <style:style style:family="graphic" style:name="a2217">
      <style:graphic-properties draw:fill="none" draw:stroke="solid" svg:stroke-width="0.01389in" svg:stroke-color="#ba9ca0" svg:stroke-opacity="70%" draw:stroke-linejoin="miter" svg:stroke-linecap="butt" draw:decorative="true" style:protect="position size"/>
    </style:style>
    <style:style style:family="graphic" style:name="a2218">
      <style:graphic-properties draw:fill="none" draw:stroke="solid" svg:stroke-width="0.01389in" svg:stroke-color="#ba9ca0" svg:stroke-opacity="70%" draw:stroke-linejoin="miter" svg:stroke-linecap="butt" draw:decorative="true" style:protect="position size"/>
    </style:style>
    <style:style style:family="graphic" style:name="a2219">
      <style:graphic-properties draw:fill="none" draw:stroke="solid" svg:stroke-width="0.01389in" svg:stroke-color="#ba9ca0" svg:stroke-opacity="70%" draw:stroke-linejoin="miter" svg:stroke-linecap="butt" draw:decorative="true" style:protect="position size"/>
    </style:style>
    <style:style style:family="paragraph" style:name="a178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2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Nyala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3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Nyala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84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Nyala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7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Nyala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20">
      <style:graphic-properties draw:fill="none" draw:stroke="solid" svg:stroke-width="0.01389in" svg:stroke-color="#ba9ca0" svg:stroke-opacity="70%" draw:stroke-linejoin="miter" svg:stroke-linecap="butt" draw:decorative="true" style:protect="position size"/>
    </style:style>
    <style:style style:family="graphic" style:name="a2221">
      <style:graphic-properties draw:fill="none" draw:stroke="solid" svg:stroke-width="0.01389in" svg:stroke-color="#ba9ca0" svg:stroke-opacity="70%" draw:stroke-linejoin="miter" svg:stroke-linecap="butt" draw:decorative="true" style:protect="position size"/>
    </style:style>
    <style:style style:family="graphic" style:name="a2222">
      <style:graphic-properties draw:fill="none" draw:stroke="solid" svg:stroke-width="0.01389in" svg:stroke-color="#ba9ca0" svg:stroke-opacity="70%" draw:stroke-linejoin="miter" svg:stroke-linecap="butt" draw:decorative="true" style:protect="position size"/>
    </style:style>
    <style:style style:family="text" style:name="a2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25">
      <style:graphic-properties fo:wrap-option="wrap" fo:padding-top="0.05in" fo:padding-bottom="0.05in" fo:padding-left="0.1in" fo:padding-right="0.1in" draw:textarea-vertical-align="middle" draw:textarea-horizontal-align="center" draw:fill="solid" draw:fill-color="#155767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2226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Walbaum Display Light" fo:font-size="0.51389in" style:font-size-asian="0.51389in" style:font-size-complex="0.513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29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91">
      <style:graphic-properties draw:fill="none" draw:stroke="solid" svg:stroke-width="0.01389in" svg:stroke-color="#000000" svg:stroke-opacity="100%"/>
    </style:style>
    <style:style style:family="presentation" style:name="a17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00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Nyal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9">
      <style:text-properties fo:text-transform="uppercase" fo:color="#0b425e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1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Nyal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2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Nyal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3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Nyal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4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Nyal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5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Nyal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6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Nyal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0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7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Nyal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1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8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Nyal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2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9">
      <style:paragraph-properties fo:line-height="100%" fo:text-align="left" style:tab-stop-distance="1in" fo:margin-left="0in" fo:margin-right="0in" fo:text-indent="0in" fo:margin-top="0.13889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3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4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5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6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7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8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9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0">
      <style:text-properties fo:text-transform="uppercase" fo:color="#0b425e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3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Nyala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04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Nyala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0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80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2011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Nyal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2012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Nyal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2013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Nyal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2014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Nyal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5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Nyal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6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Nyal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0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7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Nyal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1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8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Nyal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2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9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Nyal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3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4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5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6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7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8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9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81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81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81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81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81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2020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Nyal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2021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Nyal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2022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Nyal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2023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Nyal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2024">
      <style:paragraph-properties fo:line-height="100%" fo:text-align="left" style:tab-stop-distance="1in" fo:margin-left="0in" fo:margin-right="0in" fo:text-indent="0in" fo:margin-top="0.13889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6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Nyal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0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7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Nyal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1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8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Nyal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2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9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Nyal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3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4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5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6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7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8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9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82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82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82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82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82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2030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Nyal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2031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Nyal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2032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Nyal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2033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Nyal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2034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Nyal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5">
      <style:paragraph-properties fo:line-height="100%" fo:text-align="left" style:tab-stop-distance="1in" fo:margin-left="0in" fo:margin-right="0in" fo:text-indent="0in" fo:margin-top="0.13889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0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7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Nyal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1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8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Nyal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2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9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Nyal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3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4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5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6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7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8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9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83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83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83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83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83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2040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Nyal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2041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Nyal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2042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Nyal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2043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Nyal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2044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Nyal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5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Nyal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6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Nyal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0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7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Nyal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1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8">
      <style:paragraph-properties fo:line-height="100%" fo:text-align="left" style:tab-stop-distance="1in" fo:margin-left="0in" fo:margin-right="0in" fo:text-indent="0in" fo:margin-top="0.13889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2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3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4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5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6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7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8">
      <style:paragraph-properties fo:line-height="100%" fo:text-align="left" style:tab-stop-distance="1in" fo:margin-left="0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84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84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84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84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84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2050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Nyal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2051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Nyal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2052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Nyal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2053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Nyal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2054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Nyal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5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Nyal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6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Nyal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57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Nyal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81">
      <style:graphic-properties draw:fill="none" draw:stroke="solid" svg:stroke-width="0.01389in" svg:stroke-color="#ba9ca0" svg:stroke-opacity="70%" draw:stroke-linejoin="miter" svg:stroke-linecap="butt" draw:decorative="true" style:protect="position size"/>
    </style:style>
    <style:style style:family="text" style:name="a2058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Nyal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82">
      <style:graphic-properties draw:fill="none" draw:stroke="solid" svg:stroke-width="0.01389in" svg:stroke-color="#ba9ca0" svg:stroke-opacity="70%" draw:stroke-linejoin="miter" svg:stroke-linecap="butt" draw:decorative="true" style:protect="position size"/>
    </style:style>
    <style:style style:family="text" style:name="a2059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Nyal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83">
      <style:graphic-properties draw:fill="none" fo:clip="rect(0in, 2.20939in, -0.00007in, 4.06741in)" draw:stroke="none"/>
    </style:style>
    <style:style style:family="drawing-page" style:name="a2284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2285">
      <style:graphic-properties draw:fill="none" draw:stroke="solid" svg:stroke-width="0.01389in" svg:stroke-color="#ba9ca0" svg:stroke-opacity="70%" draw:stroke-linejoin="miter" svg:stroke-linecap="butt" draw:decorative="true" style:protect="position size"/>
    </style:style>
    <style:style style:family="graphic" style:name="a2286">
      <style:graphic-properties draw:fill="none" draw:stroke="solid" svg:stroke-width="0.01389in" svg:stroke-color="#ba9ca0" svg:stroke-opacity="70%" draw:stroke-linejoin="miter" svg:stroke-linecap="butt" draw:decorative="true" style:protect="position size"/>
    </style:style>
    <style:style style:family="graphic" style:name="a2287">
      <style:graphic-properties draw:fill="none" draw:stroke="solid" svg:stroke-width="0.01389in" svg:stroke-color="#ba9ca0" svg:stroke-opacity="70%" draw:stroke-linejoin="miter" svg:stroke-linecap="butt" draw:decorative="true" style:protect="position size"/>
    </style:style>
    <style:style style:family="graphic" style:name="a2288">
      <style:graphic-properties draw:fill="none" draw:stroke="solid" svg:stroke-width="0.01389in" svg:stroke-color="#ba9ca0" svg:stroke-opacity="70%" draw:stroke-linejoin="miter" svg:stroke-linecap="butt" draw:decorative="true" style:protect="position size"/>
    </style:style>
    <style:style style:family="graphic" style:name="a2289">
      <style:graphic-properties draw:fill="none" draw:stroke="solid" svg:stroke-width="0.01389in" svg:stroke-color="#ba9ca0" svg:stroke-opacity="70%" draw:stroke-linejoin="miter" svg:stroke-linecap="butt" draw:decorative="true" style:protect="position size"/>
    </style:style>
    <style:style style:family="text" style:name="a185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85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85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85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85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85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2060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Nyal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2061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Nyal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2062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Nyal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2063">
      <style:paragraph-properties fo:line-height="100%" fo:text-align="left" style:tab-stop-distance="1in" fo:margin-left="0in" fo:margin-right="0in" fo:text-indent="0in" fo:margin-top="0.13889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2065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066">
      <style:graphic-properties draw:fill="solid" draw:fill-color="#ffffff" draw:opacity="100%" draw:stroke="none"/>
    </style:style>
    <style:style style:family="graphic" style:name="a2290">
      <style:graphic-properties draw:fill="none" draw:stroke="solid" svg:stroke-width="0.01389in" svg:stroke-color="#ba9ca0" svg:stroke-opacity="70%" draw:stroke-linejoin="miter" svg:stroke-linecap="butt" draw:decorative="true" style:protect="position size"/>
    </style:style>
    <style:style style:family="presentation" style:name="a2067">
      <style:graphic-properties draw:fill="none" draw:stroke="solid" svg:stroke-width="0.01389in" svg:stroke-color="#000000" svg:stroke-opacity="100%"/>
    </style:style>
    <style:style style:family="graphic" style:name="a2291">
      <style:graphic-properties draw:fill="none" draw:stroke="solid" svg:stroke-width="0.01389in" svg:stroke-color="#ba9ca0" svg:stroke-opacity="70%" draw:stroke-linejoin="miter" svg:stroke-linecap="butt" draw:decorative="true" style:protect="position size"/>
    </style:style>
    <style:style style:family="presentation" style:name="a20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94">
      <style:graphic-properties fo:wrap-option="wrap" fo:padding-top="0.05in" fo:padding-bottom="0.05in" fo:padding-left="0.1in" fo:padding-right="0.1in" draw:textarea-vertical-align="middle" draw:textarea-horizontal-align="center" draw:fill="solid" draw:fill-color="#155767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2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97">
      <style:graphic-properties fo:wrap-option="wrap" fo:padding-top="0.05in" fo:padding-bottom="0.05in" fo:padding-left="0.1in" fo:padding-right="0.1in" draw:textarea-vertical-align="middle" draw:textarea-horizontal-align="center" draw:fill="solid" draw:fill-color="#f0ecec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2298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Walbaum Display Light" fo:font-size="0.56944in" style:font-size-asian="0.56944in" style:font-size-complex="0.569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3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631">
      <style:graphic-properties draw:fill="none" draw:stroke="solid" svg:stroke-width="0.01389in" svg:stroke-color="#ba9ca0" svg:stroke-opacity="70%" draw:stroke-linejoin="miter" svg:stroke-linecap="butt" draw:decorative="true" style:protect="position size"/>
    </style:style>
    <style:style style:family="graphic" style:name="a1632">
      <style:graphic-properties draw:fill="none" draw:stroke="solid" svg:stroke-width="0.01389in" svg:stroke-color="#ba9ca0" svg:stroke-opacity="70%" draw:stroke-linejoin="miter" svg:stroke-linecap="butt" draw:decorative="true" style:protect="position size"/>
    </style:style>
    <style:style style:family="graphic" style:name="a1633">
      <style:graphic-properties draw:fill="none" draw:stroke="solid" svg:stroke-width="0.01389in" svg:stroke-color="#ba9ca0" svg:stroke-opacity="70%" draw:stroke-linejoin="miter" svg:stroke-linecap="butt" draw:decorative="true" style:protect="position size"/>
    </style:style>
    <style:style style:family="graphic" style:name="a1634">
      <style:graphic-properties draw:fill="none" draw:stroke="solid" svg:stroke-width="0.01389in" svg:stroke-color="#ba9ca0" svg:stroke-opacity="70%" draw:stroke-linejoin="miter" svg:stroke-linecap="butt" draw:decorative="true" style:protect="position size"/>
    </style:style>
    <style:style style:family="graphic" style:name="a1635">
      <style:graphic-properties draw:fill="none" draw:stroke="solid" svg:stroke-width="0.01389in" svg:stroke-color="#ba9ca0" svg:stroke-opacity="70%" draw:stroke-linejoin="miter" svg:stroke-linecap="butt" draw:decorative="true" style:protect="position size"/>
    </style:style>
    <style:style style:family="text" style:name="a186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graphic" style:name="a1636">
      <style:graphic-properties draw:fill="none" draw:stroke="solid" svg:stroke-width="0.01389in" svg:stroke-color="#ba9ca0" svg:stroke-opacity="70%" draw:stroke-linejoin="miter" svg:stroke-linecap="butt" draw:decorative="true" style:protect="position size"/>
    </style:style>
    <style:style style:family="text" style:name="a186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graphic" style:name="a1637">
      <style:graphic-properties draw:fill="none" draw:stroke="solid" svg:stroke-width="0.01389in" svg:stroke-color="#ba9ca0" svg:stroke-opacity="70%" draw:stroke-linejoin="miter" svg:stroke-linecap="butt" draw:decorative="true" style:protect="position size"/>
    </style:style>
    <style:style style:family="text" style:name="a186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6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865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Nyala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6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7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Nyala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075">
      <style:drawing-page-properties draw:fill="bitmap" draw:fill-image-name="a2074" style:repeat="stretch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076">
      <style:text-properties fo:text-transform="uppercase" fo:color="#0b425e" style:text-line-through-type="none" style:text-line-through-style="none" style:text-line-through-width="auto" style:text-line-through-color="font-color" style:text-position="0% 100%" fo:font-family="Walbaum Display Light" fo:font-size="0.5in" style:font-size-asian="0.5in" style:font-size-complex="0.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7">
      <style:text-properties fo:text-transform="uppercase" fo:color="#0b425e" style:text-line-through-type="none" style:text-line-through-style="none" style:text-line-through-width="auto" style:text-line-through-color="font-color" style:text-position="0% 100%" fo:font-family="Walbaum Display Light" fo:font-size="0.5in" style:font-size-asian="0.5in" style:font-size-complex="0.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0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01">
      <style:graphic-properties draw:fill="none" draw:stroke="solid" svg:stroke-width="0.01389in" svg:stroke-color="#ba9ca0" svg:stroke-opacity="70%" draw:stroke-linejoin="miter" svg:stroke-linecap="butt" draw:decorative="true" style:protect="position size"/>
    </style:style>
    <style:style style:family="graphic" style:name="a2302">
      <style:graphic-properties draw:fill="none" draw:stroke="solid" svg:stroke-width="0.01389in" svg:stroke-color="#ba9ca0" svg:stroke-opacity="70%" draw:stroke-linejoin="miter" svg:stroke-linecap="butt" draw:decorative="true" style:protect="position size"/>
    </style:style>
    <style:style style:family="graphic" style:name="a2303">
      <style:graphic-properties draw:fill="none" draw:stroke="solid" svg:stroke-width="0.01389in" svg:stroke-color="#ba9ca0" svg:stroke-opacity="70%" draw:stroke-linejoin="miter" svg:stroke-linecap="butt" draw:decorative="true" style:protect="position size"/>
    </style:style>
    <style:style style:family="text" style:name="a2304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5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6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7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8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9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7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7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6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9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7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0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1.9375in"/>
      </text:list-level-style-number>
      <text:list-level-style-number text:level="6" style:num-format="" style:num-list-format-name="">
        <style:list-level-properties text:space-before="2.25in"/>
      </text:list-level-style-number>
      <text:list-level-style-number text:level="7" style:num-format="" style:num-list-format-name="">
        <style:list-level-properties text:space-before="2.75in"/>
      </text:list-level-style-number>
      <text:list-level-style-number text:level="8" style:num-format="" style:num-list-format-name="">
        <style:list-level-properties text:space-before="3.25in"/>
      </text:list-level-style-number>
      <text:list-level-style-number text:level="9" style:num-format="" style:num-list-format-name="">
        <style:list-level-properties text:space-before="3.75in"/>
      </text:list-level-style-number>
    </text:list-style>
    <text:list-style style:name="a19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7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7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9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20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1.9375in"/>
      </text:list-level-style-number>
      <text:list-level-style-number text:level="6" style:num-format="" style:num-list-format-name="">
        <style:list-level-properties text:space-before="2.25in"/>
      </text:list-level-style-number>
      <text:list-level-style-number text:level="7" style:num-format="" style:num-list-format-name="">
        <style:list-level-properties text:space-before="2.75in"/>
      </text:list-level-style-number>
      <text:list-level-style-number text:level="8" style:num-format="" style:num-list-format-name="">
        <style:list-level-properties text:space-before="3.25in"/>
      </text:list-level-style-number>
      <text:list-level-style-number text:level="9" style:num-format="" style:num-list-format-name="">
        <style:list-level-properties text:space-before="3.75in"/>
      </text:list-level-style-number>
    </text:list-style>
    <text:list-style style:name="a21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1.9375in"/>
      </text:list-level-style-number>
      <text:list-level-style-number text:level="6" style:num-format="" style:num-list-format-name="">
        <style:list-level-properties text:space-before="2.25in"/>
      </text:list-level-style-number>
      <text:list-level-style-number text:level="7" style:num-format="" style:num-list-format-name="">
        <style:list-level-properties text:space-before="2.75in"/>
      </text:list-level-style-number>
      <text:list-level-style-number text:level="8" style:num-format="" style:num-list-format-name="">
        <style:list-level-properties text:space-before="3.25in"/>
      </text:list-level-style-number>
      <text:list-level-style-number text:level="9" style:num-format="" style:num-list-format-name="">
        <style:list-level-properties text:space-before="3.75in"/>
      </text:list-level-style-number>
    </text:list-style>
    <text:list-style style:name="a20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1.9375in"/>
      </text:list-level-style-number>
      <text:list-level-style-number text:level="6" style:num-format="" style:num-list-format-name="">
        <style:list-level-properties text:space-before="2.25in"/>
      </text:list-level-style-number>
      <text:list-level-style-number text:level="7" style:num-format="" style:num-list-format-name="">
        <style:list-level-properties text:space-before="2.75in"/>
      </text:list-level-style-number>
      <text:list-level-style-number text:level="8" style:num-format="" style:num-list-format-name="">
        <style:list-level-properties text:space-before="3.25in"/>
      </text:list-level-style-number>
      <text:list-level-style-number text:level="9" style:num-format="" style:num-list-format-name="">
        <style:list-level-properties text:space-before="3.75in"/>
      </text:list-level-style-number>
    </text:list-style>
    <text:list-style style:name="a17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1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1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1.9375in"/>
      </text:list-level-style-number>
      <text:list-level-style-number text:level="6" style:num-format="" style:num-list-format-name="">
        <style:list-level-properties text:space-before="2.25in"/>
      </text:list-level-style-number>
      <text:list-level-style-number text:level="7" style:num-format="" style:num-list-format-name="">
        <style:list-level-properties text:space-before="2.75in"/>
      </text:list-level-style-number>
      <text:list-level-style-number text:level="8" style:num-format="" style:num-list-format-name="">
        <style:list-level-properties text:space-before="3.25in"/>
      </text:list-level-style-number>
      <text:list-level-style-number text:level="9" style:num-format="" style:num-list-format-name="">
        <style:list-level-properties text:space-before="3.75in"/>
      </text:list-level-style-number>
    </text:list-style>
    <text:list-style style:name="a19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21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1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1.9375in"/>
      </text:list-level-style-number>
      <text:list-level-style-number text:level="6" style:num-format="" style:num-list-format-name="">
        <style:list-level-properties text:space-before="2.25in"/>
      </text:list-level-style-number>
      <text:list-level-style-number text:level="7" style:num-format="" style:num-list-format-name="">
        <style:list-level-properties text:space-before="2.75in"/>
      </text:list-level-style-number>
      <text:list-level-style-number text:level="8" style:num-format="" style:num-list-format-name="">
        <style:list-level-properties text:space-before="3.25in"/>
      </text:list-level-style-number>
      <text:list-level-style-number text:level="9" style:num-format="" style:num-list-format-name="">
        <style:list-level-properties text:space-before="3.75in"/>
      </text:list-level-style-number>
    </text:list-style>
    <text:list-style style:name="a2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2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9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20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0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7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7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7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9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9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7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2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22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7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7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1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9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2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9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20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9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9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7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0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9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7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2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6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7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</office:automatic-styles>
  <office:body>
    <office:presentation>
      <draw:page draw:name="Slide34" draw:style-name="a1630" draw:master-page-name="Master1-Layout12-cust-1_Title-only" presentation:presentation-page-layout-name="Master1-PPL12" draw:id="Slide-289">
        <draw:connector draw:type="line" svg:x1="3.41177in" svg:y1="0in" svg:x2="0in" svg:y2="0.75in" draw:id="id200" draw:style-name="a1631" draw:name="Straight Connector 13">
          <svg:title/>
          <svg:desc/>
        </draw:connector>
        <draw:connector draw:type="line" svg:x1="0.98837in" svg:y1="0in" svg:x2="0in" svg:y2="7.15625in" draw:id="id201" draw:style-name="a1632" draw:name="Straight Connector 15">
          <svg:title/>
          <svg:desc/>
        </draw:connector>
        <draw:connector draw:type="line" svg:x1="6.82813in" svg:y1="7.5in" svg:x2="-0.04688in" svg:y2="6.33333in" draw:id="id202" draw:style-name="a1633" draw:name="Straight Connector 17">
          <svg:title/>
          <svg:desc/>
        </draw:connector>
        <draw:connector draw:type="line" svg:x1="13.33333in" svg:y1="6.39583in" svg:x2="9.25521in" svg:y2="7.5in" draw:id="id203" draw:style-name="a1634" draw:name="Straight Connector 19">
          <svg:title/>
          <svg:desc/>
        </draw:connector>
        <draw:connector draw:type="line" svg:x1="13.33333in" svg:y1="1.80208in" svg:x2="12.62375in" svg:y2="7.5in" draw:id="id204" draw:style-name="a1635" draw:name="Straight Connector 21">
          <svg:title/>
          <svg:desc/>
        </draw:connector>
        <draw:connector draw:type="line" svg:x1="13.33333in" svg:y1="4.65698in" svg:x2="11.79085in" svg:y2="0in" draw:id="id205" draw:style-name="a1636" draw:name="Straight Connector 23">
          <svg:title/>
          <svg:desc/>
        </draw:connector>
        <draw:connector draw:type="line" svg:x1="13.33333in" svg:y1="1.01401in" svg:x2="7.14063in" svg:y2="-0.00521in" draw:id="id206" draw:style-name="a1637" draw:name="Straight Connector 25">
          <svg:title/>
          <svg:desc/>
        </draw:connector>
        <draw:custom-shape svg:x="0in" svg:y="0in" svg:width="13.33333in" svg:height="7.5in" draw:id="id207" draw:style-name="a1640" draw:name="Rectangle 27">
          <svg:title/>
          <svg:desc/>
          <text:p text:style-name="a1639" text:class-names="" text:cond-style-name=""><text:span text:style-name="a163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.00071in" svg:width="13.33333in" svg:height="7.49929in" draw:id="id208" draw:style-name="a1643" draw:name="Rectangle 29">
          <svg:title/>
          <svg:desc/>
          <text:p text:style-name="a1642" text:class-names="" text:cond-style-name=""><text:span text:style-name="a164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09" presentation:style-name="a1654" draw:name="Title 8" svg:x="0.95349in" svg:y="0.81977in" svg:width="6.17442in" svg:height="4.26744in" presentation:class="title" presentation:placeholder="false">
          <draw:text-box>
            <text:p text:style-name="a1653" text:class-names="" text:cond-style-name=""><text:span text:style-name="a1644" text:class-names="">LA PUGLIA</text:span><text:span text:style-name="a1645" text:class-names=""><text:line-break/></text:span><text:span text:style-name="a1646" text:class-names=""><text:line-break/></text:span><text:span text:style-name="a1647" text:class-names=""><text:line-break/><text:line-break/><text:line-break/><text:line-break/></text:span><text:span text:style-name="a1648" text:class-names="">Buonanno<text:s text:c="1"/></text:span><text:span text:style-name="a1649" text:class-names="">asia</text:span><text:span text:style-name="a1650" text:class-names=""><text:line-break/></text:span><text:span text:style-name="a1651" text:class-names=""><text:line-break/><text:line-break/></text:span><text:span text:style-name="a1652" text:class-names=""/></text:p>
          </draw:text-box>
          <svg:title/>
          <svg:desc/>
        </draw:frame>
        <draw:frame draw:id="id210" presentation:style-name="a1655" draw:name="Picture Placeholder 6" svg:x="6.07146in" svg:y="-0.02844in" svg:width="6.9031in" svg:height="7.51786in" style:rel-width="scale" style:rel-height="scale" presentation:class="graphic" presentation:placeholder="false">
          <draw:image xlink:href="media/image1.jpeg" xlink:type="simple" xlink:show="embed" xlink:actuate="onLoad"/>
          <svg:title/>
          <svg:desc>Free Images : landscape, sea, coast, water, nature, rock, ocean ...</svg:desc>
        </draw:frame>
        <draw:connector draw:type="line" svg:x1="8.25581in" svg:y1="0in" svg:x2="7.25581in" svg:y2="7.49929in" draw:id="id211" draw:style-name="a1656" draw:name="Straight Connector 31">
          <svg:title/>
          <svg:desc/>
        </draw:connector>
        <presentation:notes draw:style-name="a1663">
          <draw:page-thumbnail draw:page-number="1" svg:x="0.75in" svg:y="1.25in" svg:width="6in" svg:height="3.375in" presentation:class="page" draw:id="id212" presentation:style-name="a1657" draw:name="Slide Image Placeholder 1">
            <svg:title/>
            <svg:desc/>
          </draw:page-thumbnail>
          <draw:frame draw:id="id213" presentation:style-name="a1658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214" presentation:style-name="a1662" draw:name="Slide Number Placeholder 3" svg:x="4.24826in" svg:y="9.49826in" svg:width="3.25in" svg:height="0.50174in" presentation:class="page-number" presentation:placeholder="false">
            <draw:text-box>
              <text:p text:style-name="a1661" text:class-names="" text:cond-style-name=""><text:span text:style-name="a1659" text:class-names=""><text:page-number style:num-format="1" text:fixed="false">1</text:page-number></text:span><text:span text:style-name="a1660" text:class-names=""/></text:p>
            </draw:text-box>
            <svg:title/>
            <svg:desc/>
          </draw:frame>
        </presentation:notes>
      </draw:page>
      <draw:page draw:name="Slide33" draw:style-name="a1664" draw:master-page-name="Master1-Layout13-cust-Content-2" presentation:presentation-page-layout-name="Master1-PPL13" draw:id="Slide-288">
        <draw:connector draw:type="line" svg:x1="3.41177in" svg:y1="0in" svg:x2="0in" svg:y2="0.75in" draw:id="id215" draw:style-name="a1665" draw:name="Straight Connector 29">
          <svg:title/>
          <svg:desc/>
        </draw:connector>
        <draw:connector draw:type="line" svg:x1="0.98837in" svg:y1="0in" svg:x2="0in" svg:y2="7.15625in" draw:id="id216" draw:style-name="a1666" draw:name="Straight Connector 31">
          <svg:title/>
          <svg:desc/>
        </draw:connector>
        <draw:connector draw:type="line" svg:x1="6.82813in" svg:y1="7.5in" svg:x2="-0.04688in" svg:y2="6.33333in" draw:id="id217" draw:style-name="a1667" draw:name="Straight Connector 33">
          <svg:title/>
          <svg:desc/>
        </draw:connector>
        <draw:connector draw:type="line" svg:x1="13.33333in" svg:y1="6.39583in" svg:x2="9.25521in" svg:y2="7.5in" draw:id="id218" draw:style-name="a1668" draw:name="Straight Connector 35">
          <svg:title/>
          <svg:desc/>
        </draw:connector>
        <draw:connector draw:type="line" svg:x1="13.33333in" svg:y1="1.80208in" svg:x2="12.62375in" svg:y2="7.5in" draw:id="id219" draw:style-name="a1669" draw:name="Straight Connector 37">
          <svg:title/>
          <svg:desc/>
        </draw:connector>
        <draw:connector draw:type="line" svg:x1="13.33333in" svg:y1="4.65698in" svg:x2="11.79085in" svg:y2="0in" draw:id="id220" draw:style-name="a1670" draw:name="Straight Connector 39">
          <svg:title/>
          <svg:desc/>
        </draw:connector>
        <draw:connector draw:type="line" svg:x1="13.33333in" svg:y1="1.01401in" svg:x2="7.14063in" svg:y2="-0.00521in" draw:id="id221" draw:style-name="a1671" draw:name="Straight Connector 41">
          <svg:title/>
          <svg:desc/>
        </draw:connector>
        <draw:custom-shape svg:x="0in" svg:y="0in" svg:width="13.33333in" svg:height="7.5in" draw:id="id222" draw:style-name="a1674" draw:name="Rectangle 43">
          <svg:title/>
          <svg:desc/>
          <text:p text:style-name="a1673" text:class-names="" text:cond-style-name=""><text:span text:style-name="a167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23" presentation:style-name="a1681" draw:name="Title 1" svg:x="1.25809in" svg:y="0.18689in" svg:width="6.57143in" svg:height="2.23752in" presentation:class="title" presentation:placeholder="false">
          <draw:text-box>
            <text:p text:style-name="a1680" text:class-names="" text:cond-style-name=""><text:span text:style-name="a1675" text:class-names="">Dove<text:s text:c="1"/></text:span><text:span text:style-name="a1676" text:class-names="">si</text:span><text:span text:style-name="a1677" text:class-names=""><text:s text:c="1"/>trova la<text:s text:c="1"/></text:span><text:span text:style-name="a1678" text:class-names="">puglia</text:span><text:span text:style-name="a1679" text:class-names=""/></text:p>
          </draw:text-box>
          <svg:title/>
          <svg:desc/>
        </draw:frame>
        <draw:frame draw:id="id224" presentation:style-name="a1755" draw:name="Content Placeholder 2" svg:x="0.65939in" svg:y="3.01503in" svg:width="7.38207in" svg:height="4.23106in" presentation:class="outline" presentation:placeholder="false">
          <draw:text-box>
            <text:list text:style-name="a1692">
              <text:list-item>
                <text:p text:style-name="a1691" text:class-names="" text:cond-style-name=""><text:span text:style-name="a1682" text:class-names="">La Puglia<text:s text:c="1"/></text:span><text:span text:style-name="a1683" text:class-names="">si</text:span><text:span text:style-name="a1684" text:class-names=""><text:s text:c="1"/>trova<text:s text:c="1"/></text:span><text:span text:style-name="a1685" text:class-names="">nel</text:span><text:span text:style-name="a1686" text:class-names=""><text:s text:c="1"/></text:span><text:span text:style-name="a1687" text:class-names="">sud</text:span><text:span text:style-name="a1688" text:class-names="">-est<text:s text:c="1"/></text:span><text:span text:style-name="a1689" text:class-names="">dell'Italia</text:span><text:span text:style-name="a1690" text:class-names="">.</text:span></text:p>
              </text:list-item>
            </text:list>
            <text:list text:style-name="a1697">
              <text:list-item>
                <text:p text:style-name="a1696" text:class-names="" text:cond-style-name=""><text:span text:style-name="a1693" text:class-names="">è </text:span><text:span text:style-name="a1694" text:class-names="">una<text:s text:c="1"/></text:span><text:span text:style-name="a1695" text:class-names="">regione che forma il tacco dello stivale italiano.</text:span></text:p>
              </text:list-item>
            </text:list>
            <text:list text:style-name="a1701">
              <text:list-item>
                <text:p text:style-name="a1700" text:class-names="" text:cond-style-name=""><text:span text:style-name="a1698" text:class-names="">Si affaccia sul Mar Adriatico a</text:span><text:span text:style-name="a1699" text:class-names=""><text:s text:c="1"/>est e sul Mar Ionio a sud.</text:span></text:p>
              </text:list-item>
            </text:list>
            <text:list text:style-name="a1708">
              <text:list-item>
                <text:p text:style-name="a1707" text:class-names="" text:cond-style-name=""><text:span text:style-name="a1702" text:class-names="">Confina con<text:s text:c="1"/></text:span><text:span text:style-name="a1703" text:class-names="">le regione</text:span><text:span text:style-name="a1704" text:class-names=""><text:s text:c="1"/></text:span><text:span text:style-name="a1705" text:class-names="">MOLISE,CAMPANIA</text:span><text:span text:style-name="a1706" text:class-names=""><text:s text:c="1"/>e BASILICATA.</text:span></text:p>
              </text:list-item>
            </text:list>
            <text:list text:style-name="a1714">
              <text:list-item>
                <text:p text:style-name="a1713" text:class-names="" text:cond-style-name=""><text:span text:style-name="a1709" text:class-names="">Il capoluogo della Puglia<text:s text:c="1"/></text:span><text:span text:style-name="a1710" text:class-names="">è </text:span><text:span text:style-name="a1711" text:class-names=""><text:s text:c="1"/>Bari</text:span><text:span text:style-name="a1712" text:class-names="">.</text:span></text:p>
              </text:list-item>
            </text:list>
            <text:list text:style-name="a1720">
              <text:list-item>
                <text:p text:style-name="a1719" text:class-names="" text:cond-style-name=""><text:span text:style-name="a1715" text:class-names="">è </text:span><text:span text:style-name="a1716" text:class-names=""><text:s text:c="1"/>una</text:span><text:span text:style-name="a1717" text:class-names=""><text:s text:c="1"/>regione famosa per le sue lunghe coste e belle spiagge.</text:span><text:span text:style-name="a1718" text:class-names=""/></text:p>
              </text:list-item>
            </text:list>
            <text:list text:style-name="a1725">
              <text:list-item>
                <text:p text:style-name="a1724" text:class-names="" text:cond-style-name=""><text:span text:style-name="a1721" text:class-names="">Il territorio<text:s text:c="1"/></text:span><text:span text:style-name="a1722" text:class-names="">è in gran parte pianeggiante.<text:s text:c="1"/></text:span><text:span text:style-name="a1723" text:class-names=""/></text:p>
              </text:list-item>
            </text:list>
            <text:list text:style-name="a1730">
              <text:list-item>
                <text:p text:style-name="a1729" text:class-names="" text:cond-style-name=""><text:span text:style-name="a1726" text:class-names="">è  conosciuta</text:span><text:span text:style-name="a1727" text:class-names=""><text:s text:c="1"/>anche per i TRULLI di Alberobello.</text:span><text:span text:style-name="a1728" text:class-names=""/></text:p>
              </text:list-item>
            </text:list>
            <text:list text:style-name="a1735">
              <text:list-item>
                <text:p text:style-name="a1734" text:class-names="" text:cond-style-name=""><text:span text:style-name="a1731" text:class-names="">La Puglia ha molte città<text:s text:c="1"/></text:span><text:span text:style-name="a1732" text:class-names="">storiche e tradizioni antiche.</text:span><text:span text:style-name="a1733" text:class-names=""/></text:p>
              </text:list-item>
            </text:list>
            <text:list text:style-name="a1739">
              <text:list-item>
                <text:p text:style-name="a1738" text:class-names="" text:cond-style-name=""><text:span text:style-name="a1736" text:class-names="">è una meta turistica molto visitata in Italia.</text:span><text:span text:style-name="a1737" text:class-names=""/></text:p>
              </text:list-item>
            </text:list>
            <text:list text:style-name="a1742">
              <text:list-item>
                <text:p text:style-name="a1741" text:class-names="" text:cond-style-name=""><text:span text:style-name="a1740" text:class-names=""/></text:p>
              </text:list-item>
            </text:list>
            <text:list text:style-name="a1745">
              <text:list-item>
                <text:p text:style-name="a1744" text:class-names="" text:cond-style-name=""><text:span text:style-name="a1743" text:class-names=""/></text:p>
              </text:list-item>
            </text:list>
            <text:list text:style-name="a1748">
              <text:list-item>
                <text:p text:style-name="a1747" text:class-names="" text:cond-style-name=""><text:span text:style-name="a1746" text:class-names=""/></text:p>
              </text:list-item>
            </text:list>
            <text:list text:style-name="a1751">
              <text:list-item>
                <text:p text:style-name="a1750" text:class-names="" text:cond-style-name=""><text:span text:style-name="a1749" text:class-names=""/></text:p>
              </text:list-item>
            </text:list>
            <text:list text:style-name="a1754">
              <text:list-item>
                <text:p text:style-name="a1753" text:class-names="" text:cond-style-name=""><text:span text:style-name="a1752" text:class-names=""/></text:p>
              </text:list-item>
            </text:list>
          </draw:text-box>
          <svg:title/>
          <svg:desc/>
        </draw:frame>
        <draw:connector draw:type="line" svg:x1="3.14436in" svg:y1="7.5in" svg:x2="0in" svg:y2="5.68452in" draw:id="id225" draw:style-name="a1756" draw:name="Straight Connector 45">
          <svg:title/>
          <svg:desc/>
        </draw:connector>
        <draw:connector draw:type="line" svg:x1="7.82143in" svg:y1="7.5in" svg:x2="0in" svg:y2="6.59884in" draw:id="id226" draw:style-name="a1757" draw:name="Straight Connector 47">
          <svg:title/>
          <svg:desc/>
        </draw:connector>
        <draw:frame draw:id="id227" presentation:style-name="a1758" draw:name="Picture Placeholder 6" svg:x="8.38999in" svg:y="-0.00778in" svg:width="4.94335in" svg:height="7.51556in" style:rel-width="scale" style:rel-height="scale" presentation:class="graphic" presentation:placeholder="false">
          <draw:image xlink:href="media/image2.png" xlink:type="simple" xlink:show="embed" xlink:actuate="onLoad"/>
          <svg:title/>
          <svg:desc>Immagine che contiene mappa, testo, atlante

Il contenuto generato dall&amp;#39;IA potrebbe non essere corretto.</svg:desc>
        </draw:frame>
        <draw:frame draw:id="id228" draw:style-name="a1761" draw:name="CasellaDiTesto 3" svg:x="10.44271in" svg:y="7.52431in" svg:width="2.89931in" svg:height="0.34722in">
          <draw:text-box>
            <text:p text:style-name="a1760" text:class-names="" text:cond-style-name=""><text:span text:style-name="a1759" text:class-names="">ThePhoto di PhotoAuthor è concessa in licenza secondo CCYYSA.</text:span></text:p>
          </draw:text-box>
          <svg:title/>
          <svg:desc/>
        </draw:frame>
        <presentation:notes draw:style-name="a1768">
          <draw:page-thumbnail draw:page-number="2" svg:x="0.75in" svg:y="1.25in" svg:width="6in" svg:height="3.375in" presentation:class="page" draw:id="id229" presentation:style-name="a1762" draw:name="Slide Image Placeholder 1">
            <svg:title/>
            <svg:desc/>
          </draw:page-thumbnail>
          <draw:frame draw:id="id230" presentation:style-name="a1763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231" presentation:style-name="a1767" draw:name="Slide Number Placeholder 3" svg:x="4.24826in" svg:y="9.49826in" svg:width="3.25in" svg:height="0.50174in" presentation:class="page-number" presentation:placeholder="false">
            <draw:text-box>
              <text:p text:style-name="a1766" text:class-names="" text:cond-style-name=""><text:span text:style-name="a1764" text:class-names=""><text:page-number style:num-format="1" text:fixed="false">2</text:page-number></text:span><text:span text:style-name="a1765" text:class-names=""/></text:p>
            </draw:text-box>
            <svg:title/>
            <svg:desc/>
          </draw:frame>
        </presentation:notes>
      </draw:page>
      <draw:page draw:name="Slide21" draw:style-name="a1769" draw:master-page-name="Master1-Layout9-picTx-Picture-with-Caption" presentation:presentation-page-layout-name="Master1-PPL9" draw:id="Slide-276">
        <draw:frame draw:id="id232" presentation:style-name="a1773" draw:name="Title 2" svg:x="0.9184in" svg:y="0.5in" svg:width="4.30035in" svg:height="1.75in" presentation:class="title" presentation:placeholder="false">
          <draw:text-box>
            <text:p text:style-name="a1772" text:class-names="" text:cond-style-name=""><text:span text:style-name="a1770" text:class-names=""><text:s text:c="5"/>SALENTO</text:span><text:span text:style-name="a1771" text:class-names=""><text:line-break/><text:line-break/></text:span></text:p>
          </draw:text-box>
          <svg:title/>
          <svg:desc/>
        </draw:frame>
        <draw:frame draw:id="id233" presentation:style-name="a1774" draw:name="Picture Placeholder 16" svg:x="5.6684in" svg:y="1.07986in" svg:width="6.75in" svg:height="5.32986in" style:rel-width="scale" style:rel-height="scale" presentation:class="graphic" presentation:placeholder="false">
          <draw:image xlink:href="media/image3.jpeg" xlink:type="simple" xlink:show="embed" xlink:actuate="onLoad"/>
          <svg:title/>
          <svg:desc>Free Images : beach, landscape, sea, coast, town, vacation, cliff, bay ...</svg:desc>
        </draw:frame>
        <draw:frame draw:id="id234" presentation:style-name="a1790" draw:name="Segnaposto testo 1" svg:x="0.9184in" svg:y="2.25in" svg:width="4.30035in" svg:height="4.33831in" presentation:class="outline" presentation:placeholder="false">
          <draw:text-box>
            <text:list text:style-name="a1781">
              <text:list-item>
                <text:p text:style-name="a1780" text:class-names="" text:cond-style-name=""><text:span text:style-name="a1775" text:class-names="">Il Salento è la parte<text:s text:c="1"/></text:span><text:span text:style-name="a1776" text:class-names="">piu'</text:span><text:span text:style-name="a1777" text:class-names=""><text:s text:c="1"/>meridionale della puglia.<text:s text:c="1"/></text:span><text:span text:style-name="a1778" text:class-names="">è  una</text:span><text:span text:style-name="a1779" text:class-names=""><text:s text:c="1"/>zona famosa per il mare trasparente e le spiagge sia sabbiose che rocciose.</text:span></text:p>
              </text:list-item>
            </text:list>
            <text:list text:style-name="a1786">
              <text:list-item>
                <text:p text:style-name="a1785" text:class-names="" text:cond-style-name=""><text:span text:style-name="a1782" text:class-names="">Il Salento è anche terra di tradizioni musicali come la<text:s text:c="1"/></text:span><text:span text:style-name="a1783" text:class-names="">pizzica</text:span><text:span text:style-name="a1784" text:class-names=""><text:s text:c="1"/>e feste popolari estive.</text:span></text:p>
              </text:list-item>
            </text:list>
            <text:list text:style-name="a1789">
              <text:list-item>
                <text:p text:style-name="a1788" text:class-names="" text:cond-style-name=""><text:span text:style-name="a1787" text:class-names=""/></text:p>
              </text:list-item>
            </text:list>
          </draw:text-box>
          <svg:title/>
          <svg:desc/>
        </draw:frame>
        <presentation:notes draw:style-name="a1797">
          <draw:page-thumbnail draw:page-number="3" svg:x="0.75in" svg:y="1.25in" svg:width="6in" svg:height="3.375in" presentation:class="page" draw:id="id235" presentation:style-name="a1791" draw:name="Slide Image Placeholder 1">
            <svg:title/>
            <svg:desc/>
          </draw:page-thumbnail>
          <draw:frame draw:id="id236" presentation:style-name="a1792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237" presentation:style-name="a1796" draw:name="Slide Number Placeholder 3" svg:x="4.24826in" svg:y="9.49826in" svg:width="3.25in" svg:height="0.50174in" presentation:class="page-number" presentation:placeholder="false">
            <draw:text-box>
              <text:p text:style-name="a1795" text:class-names="" text:cond-style-name=""><text:span text:style-name="a1793" text:class-names=""><text:page-number style:num-format="1" text:fixed="false">3</text:page-number></text:span><text:span text:style-name="a1794" text:class-names=""/></text:p>
            </draw:text-box>
            <svg:title/>
            <svg:desc/>
          </draw:frame>
        </presentation:notes>
      </draw:page>
      <draw:page draw:name="Slide28" draw:style-name="a1798" draw:master-page-name="Master1-Layout15-cust-Title-+-subtitle-+-picture" presentation:presentation-page-layout-name="Master1-PPL15" draw:id="Slide-283">
        <draw:frame draw:id="id238" presentation:style-name="a1802" draw:name="Title 1" svg:x="1.32882in" svg:y="0.57778in" svg:width="5.49931in" svg:height="3.66906in" presentation:class="title" presentation:placeholder="false">
          <draw:text-box>
            <text:p text:style-name="a1801" text:class-names="" text:cond-style-name=""><text:span text:style-name="a1799" text:class-names="">ALBEROBELLO</text:span><text:span text:style-name="a1800" text:class-names=""><text:line-break/><text:line-break/><text:line-break/><text:line-break/></text:span></text:p>
          </draw:text-box>
          <svg:title/>
          <svg:desc/>
        </draw:frame>
        <draw:frame draw:id="id239" presentation:style-name="a1869" draw:name="Subtitle 2" svg:x="1.32882in" svg:y="2.27723in" svg:width="5.49931in" svg:height="4.2002in" presentation:class="subtitle" presentation:placeholder="false">
          <draw:text-box>
            <text:p text:style-name="a1866" text:class-names="" text:cond-style-name=""><text:span text:style-name="a1803" text:class-names="">Alberobello</text:span><text:span text:style-name="a1804" text:class-names=""> </text:span><text:span text:style-name="a1805" text:class-names="">è<text:s text:c="1"/></text:span><text:span text:style-name="a1806" text:class-names="">famosa</text:span><text:span text:style-name="a1807" text:class-names=""><text:s text:c="1"/>in<text:s text:c="1"/></text:span><text:span text:style-name="a1808" text:class-names="">tutto</text:span><text:span text:style-name="a1809" text:class-names=""><text:s text:c="1"/>il mondo per<text:s text:c="1"/></text:span><text:span text:style-name="a1810" text:class-names="">i</text:span><text:span text:style-name="a1811" text:class-names=""><text:s text:c="1"/></text:span><text:span text:style-name="a1812" text:class-names="">TRULLI,case</text:span><text:span text:style-name="a1813" text:class-names=""><text:s text:c="1"/>di<text:s text:c="1"/></text:span><text:span text:style-name="a1814" text:class-names="">pietra</text:span><text:span text:style-name="a1815" text:class-names=""><text:s text:c="1"/>con<text:s text:c="1"/></text:span><text:span text:style-name="a1816" text:class-names="">ttti</text:span><text:span text:style-name="a1817" text:class-names=""><text:s text:c="1"/>a forma di<text:s text:c="1"/></text:span><text:span text:style-name="a1818" text:class-names="">cono</text:span><text:span text:style-name="a1819" text:class-names=""><text:s text:c="1"/></text:span><text:span text:style-name="a1820" text:class-names="">costruite</text:span><text:span text:style-name="a1821" text:class-names=""><text:s text:c="1"/>senza<text:s text:c="1"/></text:span><text:span text:style-name="a1822" text:class-names="">cemento</text:span><text:span text:style-name="a1823" text:class-names="">.<text:line-break/>I<text:s text:c="1"/></text:span><text:span text:style-name="a1824" text:class-names="">trulli</text:span><text:span text:style-name="a1825" text:class-names=""><text:s text:c="1"/></text:span><text:span text:style-name="a1826" text:class-names="">risalgono</text:span><text:span text:style-name="a1827" text:class-names=""><text:s text:c="1"/>al XVI<text:s text:c="1"/></text:span><text:span text:style-name="a1828" text:class-names="">secolo</text:span><text:span text:style-name="a1829" text:class-names=""><text:s text:c="1"/>e<text:s text:c="1"/></text:span><text:span text:style-name="a1830" text:class-names="">oggi</text:span><text:span text:style-name="a1831" text:class-names=""><text:s text:c="1"/>il<text:s text:c="1"/></text:span><text:span text:style-name="a1832" text:class-names="">paese</text:span><text:span text:style-name="a1833" text:class-names=""> è<text:s text:c="1"/></text:span><text:span text:style-name="a1834" text:class-names="">patrimonio</text:span><text:span text:style-name="a1835" text:class-names=""><text:s text:c="1"/></text:span><text:span text:style-name="a1836" text:class-names="">dell'Umanita</text:span><text:span text:style-name="a1837" text:class-names="">'<text:s text:c="1"/></text:span><text:span text:style-name="a1838" text:class-names="">Unesco</text:span><text:span text:style-name="a1839" text:class-names="">.<text:line-break/>Il<text:s text:c="1"/></text:span><text:span text:style-name="a1840" text:class-names="">quartire</text:span><text:span text:style-name="a1841" text:class-names=""><text:s text:c="1"/>piu'<text:s text:c="1"/></text:span><text:span text:style-name="a1842" text:class-names="">famoso</text:span><text:span text:style-name="a1843" text:class-names=""><text:s text:c="1"/>e' il<text:s text:c="1"/></text:span><text:span text:style-name="a1844" text:class-names="">Rione</text:span><text:span text:style-name="a1845" text:class-names=""><text:s text:c="1"/>Monti, con<text:s text:c="1"/></text:span><text:span text:style-name="a1846" text:class-names="">centinaia</text:span><text:span text:style-name="a1847" text:class-names=""><text:s text:c="1"/>di<text:s text:c="1"/></text:span><text:span text:style-name="a1848" text:class-names="">trulli</text:span><text:span text:style-name="a1849" text:class-names=""><text:s text:c="1"/>uno<text:s text:c="1"/></text:span><text:span text:style-name="a1850" text:class-names="">accanto</text:span><text:span text:style-name="a1851" text:class-names=""><text:s text:c="1"/></text:span><text:span text:style-name="a1852" text:class-names="">all'altro</text:span><text:span text:style-name="a1853" text:class-names="">.<text:s text:c="1"/></text:span><text:span text:style-name="a1854" text:class-names="">Alcuni</text:span><text:span text:style-name="a1855" text:class-names=""><text:s text:c="1"/></text:span><text:span text:style-name="a1856" text:class-names="">sono</text:span><text:span text:style-name="a1857" text:class-names=""><text:s text:c="1"/></text:span><text:span text:style-name="a1858" text:class-names="">abitazioni</text:span><text:span text:style-name="a1859" text:class-names=""><text:s text:c="1"/>private,<text:s text:c="1"/></text:span><text:span text:style-name="a1860" text:class-names="">altri</text:span><text:span text:style-name="a1861" text:class-names=""><text:s text:c="1"/></text:span><text:span text:style-name="a1862" text:class-names="">negozi</text:span><text:span text:style-name="a1863" text:class-names=""><text:s text:c="1"/>o<text:s text:c="1"/></text:span><text:span text:style-name="a1864" text:class-names="">musei</text:span><text:span text:style-name="a1865" text:class-names=""/></text:p>
            <text:p text:style-name="a1868" text:class-names="" text:cond-style-name=""><text:span text:style-name="a1867" text:class-names=""/></text:p>
          </draw:text-box>
          <svg:title/>
          <svg:desc/>
        </draw:frame>
        <draw:frame draw:id="id240" presentation:style-name="a1870" draw:name="Picture Placeholder 42" svg:x="7.93671in" svg:y="-0.01266in" svg:width="5.40928in" svg:height="7.55in" style:rel-width="scale" style:rel-height="scale" presentation:class="graphic" presentation:placeholder="false">
          <draw:image xlink:href="media/image4.jpeg" xlink:type="simple" xlink:show="embed" xlink:actuate="onLoad"/>
          <svg:title/>
          <svg:desc/>
        </draw:frame>
        <draw:frame draw:id="id241" draw:style-name="a1873" draw:name="CasellaDiTesto 3" svg:x="7.9375in" svg:y="7.53819in" svg:width="5.40799in" svg:height="0.34722in">
          <draw:text-box>
            <text:p text:style-name="a1872" text:class-names="" text:cond-style-name=""><text:span text:style-name="a1871" text:class-names="">ThePhoto di PhotoAuthor è concessa in licenza secondo CCYYSA.</text:span></text:p>
          </draw:text-box>
          <svg:title/>
          <svg:desc/>
        </draw:frame>
        <presentation:notes draw:style-name="a1880">
          <draw:page-thumbnail draw:page-number="4" svg:x="0.75in" svg:y="1.25in" svg:width="6in" svg:height="3.375in" presentation:class="page" draw:id="id242" presentation:style-name="a1874" draw:name="Slide Image Placeholder 1">
            <svg:title/>
            <svg:desc/>
          </draw:page-thumbnail>
          <draw:frame draw:id="id243" presentation:style-name="a1875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244" presentation:style-name="a1879" draw:name="Slide Number Placeholder 3" svg:x="4.24826in" svg:y="9.49826in" svg:width="3.25in" svg:height="0.50174in" presentation:class="page-number" presentation:placeholder="false">
            <draw:text-box>
              <text:p text:style-name="a1878" text:class-names="" text:cond-style-name=""><text:span text:style-name="a1876" text:class-names=""><text:page-number style:num-format="1" text:fixed="false">4</text:page-number></text:span><text:span text:style-name="a1877" text:class-names=""/></text:p>
            </draw:text-box>
            <svg:title/>
            <svg:desc/>
          </draw:frame>
        </presentation:notes>
      </draw:page>
      <draw:page draw:name="Slide6" draw:style-name="a1881" draw:master-page-name="Master1-Layout16-cust-Content-1" presentation:presentation-page-layout-name="Master1-PPL16" draw:id="Slide-261">
        <draw:frame draw:id="id245" presentation:style-name="a1886" draw:name="Title 1" svg:x="4.34177in" svg:y="0.20253in" svg:width="7.57966in" svg:height="1.64643in" presentation:class="title" presentation:placeholder="false">
          <draw:text-box>
            <text:p text:style-name="a1885" text:class-names="" text:cond-style-name=""><text:span text:style-name="a1882" text:class-names=""><text:line-break/><text:line-break/></text:span><text:span text:style-name="a1883" text:class-names=""><text:s text:c="20"/>Gargano</text:span><text:span text:style-name="a1884" text:class-names=""><text:line-break/></text:span></text:p>
          </draw:text-box>
          <svg:title/>
          <svg:desc/>
        </draw:frame>
        <draw:frame draw:id="id246" presentation:style-name="a1887" draw:name="Picture Placeholder 7" svg:x="-0.02055in" svg:y="-0.025in" svg:width="3.6in" svg:height="7.55in" style:rel-width="scale" style:rel-height="scale" presentation:class="graphic" presentation:placeholder="false">
          <draw:image xlink:href="media/image5.jpeg" xlink:type="simple" xlink:show="embed" xlink:actuate="onLoad"/>
          <svg:title/>
          <svg:desc>Kostenlose foto : Strand, Meer, Küste, Ozean, Ufer, Ferien, Cliff ...</svg:desc>
        </draw:frame>
        <draw:frame draw:id="id247" presentation:style-name="a1948" draw:name="Content Placeholder 2" svg:x="4.34177in" svg:y="2.21172in" svg:width="7.59154in" svg:height="4.7in" presentation:class="outline" presentation:placeholder="false">
          <draw:text-box>
            <text:list text:style-name="a1900">
              <text:list-item>
                <text:p text:style-name="a1899" text:class-names="" text:cond-style-name=""><text:span text:style-name="a1888" text:class-names="">Il Gargano<text:s text:c="1"/></text:span><text:span text:style-name="a1889" text:class-names="">si</text:span><text:span text:style-name="a1890" text:class-names=""><text:s text:c="1"/>trova<text:s text:c="1"/></text:span><text:span text:style-name="a1891" text:class-names="">nel</text:span><text:span text:style-name="a1892" text:class-names=""><text:s text:c="1"/></text:span><text:span text:style-name="a1893" text:class-names="">nord</text:span><text:span text:style-name="a1894" text:class-names=""><text:s text:c="1"/>della<text:s text:c="1"/></text:span><text:span text:style-name="a1895" text:class-names="">regione</text:span><text:span text:style-name="a1896" text:class-names=""><text:s text:c="1"/>ed e'<text:s text:c="1"/></text:span><text:span text:style-name="a1897" text:class-names="">chiamato</text:span><text:span text:style-name="a1898" text:class-names=""> "LO SPERONE D'ITALIA".</text:span></text:p>
              </text:list-item>
            </text:list>
            <text:list text:style-name="a1909">
              <text:list-item>
                <text:p text:style-name="a1908" text:class-names="" text:cond-style-name=""><text:span text:style-name="a1901" text:class-names="">E'<text:s text:c="1"/></text:span><text:span text:style-name="a1902" text:class-names="">una</text:span><text:span text:style-name="a1903" text:class-names=""><text:s text:c="1"/>zona molto<text:s text:c="1"/></text:span><text:span text:style-name="a1904" text:class-names="">diversa</text:span><text:span text:style-name="a1905" text:class-names=""><text:s text:c="1"/>dal resto della Puglia<text:s text:c="1"/></text:span><text:span text:style-name="a1906" text:class-names="">perche</text:span><text:span text:style-name="a1907" text:class-names="">' ha: </text:span></text:p>
              </text:list-item>
            </text:list>
            <text:list text:style-name="a1918">
              <text:list-item>
                <text:p text:style-name="a1917" text:class-names="" text:cond-style-name=""><text:span text:style-name="a1910" text:class-names="">Montagne e<text:s text:c="1"/></text:span><text:span text:style-name="a1911" text:class-names="">boschi</text:span><text:span text:style-name="a1912" text:class-names=""><text:s text:c="1"/>come la FORESTA<text:s text:c="1"/></text:span><text:span text:style-name="a1913" text:class-names="">UMBRA,ricca</text:span><text:span text:style-name="a1914" text:class-names=""><text:s text:c="1"/>di fauna e<text:s text:c="1"/></text:span><text:span text:style-name="a1915" text:class-names="">piante</text:span><text:span text:style-name="a1916" text:class-names=""> rare</text:span></text:p>
              </text:list-item>
            </text:list>
            <text:list text:style-name="a1927">
              <text:list-item>
                <text:p text:style-name="a1926" text:class-names="" text:cond-style-name=""><text:span text:style-name="a1919" text:class-names="">Alte<text:s text:c="1"/></text:span><text:span text:style-name="a1920" text:class-names="">scogliere</text:span><text:span text:style-name="a1921" text:class-names=""><text:s text:c="1"/></text:span><text:span text:style-name="a1922" text:class-names="">bianche</text:span><text:span text:style-name="a1923" text:class-names=""><text:s text:c="1"/></text:span><text:span text:style-name="a1924" text:class-names="">sul</text:span><text:span text:style-name="a1925" text:class-names=""><text:s text:c="1"/>mare</text:span></text:p>
              </text:list-item>
            </text:list>
            <text:list text:style-name="a1936">
              <text:list-item>
                <text:p text:style-name="a1935" text:class-names="" text:cond-style-name=""><text:span text:style-name="a1928" text:class-names="">Borghi<text:s text:c="1"/></text:span><text:span text:style-name="a1929" text:class-names="">pittoreschi</text:span><text:span text:style-name="a1930" text:class-names=""><text:s text:c="1"/>come<text:s text:c="1"/></text:span><text:span text:style-name="a1931" text:class-names="">Vieste</text:span><text:span text:style-name="a1932" text:class-names=""><text:s text:c="1"/>e<text:s text:c="1"/></text:span><text:span text:style-name="a1933" text:class-names="">Peschici</text:span><text:span text:style-name="a1934" text:class-names=""/></text:p>
              </text:list-item>
            </text:list>
            <text:list text:style-name="a1947">
              <text:list-item>
                <text:p text:style-name="a1946" text:class-names="" text:cond-style-name=""><text:span text:style-name="a1937" text:class-names="">Il Gargano e'<text:s text:c="1"/></text:span><text:span text:style-name="a1938" text:class-names="">ideale</text:span><text:span text:style-name="a1939" text:class-names=""> per chi ama la natura,<text:s text:c="1"/></text:span><text:span text:style-name="a1940" text:class-names="">escursioni</text:span><text:span text:style-name="a1941" text:class-names=""><text:s text:c="1"/>e<text:s text:c="1"/></text:span><text:span text:style-name="a1942" text:class-names="">panorami</text:span><text:span text:style-name="a1943" text:class-names=""><text:s text:c="1"/></text:span><text:span text:style-name="a1944" text:class-names="">mozzafiato</text:span><text:span text:style-name="a1945" text:class-names="">.</text:span></text:p>
              </text:list-item>
            </text:list>
          </draw:text-box>
          <svg:title/>
          <svg:desc/>
        </draw:frame>
        <presentation:notes draw:style-name="a1955">
          <draw:page-thumbnail draw:page-number="5" svg:x="0.75in" svg:y="1.25in" svg:width="6in" svg:height="3.375in" presentation:class="page" draw:id="id248" presentation:style-name="a1949" draw:name="Slide Image Placeholder 1">
            <svg:title/>
            <svg:desc/>
          </draw:page-thumbnail>
          <draw:frame draw:id="id249" presentation:style-name="a1950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250" presentation:style-name="a1954" draw:name="Slide Number Placeholder 3" svg:x="4.24826in" svg:y="9.49826in" svg:width="3.25in" svg:height="0.50174in" presentation:class="page-number" presentation:placeholder="false">
            <draw:text-box>
              <text:p text:style-name="a1953" text:class-names="" text:cond-style-name=""><text:span text:style-name="a1951" text:class-names=""><text:page-number style:num-format="1" text:fixed="false">5</text:page-number></text:span><text:span text:style-name="a1952" text:class-names=""/></text:p>
            </draw:text-box>
            <svg:title/>
            <svg:desc/>
          </draw:frame>
        </presentation:notes>
      </draw:page>
      <draw:page draw:name="Slide2" draw:style-name="a1956" draw:master-page-name="Master1-Layout2-obj-Title-and-Content" presentation:presentation-page-layout-name="Master1-PPL2" draw:id="Slide-257">
        <draw:frame draw:id="id251" presentation:style-name="a1963" draw:name="Title 1" svg:x="1.25in" svg:y="0.58333in" svg:width="10.83333in" svg:height="1.51154in" presentation:class="title" presentation:placeholder="false">
          <draw:text-box>
            <text:p text:style-name="a1962" text:class-names="" text:cond-style-name=""><text:span text:style-name="a1957" text:class-names="">                 </text:span><text:span text:style-name="a1958" text:class-names="">Isole</text:span><text:span text:style-name="a1959" text:class-names="">           <text:s text:c="1"/></text:span><text:span text:style-name="a1960" text:class-names="">tremiti</text:span><text:span text:style-name="a1961" text:class-names=""/></text:p>
          </draw:text-box>
          <svg:title/>
          <svg:desc/>
        </draw:frame>
        <draw:frame draw:id="id252" presentation:style-name="a1985" draw:name="Segnaposto contenuto 26" svg:x="1.25in" svg:y="2.19767in" svg:width="10.83333in" svg:height="4.40116in" presentation:class="outline" presentation:placeholder="false">
          <draw:text-box>
            <text:list text:style-name="a1968">
              <text:list-item>
                <text:p text:style-name="a1967" text:class-names="" text:cond-style-name=""><text:span text:style-name="a1964" text:class-names="">Le isole Tremiti sono un piccolo<text:s text:c="1"/></text:span><text:span text:style-name="a1965" text:class-names="">arcipelagonel</text:span><text:span text:style-name="a1966" text:class-names=""><text:s text:c="1"/>Mar Adriatico.</text:span></text:p>
              </text:list-item>
            </text:list>
            <text:list text:style-name="a1971">
              <text:list-item>
                <text:p text:style-name="a1970" text:class-names="" text:cond-style-name=""><text:span text:style-name="a1969" text:class-names="">Sono famose per:</text:span></text:p>
              </text:list-item>
            </text:list>
            <text:list text:style-name="a1974">
              <text:list-item>
                <text:p text:style-name="a1973" text:class-names="" text:cond-style-name=""><text:span text:style-name="a1972" text:class-names="">Acque trasparenti e fondali ideali per immersioni</text:span></text:p>
              </text:list-item>
            </text:list>
            <text:list text:style-name="a1977">
              <text:list-item>
                <text:p text:style-name="a1976" text:class-names="" text:cond-style-name=""><text:span text:style-name="a1975" text:class-names="">Grotte marine</text:span></text:p>
              </text:list-item>
            </text:list>
            <text:list text:style-name="a1981">
              <text:list-item>
                <text:p text:style-name="a1980" text:class-names="" text:cond-style-name=""><text:span text:style-name="a1978" text:class-names="">L'abazia sull</text:span><text:span text:style-name="a1979" text:class-names="">'isola di San Nicola</text:span></text:p>
              </text:list-item>
            </text:list>
            <text:list text:style-name="a1984">
              <text:list-item>
                <text:p text:style-name="a1983" text:class-names="" text:cond-style-name=""><text:span text:style-name="a1982" text:class-names="">Sono una meta turistica molto amata in estate.</text:span></text:p>
              </text:list-item>
            </text:list>
          </draw:text-box>
          <svg:title/>
          <svg:desc/>
        </draw:frame>
        <presentation:notes draw:style-name="a1992">
          <draw:page-thumbnail draw:page-number="6" svg:x="0.75in" svg:y="1.25in" svg:width="6in" svg:height="3.375in" presentation:class="page" draw:id="id253" presentation:style-name="a1986" draw:name="Slide Image Placeholder 1">
            <svg:title/>
            <svg:desc/>
          </draw:page-thumbnail>
          <draw:frame draw:id="id254" presentation:style-name="a1987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255" presentation:style-name="a1991" draw:name="Slide Number Placeholder 3" svg:x="4.24826in" svg:y="9.49826in" svg:width="3.25in" svg:height="0.50174in" presentation:class="page-number" presentation:placeholder="false">
            <draw:text-box>
              <text:p text:style-name="a1990" text:class-names="" text:cond-style-name=""><text:span text:style-name="a1988" text:class-names=""><text:page-number style:num-format="1" text:fixed="false">6</text:page-number></text:span><text:span text:style-name="a1989" text:class-names=""/></text:p>
            </draw:text-box>
            <svg:title/>
            <svg:desc/>
          </draw:frame>
        </presentation:notes>
      </draw:page>
      <draw:page draw:name="Slide9" draw:style-name="a1993" draw:master-page-name="Master1-Layout18-cust-Two-Content-1" presentation:presentation-page-layout-name="Master1-PPL18" draw:id="Slide-264">
        <draw:frame draw:id="id256" presentation:style-name="a1997" draw:name="Title 1" svg:x="1.25in" svg:y="0.58333in" svg:width="10.83333in" svg:height="1.51154in" presentation:class="title" presentation:placeholder="false">
          <draw:text-box>
            <text:p text:style-name="a1996" text:class-names="" text:cond-style-name=""><text:span text:style-name="a1994" text:class-names="">                               <text:s text:c="1"/></text:span><text:span text:style-name="a1995" text:class-names="">bari</text:span></text:p>
          </draw:text-box>
          <svg:title/>
          <svg:desc/>
        </draw:frame>
        <draw:frame draw:id="id257" presentation:style-name="a2065" draw:name="Content Placeholder 3" svg:x="0.91312in" svg:y="2.22295in" svg:width="4.8808in" svg:height="4.44826in" presentation:class="outline" presentation:placeholder="false">
          <draw:text-box>
            <text:list text:style-name="a2010">
              <text:list-item>
                <text:p text:style-name="a2009" text:class-names="" text:cond-style-name=""><text:span text:style-name="a1998" text:class-names="">Bari e' il<text:s text:c="1"/></text:span><text:span text:style-name="a1999" text:class-names="">capoluogo</text:span><text:span text:style-name="a2000" text:class-names=""><text:s text:c="1"/>della<text:s text:c="1"/></text:span><text:span text:style-name="a2001" text:class-names="">puglia</text:span><text:span text:style-name="a2002" text:class-names=""><text:s text:c="1"/>ed e' un<text:s text:c="1"/></text:span><text:span text:style-name="a2003" text:class-names="">importante</text:span><text:span text:style-name="a2004" text:class-names=""><text:s text:c="1"/></text:span><text:span text:style-name="a2005" text:class-names="">porto</text:span><text:span text:style-name="a2006" text:class-names=""><text:s text:c="1"/></text:span><text:span text:style-name="a2007" text:class-names="">sul</text:span><text:span text:style-name="a2008" text:class-names=""><text:s text:c="1"/>Mar Adriatico.</text:span></text:p>
              </text:list-item>
            </text:list>
            <text:list text:style-name="a2025">
              <text:list-item>
                <text:p text:style-name="a2024" text:class-names="" text:cond-style-name=""><text:span text:style-name="a2011" text:class-names="">Nel<text:s text:c="1"/></text:span><text:span text:style-name="a2012" text:class-names="">centro</text:span><text:span text:style-name="a2013" text:class-names=""><text:s text:c="1"/></text:span><text:span text:style-name="a2014" text:class-names="">storico,chiamato</text:span><text:span text:style-name="a2015" text:class-names=""><text:s text:c="1"/>Bari<text:s text:c="1"/></text:span><text:span text:style-name="a2016" text:class-names="">Vecchia,le</text:span><text:span text:style-name="a2017" text:class-names=""><text:s text:c="1"/></text:span><text:span text:style-name="a2018" text:class-names="">strade</text:span><text:span text:style-name="a2019" text:class-names=""><text:s text:c="1"/></text:span><text:span text:style-name="a2020" text:class-names="">sono</text:span><text:span text:style-name="a2021" text:class-names=""><text:s text:c="1"/>strette e<text:s text:c="1"/></text:span><text:span text:style-name="a2022" text:class-names="">caratteristiche</text:span><text:span text:style-name="a2023" text:class-names="">.</text:span></text:p>
              </text:list-item>
            </text:list>
            <text:list text:style-name="a2036">
              <text:list-item>
                <text:p text:style-name="a2035" text:class-names="" text:cond-style-name=""><text:span text:style-name="a2026" text:class-names="">Qui<text:s text:c="1"/></text:span><text:span text:style-name="a2027" text:class-names="">si</text:span><text:span text:style-name="a2028" text:class-names=""><text:s text:c="1"/>trova la Basilica di San Nicola,<text:s text:c="1"/></text:span><text:span text:style-name="a2029" text:class-names="">importante</text:span><text:span text:style-name="a2030" text:class-names=""> </text:span><text:span text:style-name="a2031" text:class-names="">luogo</text:span><text:span text:style-name="a2032" text:class-names=""><text:s text:c="1"/>di<text:s text:c="1"/></text:span><text:span text:style-name="a2033" text:class-names="">pellegrinaggio</text:span><text:span text:style-name="a2034" text:class-names="">.</text:span></text:p>
              </text:list-item>
            </text:list>
            <text:list text:style-name="a2049">
              <text:list-item>
                <text:p text:style-name="a2048" text:class-names="" text:cond-style-name=""><text:span text:style-name="a2037" text:class-names="">Sul<text:s text:c="1"/></text:span><text:span text:style-name="a2038" text:class-names="">lungomare</text:span><text:span text:style-name="a2039" text:class-names=""><text:s text:c="1"/></text:span><text:span text:style-name="a2040" text:class-names="">si</text:span><text:span text:style-name="a2041" text:class-names=""><text:s text:c="1"/></text:span><text:span text:style-name="a2042" text:class-names="">possono</text:span><text:span text:style-name="a2043" text:class-names=""><text:s text:c="1"/></text:span><text:span text:style-name="a2044" text:class-names="">ammirare</text:span><text:span text:style-name="a2045" text:class-names=""> palazzi<text:s text:c="1"/></text:span><text:span text:style-name="a2046" text:class-names="">eleganti</text:span><text:span text:style-name="a2047" text:class-names=""> e il mare.</text:span></text:p>
              </text:list-item>
            </text:list>
            <text:list text:style-name="a2064">
              <text:list-item>
                <text:p text:style-name="a2063" text:class-names="" text:cond-style-name=""><text:span text:style-name="a2050" text:class-names="">Bari e'<text:s text:c="1"/></text:span><text:span text:style-name="a2051" text:class-names="">famosa</text:span><text:span text:style-name="a2052" text:class-names=""> </text:span><text:span text:style-name="a2053" text:class-names="">anche</text:span><text:span text:style-name="a2054" text:class-names=""><text:s text:c="1"/>per le signore<text:s text:c="1"/></text:span><text:span text:style-name="a2055" text:class-names="">che</text:span><text:span text:style-name="a2056" text:class-names=""> </text:span><text:span text:style-name="a2057" text:class-names="">preparano</text:span><text:span text:style-name="a2058" text:class-names=""><text:s text:c="1"/>le orecchiette<text:s text:c="1"/></text:span><text:span text:style-name="a2059" text:class-names="">fatte</text:span><text:span text:style-name="a2060" text:class-names=""><text:s text:c="1"/>a mano<text:s text:c="1"/></text:span><text:span text:style-name="a2061" text:class-names="">davanti</text:span><text:span text:style-name="a2062" text:class-names=""><text:s text:c="1"/>alle case.</text:span></text:p>
              </text:list-item>
            </text:list>
          </draw:text-box>
          <svg:title/>
          <svg:desc/>
        </draw:frame>
        <draw:frame draw:id="id258" presentation:style-name="a2066" draw:name="Segnaposto contenuto 4" svg:x="6.67568in" svg:y="2.54754in" svg:width="5.74098in" svg:height="3.68295in" style:rel-width="scale" style:rel-height="scale" presentation:class="graphic" presentation:placeholder="false">
          <draw:image xlink:href="media/image6.jpeg" xlink:type="simple" xlink:show="embed" xlink:actuate="onLoad"/>
          <svg:title/>
          <svg:desc>Immagine che contiene aria aperta, cielo, acqua, tramonto

Il contenuto generato dall&amp;#39;IA potrebbe non essere corretto.</svg:desc>
        </draw:frame>
        <presentation:notes draw:style-name="a2073">
          <draw:page-thumbnail draw:page-number="7" svg:x="0.75in" svg:y="1.25in" svg:width="6in" svg:height="3.375in" presentation:class="page" draw:id="id259" presentation:style-name="a2067" draw:name="Slide Image Placeholder 1">
            <svg:title/>
            <svg:desc/>
          </draw:page-thumbnail>
          <draw:frame draw:id="id260" presentation:style-name="a2068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261" presentation:style-name="a2072" draw:name="Slide Number Placeholder 3" svg:x="4.24826in" svg:y="9.49826in" svg:width="3.25in" svg:height="0.50174in" presentation:class="page-number" presentation:placeholder="false">
            <draw:text-box>
              <text:p text:style-name="a2071" text:class-names="" text:cond-style-name=""><text:span text:style-name="a2069" text:class-names=""><text:page-number style:num-format="1" text:fixed="false">7</text:page-number></text:span><text:span text:style-name="a2070" text:class-names=""/></text:p>
            </draw:text-box>
            <svg:title/>
            <svg:desc/>
          </draw:frame>
        </presentation:notes>
      </draw:page>
      <draw:page draw:name="Slide10" draw:style-name="a2075" draw:master-page-name="Master1-Layout19-cust-Two-Content-2" presentation:presentation-page-layout-name="Master1-PPL19" draw:id="Slide-265">
        <draw:frame draw:id="id262" presentation:style-name="a2079" draw:name="Title 1" svg:x="1.25in" svg:y="0.58333in" svg:width="10.83333in" svg:height="1.51154in" presentation:class="title" presentation:placeholder="false">
          <draw:text-box>
            <text:p text:style-name="a2078" text:class-names="" text:cond-style-name=""><text:span text:style-name="a2076" text:class-names=""><text:s text:c="28"/>Lecce</text:span><text:span text:style-name="a2077" text:class-names=""><text:line-break/></text:span></text:p>
          </draw:text-box>
          <svg:title/>
          <svg:desc/>
        </draw:frame>
        <draw:frame draw:id="id263" presentation:style-name="a2122" draw:name="Content Placeholder 3" svg:x="0.13188in" svg:y="1.33507in" svg:width="10.10838in" svg:height="6.24438in" presentation:class="outline" presentation:placeholder="false">
          <draw:text-box>
            <text:list text:style-name="a2090">
              <text:list-item>
                <text:p text:style-name="a2089" text:class-names="" text:cond-style-name=""><text:span text:style-name="a2080" text:class-names="">Lecce e'<text:s text:c="1"/></text:span><text:span text:style-name="a2081" text:class-names="">chiamata</text:span><text:span text:style-name="a2082" text:class-names=""> "la Firenze del<text:s text:c="1"/></text:span><text:span text:style-name="a2083" text:class-names="">sud</text:span><text:span text:style-name="a2084" text:class-names="">" per il<text:s text:c="1"/></text:span><text:span text:style-name="a2085" text:class-names="">suo</text:span><text:span text:style-name="a2086" text:class-names=""><text:s text:c="1"/>stile<text:s text:c="1"/></text:span><text:span text:style-name="a2087" text:class-names="">barocco</text:span><text:span text:style-name="a2088" text:class-names="">.</text:span></text:p>
              </text:list-item>
            </text:list>
            <text:list text:style-name="a2095">
              <text:list-item>
                <text:p text:style-name="a2094" text:class-names="" text:cond-style-name=""><text:span text:style-name="a2091" text:class-names="">E'<text:s text:c="1"/></text:span><text:span text:style-name="a2092" text:class-names="">famosa</text:span><text:span text:style-name="a2093" text:class-names=""><text:s text:c="1"/>per:</text:span></text:p>
              </text:list-item>
            </text:list>
            <text:list text:style-name="a2098">
              <text:list-item>
                <text:p text:style-name="a2097" text:class-names="" text:cond-style-name=""><text:span text:style-name="a2096" text:class-names="">LA BASILICA DI SANTA CROCE,RICCA DI DECORAZIONI</text:span></text:p>
              </text:list-item>
            </text:list>
            <text:list text:style-name="a2101">
              <text:list-item>
                <text:p text:style-name="a2100" text:class-names="" text:cond-style-name=""><text:span text:style-name="a2099" text:class-names="">PIAZZA DEL DUOMO</text:span></text:p>
              </text:list-item>
            </text:list>
            <text:list text:style-name="a2104">
              <text:list-item>
                <text:p text:style-name="a2103" text:class-names="" text:cond-style-name=""><text:span text:style-name="a2102" text:class-names="">L'ANFITEATRO ROMANO</text:span></text:p>
              </text:list-item>
            </text:list>
            <text:list text:style-name="a2121">
              <text:list-item>
                <text:p text:style-name="a2120" text:class-names="" text:cond-style-name=""><text:span text:style-name="a2105" text:class-names="">La<text:s text:c="1"/></text:span><text:span text:style-name="a2106" text:class-names="">pietra</text:span><text:span text:style-name="a2107" text:class-names=""><text:s text:c="1"/></text:span><text:span text:style-name="a2108" text:class-names="">leccese,di</text:span><text:span text:style-name="a2109" text:class-names=""><text:s text:c="1"/></text:span><text:span text:style-name="a2110" text:class-names="">colore</text:span><text:span text:style-name="a2111" text:class-names=""><text:s text:c="1"/></text:span><text:span text:style-name="a2112" text:class-names="">chiaro,rende</text:span><text:span text:style-name="a2113" text:class-names=""><text:s text:c="1"/>la<text:s text:c="1"/></text:span><text:span text:style-name="a2114" text:class-names="">citta</text:span><text:span text:style-name="a2115" text:class-names="">'<text:s text:c="1"/></text:span><text:span text:style-name="a2116" text:class-names="">luminosa</text:span><text:span text:style-name="a2117" text:class-names=""><text:s text:c="1"/>e<text:s text:c="1"/></text:span><text:span text:style-name="a2118" text:class-names="">affascinante</text:span><text:span text:style-name="a2119" text:class-names="">.</text:span></text:p>
              </text:list-item>
            </text:list>
          </draw:text-box>
          <svg:title/>
          <svg:desc/>
        </draw:frame>
        <draw:frame draw:id="id264" presentation:style-name="a2129" draw:name="Content Placeholder 2" svg:x="5.43038in" svg:y="2.28272in" svg:width="6.56962in" svg:height="4.44826in" presentation:class="outline" presentation:placeholder="false">
          <draw:text-box>
            <text:list text:style-name="a2125">
              <text:list-item>
                <text:p text:style-name="a2124" text:class-names="" text:cond-style-name=""><text:span text:style-name="a2123" text:class-names=""/></text:p>
              </text:list-item>
            </text:list>
            <text:list text:style-name="a2128">
              <text:list-item>
                <text:p text:style-name="a2127" text:class-names="" text:cond-style-name=""><text:span text:style-name="a2126" text:class-names=""/></text:p>
              </text:list-item>
            </text:list>
          </draw:text-box>
          <svg:title/>
          <svg:desc/>
        </draw:frame>
        <presentation:notes draw:style-name="a2136">
          <draw:page-thumbnail draw:page-number="8" svg:x="0.75in" svg:y="1.25in" svg:width="6in" svg:height="3.375in" presentation:class="page" draw:id="id265" presentation:style-name="a2130" draw:name="Slide Image Placeholder 1">
            <svg:title/>
            <svg:desc/>
          </draw:page-thumbnail>
          <draw:frame draw:id="id266" presentation:style-name="a2131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267" presentation:style-name="a2135" draw:name="Slide Number Placeholder 3" svg:x="4.24826in" svg:y="9.49826in" svg:width="3.25in" svg:height="0.50174in" presentation:class="page-number" presentation:placeholder="false">
            <draw:text-box>
              <text:p text:style-name="a2134" text:class-names="" text:cond-style-name=""><text:span text:style-name="a2132" text:class-names=""><text:page-number style:num-format="1" text:fixed="false">8</text:page-number></text:span><text:span text:style-name="a2133" text:class-names=""/></text:p>
            </draw:text-box>
            <svg:title/>
            <svg:desc/>
          </draw:frame>
        </presentation:notes>
      </draw:page>
      <draw:page draw:name="Slide8" draw:style-name="a2137" draw:master-page-name="Master1-Layout2-obj-Title-and-Content" presentation:presentation-page-layout-name="Master1-PPL2" draw:id="Slide-263">
        <draw:custom-shape svg:x="0in" svg:y="0in" svg:width="13.33333in" svg:height="7.5in" draw:id="id268" draw:style-name="a2140" draw:name="Rectangle 13">
          <svg:title/>
          <svg:desc/>
          <text:p text:style-name="a2139" text:class-names="" text:cond-style-name=""><text:span text:style-name="a213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69" draw:style-name="a2141" draw:name="Immagine 8" svg:x="7.58823in" svg:y="0.00001in" svg:width="5.7451in" svg:height="7.49999in" style:rel-width="scale" style:rel-height="scale">
          <draw:image xlink:href="media/image7.jpeg" xlink:type="simple" xlink:show="embed" xlink:actuate="onLoad"/>
          <svg:title/>
          <svg:desc>La Puglia sotto i conti Orsini Del Balzo - pugliain.net</svg:desc>
        </draw:frame>
        <draw:frame draw:id="id270" presentation:style-name="a2146" draw:name="Title 1" svg:x="1.20833in" svg:y="0.51163in" svg:width="6.7067in" svg:height="1.90116in" presentation:class="title" presentation:placeholder="false">
          <draw:text-box>
            <text:p text:style-name="a2145" text:class-names="" text:cond-style-name=""><text:span text:style-name="a2142" text:class-names="">Maria<text:s text:c="1"/></text:span><text:span text:style-name="a2143" text:class-names="">d'enghien</text:span><text:span text:style-name="a2144" text:class-names=""><text:s text:c="1"/>(1367-1446)</text:span></text:p>
          </draw:text-box>
          <svg:title/>
          <svg:desc/>
        </draw:frame>
        <draw:connector draw:type="line" svg:x1="13.33333in" svg:y1="1.08497in" svg:x2="6.04575in" svg:y2="0in" draw:id="id271" draw:style-name="a2147" draw:name="Straight Connector 15">
          <svg:title/>
          <svg:desc/>
        </draw:connector>
        <draw:frame draw:id="id272" presentation:style-name="a2157" draw:name="Content Placeholder 2" svg:x="1.20834in" svg:y="2.41279in" svg:width="6.00082in" svg:height="4.50388in" presentation:class="outline" presentation:placeholder="false">
          <draw:text-box>
            <text:list text:style-name="a2156">
              <text:list-item>
                <text:p text:style-name="a2155" text:class-names="" text:cond-style-name=""><text:span text:style-name="a2148" text:class-names="">Maria d'</text:span><text:span text:style-name="a2149" text:class-names="">Enghien</text:span><text:span text:style-name="a2150" text:class-names=""><text:s text:c="1"/>nacque a Lecce nel 1967. Fu contessa di Lecce e<text:s text:c="1"/></text:span><text:span text:style-name="a2151" text:class-names="">succesivamente</text:span><text:span text:style-name="a2152" text:class-names=""><text:s text:c="1"/>Regina di Napoli dopo il matrimonio con Ladislao di Durazzo. Governò direttamente i suoi territori con grande abilità politica in un'epoca in cui era raro che una donna avesse il potere. Rafforzò Lecce dal punto di vista politico e culturale.<text:s text:c="1"/></text:span><text:span text:style-name="a2153" text:class-names="">E'</text:span><text:span text:style-name="a2154" text:class-names=""><text:s text:c="1"/>una delle figure femminili più importanti del Medioevo pugliese.</text:span></text:p>
              </text:list-item>
            </text:list>
          </draw:text-box>
          <svg:title/>
          <svg:desc/>
        </draw:frame>
        <presentation:notes draw:style-name="a2164">
          <draw:page-thumbnail draw:page-number="9" svg:x="0.75in" svg:y="1.25in" svg:width="6in" svg:height="3.375in" presentation:class="page" draw:id="id273" presentation:style-name="a2158" draw:name="Slide Image Placeholder 1">
            <svg:title/>
            <svg:desc/>
          </draw:page-thumbnail>
          <draw:frame draw:id="id274" presentation:style-name="a2159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275" presentation:style-name="a2163" draw:name="Slide Number Placeholder 3" svg:x="4.24826in" svg:y="9.49826in" svg:width="3.25in" svg:height="0.50174in" presentation:class="page-number" presentation:placeholder="false">
            <draw:text-box>
              <text:p text:style-name="a2162" text:class-names="" text:cond-style-name=""><text:span text:style-name="a2160" text:class-names=""><text:page-number style:num-format="1" text:fixed="false">9</text:page-number></text:span><text:span text:style-name="a2161" text:class-names=""/></text:p>
            </draw:text-box>
            <svg:title/>
            <svg:desc/>
          </draw:frame>
        </presentation:notes>
      </draw:page>
      <draw:page draw:name="Slide35" draw:style-name="a2165" draw:master-page-name="Master1-Layout2-obj-Title-and-Content" presentation:presentation-page-layout-name="Master1-PPL2" draw:id="Slide-290">
        <draw:custom-shape svg:x="0in" svg:y="0in" svg:width="13.33333in" svg:height="7.5in" draw:id="id276" draw:style-name="a2168" draw:name="Rectangle 8">
          <svg:title/>
          <svg:desc/>
          <text:p text:style-name="a2167" text:class-names="" text:cond-style-name=""><text:span text:style-name="a216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77" draw:style-name="a2169" draw:name="Immagine 3" svg:x="7.58823in" svg:y="0.00001in" svg:width="5.7451in" svg:height="7.49999in" style:rel-width="scale" style:rel-height="scale">
          <draw:image xlink:href="media/image8.jpeg" xlink:type="simple" xlink:show="embed" xlink:actuate="onLoad"/>
          <svg:title/>
          <svg:desc>8 marzo 2025 - Donne al potere. Isabella D'Aragona e Bona Sforza al ...</svg:desc>
        </draw:frame>
        <draw:frame draw:id="id278" presentation:style-name="a2174" draw:name="Titolo 1" svg:x="1.20833in" svg:y="0.51163in" svg:width="6.7067in" svg:height="1.90116in" presentation:class="title" presentation:placeholder="false">
          <draw:text-box>
            <text:p text:style-name="a2173" text:class-names="" text:cond-style-name=""><text:span text:style-name="a2170" text:class-names="">Isabella d'</text:span><text:span text:style-name="a2171" text:class-names="">aragona</text:span><text:span text:style-name="a2172" text:class-names="">(1470-1524)</text:span></text:p>
          </draw:text-box>
          <svg:title/>
          <svg:desc/>
        </draw:frame>
        <draw:connector draw:type="line" svg:x1="13.33333in" svg:y1="1.08497in" svg:x2="6.04575in" svg:y2="0in" draw:id="id279" draw:style-name="a2175" draw:name="Straight Connector 10">
          <svg:title/>
          <svg:desc/>
        </draw:connector>
        <draw:frame draw:id="id280" presentation:style-name="a2181" draw:name="Segnaposto contenuto 2" svg:x="1.20834in" svg:y="2.41279in" svg:width="6.00082in" svg:height="4.50388in" presentation:class="outline" presentation:placeholder="false">
          <draw:text-box>
            <text:list text:style-name="a2180">
              <text:list-item>
                <text:p text:style-name="a2179" text:class-names="" text:cond-style-name=""><text:span text:style-name="a2176" text:class-names="">Isabella d'Aragona nacque ad Andria nel 1470. Divenne Duchessa di Milano sposando Gian Galeazzo Sforza. Fu una donna colta e determinata, protagonista della politica rinascimentale italiana. Difese con forza i diritti del figlio al trono milanese e fu protettrice delle arti.<text:s text:c="1"/></text:span><text:span text:style-name="a2177" text:class-names="">E'</text:span><text:span text:style-name="a2178" text:class-names=""><text:s text:c="1"/>ricordata come una delle donne più influenti del Rinascimento.</text:span></text:p>
              </text:list-item>
            </text:list>
          </draw:text-box>
          <svg:title/>
          <svg:desc/>
        </draw:frame>
      </draw:page>
      <draw:page draw:name="Slide11" draw:style-name="a2182" draw:master-page-name="Master1-Layout22-cust-Two-Content-3" presentation:presentation-page-layout-name="Master1-PPL22" draw:id="Slide-266">
        <draw:connector draw:type="line" svg:x1="3.41177in" svg:y1="0in" svg:x2="0in" svg:y2="0.75in" draw:id="id281" draw:style-name="a2183" draw:name="Straight Connector 9">
          <svg:title/>
          <svg:desc/>
        </draw:connector>
        <draw:connector draw:type="line" svg:x1="0.98837in" svg:y1="0in" svg:x2="0in" svg:y2="7.15625in" draw:id="id282" draw:style-name="a2184" draw:name="Straight Connector 11">
          <svg:title/>
          <svg:desc/>
        </draw:connector>
        <draw:connector draw:type="line" svg:x1="6.82813in" svg:y1="7.5in" svg:x2="-0.04688in" svg:y2="6.33333in" draw:id="id283" draw:style-name="a2185" draw:name="Straight Connector 13">
          <svg:title/>
          <svg:desc/>
        </draw:connector>
        <draw:connector draw:type="line" svg:x1="13.33333in" svg:y1="6.39583in" svg:x2="9.25521in" svg:y2="7.5in" draw:id="id284" draw:style-name="a2186" draw:name="Straight Connector 15">
          <svg:title/>
          <svg:desc/>
        </draw:connector>
        <draw:connector draw:type="line" svg:x1="13.33333in" svg:y1="1.80208in" svg:x2="12.62375in" svg:y2="7.5in" draw:id="id285" draw:style-name="a2187" draw:name="Straight Connector 17">
          <svg:title/>
          <svg:desc/>
        </draw:connector>
        <draw:connector draw:type="line" svg:x1="13.33333in" svg:y1="4.65698in" svg:x2="11.79085in" svg:y2="0in" draw:id="id286" draw:style-name="a2188" draw:name="Straight Connector 19">
          <svg:title/>
          <svg:desc/>
        </draw:connector>
        <draw:connector draw:type="line" svg:x1="13.33333in" svg:y1="1.01401in" svg:x2="7.14063in" svg:y2="-0.00521in" draw:id="id287" draw:style-name="a2189" draw:name="Straight Connector 21">
          <svg:title/>
          <svg:desc/>
        </draw:connector>
        <draw:custom-shape svg:x="0in" svg:y="0in" svg:width="13.33333in" svg:height="7.5in" draw:id="id288" draw:style-name="a2192" draw:name="Rectangle 23">
          <svg:title/>
          <svg:desc/>
          <text:p text:style-name="a2191" text:class-names="" text:cond-style-name=""><text:span text:style-name="a219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89" presentation:style-name="a2193" draw:name="Segnaposto contenuto 4" svg:x="7.58823in" svg:y="0.00001in" svg:width="5.7451in" svg:height="7.49999in" style:rel-width="scale" style:rel-height="scale" presentation:class="graphic" presentation:placeholder="false">
          <draw:image xlink:href="media/image9.jpeg" xlink:type="simple" xlink:show="embed" xlink:actuate="onLoad"/>
          <svg:title/>
          <svg:desc>Loredana Capone: «Occasione per il Pd. Gli errori politici di Emiliano ...</svg:desc>
        </draw:frame>
        <draw:frame draw:id="id290" presentation:style-name="a2196" draw:name="Title 1" svg:x="1.20833in" svg:y="0.51163in" svg:width="6.7067in" svg:height="1.90116in" presentation:class="title" presentation:placeholder="false">
          <draw:text-box>
            <text:p text:style-name="a2195" text:class-names="" text:cond-style-name=""><text:span text:style-name="a2194" text:class-names="">Loredana capone (1961-)</text:span></text:p>
          </draw:text-box>
          <svg:title/>
          <svg:desc/>
        </draw:frame>
        <draw:connector draw:type="line" svg:x1="13.33333in" svg:y1="1.08497in" svg:x2="6.04575in" svg:y2="0in" draw:id="id291" draw:style-name="a2197" draw:name="Straight Connector 25">
          <svg:title/>
          <svg:desc/>
        </draw:connector>
        <draw:frame draw:id="id292" presentation:style-name="a2207" draw:name="Content Placeholder 2" svg:x="1.20834in" svg:y="2.41279in" svg:width="6.00082in" svg:height="4.50388in" presentation:class="outline" presentation:placeholder="false">
          <draw:text-box>
            <text:list text:style-name="a2200">
              <text:list-item>
                <text:p text:style-name="a2199" text:class-names="" text:cond-style-name=""><text:span text:style-name="a2198" text:class-names=""/></text:p>
              </text:list-item>
            </text:list>
            <text:list text:style-name="a2203">
              <text:list-item>
                <text:list text:style-name="a2203">
                  <text:list-item>
                    <text:p text:style-name="a2202" text:class-names="" text:cond-style-name=""><text:span text:style-name="a2201" text:class-names="">Loredana Capone è nata a lecce nel 1961. E' una politica italiana e attuale presidente del consiglio della Puglia. Nel corso della sua carriera si è occupata di sviluppo economico,turismo e diritti civili.</text:span></text:p>
                  </text:list-item>
                </text:list>
              </text:list-item>
            </text:list>
            <text:list text:style-name="a2206">
              <text:list-item>
                <text:list text:style-name="a2206">
                  <text:list-item>
                    <text:p text:style-name="a2205" text:class-names="" text:cond-style-name=""><text:span text:style-name="a2204" text:class-names="">E' una delle figure politiche più importanti della regione oggi.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2214">
          <draw:page-thumbnail draw:page-number="11" svg:x="0.75in" svg:y="1.25in" svg:width="6in" svg:height="3.375in" presentation:class="page" draw:id="id293" presentation:style-name="a2208" draw:name="Slide Image Placeholder 1">
            <svg:title/>
            <svg:desc/>
          </draw:page-thumbnail>
          <draw:frame draw:id="id294" presentation:style-name="a2209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295" presentation:style-name="a2213" draw:name="Slide Number Placeholder 3" svg:x="4.24826in" svg:y="9.49826in" svg:width="3.25in" svg:height="0.50174in" presentation:class="page-number" presentation:placeholder="false">
            <draw:text-box>
              <text:p text:style-name="a2212" text:class-names="" text:cond-style-name=""><text:span text:style-name="a2210" text:class-names=""><text:page-number style:num-format="1" text:fixed="false">11</text:page-number></text:span><text:span text:style-name="a2211" text:class-names=""/></text:p>
            </draw:text-box>
            <svg:title/>
            <svg:desc/>
          </draw:frame>
        </presentation:notes>
      </draw:page>
      <draw:page draw:name="Slide36" draw:style-name="a2215" draw:master-page-name="Master1-Layout22-cust-Two-Content-3" presentation:presentation-page-layout-name="Master1-PPL22" draw:id="Slide-291">
        <draw:connector draw:type="line" svg:x1="3.41177in" svg:y1="0in" svg:x2="0in" svg:y2="0.75in" draw:id="id296" draw:style-name="a2216" draw:name="Straight Connector 12">
          <svg:title/>
          <svg:desc/>
        </draw:connector>
        <draw:connector draw:type="line" svg:x1="0.98837in" svg:y1="0in" svg:x2="0in" svg:y2="7.15625in" draw:id="id297" draw:style-name="a2217" draw:name="Straight Connector 14">
          <svg:title/>
          <svg:desc/>
        </draw:connector>
        <draw:connector draw:type="line" svg:x1="6.82813in" svg:y1="7.5in" svg:x2="-0.04688in" svg:y2="6.33333in" draw:id="id298" draw:style-name="a2218" draw:name="Straight Connector 16">
          <svg:title/>
          <svg:desc/>
        </draw:connector>
        <draw:connector draw:type="line" svg:x1="13.33333in" svg:y1="6.39583in" svg:x2="9.25521in" svg:y2="7.5in" draw:id="id299" draw:style-name="a2219" draw:name="Straight Connector 18">
          <svg:title/>
          <svg:desc/>
        </draw:connector>
        <draw:connector draw:type="line" svg:x1="13.33333in" svg:y1="1.80208in" svg:x2="12.62375in" svg:y2="7.5in" draw:id="id300" draw:style-name="a2220" draw:name="Straight Connector 20">
          <svg:title/>
          <svg:desc/>
        </draw:connector>
        <draw:connector draw:type="line" svg:x1="13.33333in" svg:y1="4.65698in" svg:x2="11.79085in" svg:y2="0in" draw:id="id301" draw:style-name="a2221" draw:name="Straight Connector 22">
          <svg:title/>
          <svg:desc/>
        </draw:connector>
        <draw:connector draw:type="line" svg:x1="13.33333in" svg:y1="1.01401in" svg:x2="7.14063in" svg:y2="-0.00521in" draw:id="id302" draw:style-name="a2222" draw:name="Straight Connector 24">
          <svg:title/>
          <svg:desc/>
        </draw:connector>
        <draw:custom-shape svg:x="0in" svg:y="0in" svg:width="13.33333in" svg:height="7.5in" draw:id="id303" draw:style-name="a2225" draw:name="Rectangle 26">
          <svg:title/>
          <svg:desc/>
          <text:p text:style-name="a2224" text:class-names="" text:cond-style-name=""><text:span text:style-name="a22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04" presentation:style-name="a2228" draw:name="Titolo 1" svg:x="1.25in" svg:y="0.58333in" svg:width="6.57143in" svg:height="1.84108in" presentation:class="title" presentation:placeholder="false">
          <draw:text-box>
            <text:p text:style-name="a2227" text:class-names="" text:cond-style-name=""><text:span text:style-name="a2226" text:class-names="">Orecchiette alle cime di rapa<text:line-break/></text:span></text:p>
          </draw:text-box>
          <svg:title/>
          <svg:desc/>
        </draw:frame>
        <draw:frame draw:id="id305" presentation:style-name="a2280" draw:name="Segnaposto contenuto 2" svg:x="1.25in" svg:y="2.42442in" svg:width="6.72673in" svg:height="4.17442in" presentation:class="outline" presentation:placeholder="false">
          <draw:text-box>
            <text:list text:style-name="a2279">
              <text:list-item>
                <text:p text:style-name="a2278" text:class-names="" text:cond-style-name=""><text:span text:style-name="a2229" text:class-names="">Le orecchiette<text:s text:c="1"/></text:span><text:span text:style-name="a2230" text:class-names="">sono</text:span><text:span text:style-name="a2231" text:class-names=""><text:s text:c="1"/>il<text:s text:c="1"/></text:span><text:span text:style-name="a2232" text:class-names="">formato</text:span><text:span text:style-name="a2233" text:class-names=""><text:s text:c="1"/>di pasta<text:s text:c="1"/></text:span><text:span text:style-name="a2234" text:class-names="">simbolo</text:span><text:span text:style-name="a2235" text:class-names=""><text:s text:c="1"/>della Puglia. Il<text:s text:c="1"/></text:span><text:span text:style-name="a2236" text:class-names="">nome</text:span><text:span text:style-name="a2237" text:class-names=""><text:s text:c="1"/></text:span><text:span text:style-name="a2238" text:class-names="">significa</text:span><text:span text:style-name="a2239" text:class-names=""><text:s text:c="1"/>"</text:span><text:span text:style-name="a2240" text:class-names="">piccole</text:span><text:span text:style-name="a2241" text:class-names=""><text:s text:c="1"/></text:span><text:span text:style-name="a2242" text:class-names="">orecchie</text:span><text:span text:style-name="a2243" text:class-names="">" per la loro forma<text:s text:c="1"/></text:span><text:span text:style-name="a2244" text:class-names="">concava</text:span><text:span text:style-name="a2245" text:class-names="">. Il<text:s text:c="1"/></text:span><text:span text:style-name="a2246" text:class-names="">condimento</text:span><text:span text:style-name="a2247" text:class-names=""><text:s text:c="1"/></text:span><text:span text:style-name="a2248" text:class-names="">più</text:span><text:span text:style-name="a2249" text:class-names=""><text:s text:c="1"/></text:span><text:span text:style-name="a2250" text:class-names="">tradizionale</text:span><text:span text:style-name="a2251" text:class-names=""><text:s text:c="1"/>è con<text:s text:c="1"/></text:span><text:span text:style-name="a2252" text:class-names="">cime</text:span><text:span text:style-name="a2253" text:class-names=""><text:s text:c="1"/>di<text:s text:c="1"/></text:span><text:span text:style-name="a2254" text:class-names="">rapa,aglio,olioextravergine</text:span><text:span text:style-name="a2255" text:class-names=""><text:s text:c="1"/></text:span><text:span text:style-name="a2256" text:class-names="">d'oliva</text:span><text:span text:style-name="a2257" text:class-names=""><text:s text:c="1"/>e<text:s text:c="1"/></text:span><text:span text:style-name="a2258" text:class-names="">acciughe</text:span><text:span text:style-name="a2259" text:class-names="">.<text:s text:c="1"/></text:span><text:span text:style-name="a2260" text:class-names="">E'</text:span><text:span text:style-name="a2261" text:class-names=""><text:s text:c="1"/>un<text:s text:c="1"/></text:span><text:span text:style-name="a2262" text:class-names="">piatto</text:span><text:span text:style-name="a2263" text:class-names=""><text:s text:c="1"/></text:span><text:span text:style-name="a2264" text:class-names="">povero</text:span><text:span text:style-name="a2265" text:class-names=""><text:s text:c="1"/>della<text:s text:c="1"/></text:span><text:span text:style-name="a2266" text:class-names="">tradizione</text:span><text:span text:style-name="a2267" text:class-names=""><text:s text:c="1"/></text:span><text:span text:style-name="a2268" text:class-names="">contadina</text:span><text:span text:style-name="a2269" text:class-names="">, ma molto<text:s text:c="1"/></text:span><text:span text:style-name="a2270" text:class-names="">saporito</text:span><text:span text:style-name="a2271" text:class-names=""><text:s text:c="1"/>e<text:s text:c="1"/></text:span><text:span text:style-name="a2272" text:class-names="">oggi</text:span><text:span text:style-name="a2273" text:class-names=""><text:s text:c="1"/></text:span><text:span text:style-name="a2274" text:class-names="">conosciuto</text:span><text:span text:style-name="a2275" text:class-names=""><text:s text:c="1"/>in<text:s text:c="1"/></text:span><text:span text:style-name="a2276" text:class-names="">tutta</text:span><text:span text:style-name="a2277" text:class-names=""><text:s text:c="1"/>Italia.</text:span></text:p>
              </text:list-item>
            </text:list>
          </draw:text-box>
          <svg:title/>
          <svg:desc/>
        </draw:frame>
        <draw:connector draw:type="line" svg:x1="3.14436in" svg:y1="7.5in" svg:x2="0in" svg:y2="5.68452in" draw:id="id306" draw:style-name="a2281" draw:name="Straight Connector 28">
          <svg:title/>
          <svg:desc/>
        </draw:connector>
        <draw:connector draw:type="line" svg:x1="7.82143in" svg:y1="7.5in" svg:x2="0in" svg:y2="6.59884in" draw:id="id307" draw:style-name="a2282" draw:name="Straight Connector 30">
          <svg:title/>
          <svg:desc/>
        </draw:connector>
        <draw:frame draw:id="id308" presentation:style-name="a2283" draw:name="Segnaposto contenuto 7" svg:x="8.7093in" svg:y="0.00001in" svg:width="4.62403in" svg:height="7.49999in" style:rel-width="scale" style:rel-height="scale" presentation:class="graphic" presentation:placeholder="false">
          <draw:image xlink:href="media/image10.jpeg" xlink:type="simple" xlink:show="embed" xlink:actuate="onLoad"/>
          <svg:title/>
          <svg:desc>Orecchiette alle cime di rapa - Sabor a Italia MX</svg:desc>
        </draw:frame>
      </draw:page>
      <draw:page draw:name="Slide37" draw:style-name="a2284" draw:master-page-name="Master1-Layout22-cust-Two-Content-3" presentation:presentation-page-layout-name="Master1-PPL22" draw:id="Slide-292">
        <draw:connector draw:type="line" svg:x1="3.41177in" svg:y1="0in" svg:x2="0in" svg:y2="0.75in" draw:id="id309" draw:style-name="a2285" draw:name="Straight Connector 9">
          <svg:title/>
          <svg:desc/>
        </draw:connector>
        <draw:connector draw:type="line" svg:x1="0.98837in" svg:y1="0in" svg:x2="0in" svg:y2="7.15625in" draw:id="id310" draw:style-name="a2286" draw:name="Straight Connector 11">
          <svg:title/>
          <svg:desc/>
        </draw:connector>
        <draw:connector draw:type="line" svg:x1="6.82813in" svg:y1="7.5in" svg:x2="-0.04688in" svg:y2="6.33333in" draw:id="id311" draw:style-name="a2287" draw:name="Straight Connector 13">
          <svg:title/>
          <svg:desc/>
        </draw:connector>
        <draw:connector draw:type="line" svg:x1="13.33333in" svg:y1="6.39583in" svg:x2="9.25521in" svg:y2="7.5in" draw:id="id312" draw:style-name="a2288" draw:name="Straight Connector 15">
          <svg:title/>
          <svg:desc/>
        </draw:connector>
        <draw:connector draw:type="line" svg:x1="13.33333in" svg:y1="1.80208in" svg:x2="12.62375in" svg:y2="7.5in" draw:id="id313" draw:style-name="a2289" draw:name="Straight Connector 17">
          <svg:title/>
          <svg:desc/>
        </draw:connector>
        <draw:connector draw:type="line" svg:x1="13.33333in" svg:y1="4.65698in" svg:x2="11.79085in" svg:y2="0in" draw:id="id314" draw:style-name="a2290" draw:name="Straight Connector 19">
          <svg:title/>
          <svg:desc/>
        </draw:connector>
        <draw:connector draw:type="line" svg:x1="13.33333in" svg:y1="1.01401in" svg:x2="7.14063in" svg:y2="-0.00521in" draw:id="id315" draw:style-name="a2291" draw:name="Straight Connector 21">
          <svg:title/>
          <svg:desc/>
        </draw:connector>
        <draw:custom-shape svg:x="0in" svg:y="0in" svg:width="13.33333in" svg:height="7.5in" draw:id="id316" draw:style-name="a2294" draw:name="Rectangle 23">
          <svg:title/>
          <svg:desc/>
          <text:p text:style-name="a2293" text:class-names="" text:cond-style-name=""><text:span text:style-name="a22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.00071in" svg:width="13.33333in" svg:height="2.19696in" draw:id="id317" draw:style-name="a2297" draw:name="Rectangle 25">
          <svg:title/>
          <svg:desc/>
          <text:p text:style-name="a2296" text:class-names="" text:cond-style-name=""><text:span text:style-name="a22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18" presentation:style-name="a2300" draw:name="Titolo 1" svg:x="1.23529in" svg:y="0.55917in" svg:width="10.47366in" svg:height="1.33635in" presentation:class="title" presentation:placeholder="false">
          <draw:text-box>
            <text:p text:style-name="a2299" text:class-names="" text:cond-style-name=""><text:span text:style-name="a2298" text:class-names=""><text:s text:c="22"/>Panzerotti <text:line-break/></text:span></text:p>
          </draw:text-box>
          <svg:title/>
          <svg:desc/>
        </draw:frame>
        <draw:connector draw:type="line" svg:x1="3.41177in" svg:y1="0in" svg:x2="0in" svg:y2="0.75in" draw:id="id319" draw:style-name="a2301" draw:name="Straight Connector 27">
          <svg:title/>
          <svg:desc/>
        </draw:connector>
        <draw:connector draw:type="line" svg:x1="0.89535in" svg:y1="0in" svg:x2="0.52288in" svg:y2="2.19767in" draw:id="id320" draw:style-name="a2302" draw:name="Straight Connector 29">
          <svg:title/>
          <svg:desc/>
        </draw:connector>
        <draw:connector draw:type="line" svg:x1="1.93464in" svg:y1="2.18189in" svg:x2="0in" svg:y2="1.4212in" draw:id="id321" draw:style-name="a2303" draw:name="Straight Connector 31">
          <svg:title/>
          <svg:desc/>
        </draw:connector>
        <draw:frame draw:id="id322" presentation:style-name="a2332" draw:name="Segnaposto contenuto 2" svg:x="1.23529in" svg:y="2.64706in" svg:width="5.99198in" svg:height="4.24804in" presentation:class="outline" presentation:placeholder="false">
          <draw:text-box>
            <text:list text:style-name="a2312">
              <text:list-item>
                <text:p text:style-name="a2311" text:class-names="" text:cond-style-name=""><text:span text:style-name="a2304" text:class-names="">I panzerotti<text:s text:c="1"/></text:span><text:span text:style-name="a2305" text:class-names="">sono</text:span><text:span text:style-name="a2306" text:class-names=""><text:s text:c="1"/></text:span><text:span text:style-name="a2307" text:class-names="">fagottini</text:span><text:span text:style-name="a2308" text:class-names=""><text:s text:c="1"/>di pasta<text:s text:c="1"/></text:span><text:span text:style-name="a2309" text:class-names="">lievitata</text:span><text:span text:style-name="a2310" text:class-names=""><text:s text:c="1"/>ripieni di mozzarella e pomodoro, poi fritti.</text:span></text:p>
              </text:list-item>
            </text:list>
            <text:list text:style-name="a2331">
              <text:list-item>
                <text:p text:style-name="a2330" text:class-names="" text:cond-style-name=""><text:span text:style-name="a2313" text:class-names="">Sono uno<text:s text:c="1"/></text:span><text:span text:style-name="a2314" text:class-names="">dei</text:span><text:span text:style-name="a2315" text:class-names=""><text:s text:c="1"/></text:span><text:span text:style-name="a2316" text:class-names="">cibi</text:span><text:span text:style-name="a2317" text:class-names=""><text:s text:c="1"/>da<text:s text:c="1"/></text:span><text:span text:style-name="a2318" text:class-names="">strada</text:span><text:span text:style-name="a2319" text:class-names=""><text:s text:c="1"/></text:span><text:span text:style-name="a2320" text:class-names="">piùamati</text:span><text:span text:style-name="a2321" text:class-names=""><text:s text:c="1"/>in Puglia e<text:s text:c="1"/></text:span><text:span text:style-name="a2322" text:class-names="">vengono</text:span><text:span text:style-name="a2323" text:class-names=""><text:s text:c="1"/></text:span><text:span text:style-name="a2324" text:class-names="">preparati</text:span><text:span text:style-name="a2325" text:class-names=""><text:s text:c="1"/></text:span><text:span text:style-name="a2326" text:class-names="">anche</text:span><text:span text:style-name="a2327" text:class-names=""><text:s text:c="1"/>con<text:s text:c="1"/></text:span><text:span text:style-name="a2328" text:class-names="">altri</text:span><text:span text:style-name="a2329" text:class-names=""><text:s text:c="1"/>ripieni, come carne o ricotta.</text:span></text:p>
              </text:list-item>
            </text:list>
          </draw:text-box>
          <svg:title/>
          <svg:desc/>
        </draw:frame>
        <draw:frame draw:id="id323" presentation:style-name="a2333" draw:name="Segnaposto contenuto 4" svg:x="7.90196in" svg:y="2.18189in" svg:width="5.43137in" svg:height="5.31811in" style:rel-width="scale" style:rel-height="scale" presentation:class="graphic" presentation:placeholder="false">
          <draw:image xlink:href="media/image11.jpeg" xlink:type="simple" xlink:show="embed" xlink:actuate="onLoad"/>
          <svg:title/>
          <svg:desc>Fried panzerotti (calzone) - Italian recipes by GialloZafferano</svg:desc>
        </draw:frame>
        <draw:connector draw:type="line" svg:x1="13.33333in" svg:y1="1.28072in" svg:x2="8.01744in" svg:y2="2.18189in" draw:id="id324" draw:style-name="a2334" draw:name="Straight Connector 33">
          <svg:title/>
          <svg:desc/>
        </draw:connector>
        <draw:connector draw:type="line" svg:x1="12.15652in" svg:y1="2.18189in" svg:x2="9.80829in" svg:y2="0in" draw:id="id325" draw:style-name="a2335" draw:name="Straight Connector 35">
          <svg:title/>
          <svg:desc/>
        </draw:connector>
        <draw:connector draw:type="line" svg:x1="12.94118in" svg:y1="-0.01579in" svg:x2="12.67974in" svg:y2="2.18189in" draw:id="id326" draw:style-name="a2336" draw:name="Straight Connector 37">
          <svg:title/>
          <svg:desc/>
        </draw:connector>
      </draw:page>
      <draw:page draw:name="Slide38" draw:style-name="a2337" draw:master-page-name="Master1-Layout22-cust-Two-Content-3" presentation:presentation-page-layout-name="Master1-PPL22" draw:id="Slide-293">
        <draw:connector draw:type="line" svg:x1="3.41177in" svg:y1="0in" svg:x2="0in" svg:y2="0.75in" draw:id="id327" draw:style-name="a2338" draw:name="Straight Connector 9">
          <svg:title/>
          <svg:desc/>
        </draw:connector>
        <draw:connector draw:type="line" svg:x1="0.98837in" svg:y1="0in" svg:x2="0in" svg:y2="7.15625in" draw:id="id328" draw:style-name="a2339" draw:name="Straight Connector 11">
          <svg:title/>
          <svg:desc/>
        </draw:connector>
        <draw:connector draw:type="line" svg:x1="6.82813in" svg:y1="7.5in" svg:x2="-0.04688in" svg:y2="6.33333in" draw:id="id329" draw:style-name="a2340" draw:name="Straight Connector 13">
          <svg:title/>
          <svg:desc/>
        </draw:connector>
        <draw:connector draw:type="line" svg:x1="13.33333in" svg:y1="6.39583in" svg:x2="9.25521in" svg:y2="7.5in" draw:id="id330" draw:style-name="a2341" draw:name="Straight Connector 15">
          <svg:title/>
          <svg:desc/>
        </draw:connector>
        <draw:connector draw:type="line" svg:x1="13.33333in" svg:y1="1.80208in" svg:x2="12.62375in" svg:y2="7.5in" draw:id="id331" draw:style-name="a2342" draw:name="Straight Connector 17">
          <svg:title/>
          <svg:desc/>
        </draw:connector>
        <draw:connector draw:type="line" svg:x1="13.33333in" svg:y1="4.65698in" svg:x2="11.79085in" svg:y2="0in" draw:id="id332" draw:style-name="a2343" draw:name="Straight Connector 19">
          <svg:title/>
          <svg:desc/>
        </draw:connector>
        <draw:connector draw:type="line" svg:x1="13.33333in" svg:y1="1.01401in" svg:x2="7.14063in" svg:y2="-0.00521in" draw:id="id333" draw:style-name="a2344" draw:name="Straight Connector 21">
          <svg:title/>
          <svg:desc/>
        </draw:connector>
        <draw:custom-shape svg:x="0in" svg:y="0in" svg:width="13.33333in" svg:height="7.5in" draw:id="id334" draw:style-name="a2347" draw:name="Rectangle 23">
          <svg:title/>
          <svg:desc/>
          <text:p text:style-name="a2346" text:class-names="" text:cond-style-name=""><text:span text:style-name="a234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35" presentation:style-name="a2350" draw:name="Titolo 1" svg:x="7.39063in" svg:y="0.58333in" svg:width="4.91713in" svg:height="1.84896in" presentation:class="title" presentation:placeholder="false">
          <draw:text-box>
            <text:p text:style-name="a2349" text:class-names="" text:cond-style-name=""><text:span text:style-name="a2348" text:class-names=""><text:s text:c="18"/>Focaccia barese</text:span></text:p>
          </draw:text-box>
          <svg:title/>
          <svg:desc/>
        </draw:frame>
        <draw:connector draw:type="line" svg:x1="5.41177in" svg:y1="0in" svg:x2="0in" svg:y2="1.44853in" draw:id="id336" draw:style-name="a2351" draw:name="Straight Connector 25">
          <svg:title/>
          <svg:desc/>
        </draw:connector>
        <draw:connector draw:type="line" svg:x1="0.89535in" svg:y1="0in" svg:x2="0in" svg:y2="7.02907in" draw:id="id337" draw:style-name="a2352" draw:name="Straight Connector 27">
          <svg:title/>
          <svg:desc/>
        </draw:connector>
        <draw:connector draw:type="line" svg:x1="4.89706in" svg:y1="7.5in" svg:x2="-0in" svg:y2="3in" draw:id="id338" draw:style-name="a2353" draw:name="Straight Connector 29">
          <svg:title/>
          <svg:desc/>
        </draw:connector>
        <draw:frame draw:id="id339" presentation:style-name="a2354" draw:name="Segnaposto contenuto 4" svg:x="0.58333in" svg:y="2.42687in" svg:width="6.08333in" svg:height="2.64625in" style:rel-width="scale" style:rel-height="scale" presentation:class="graphic" presentation:placeholder="false">
          <draw:image xlink:href="media/image12.jpeg" xlink:type="simple" xlink:show="embed" xlink:actuate="onLoad"/>
          <svg:title/>
          <svg:desc>Focaccia Barese | Traditional Flatbread From Metropolitan City of Bari ...</svg:desc>
        </draw:frame>
        <draw:frame draw:id="id340" presentation:style-name="a2361" draw:name="Segnaposto contenuto 2" svg:x="7.30729in" svg:y="2.50521in" svg:width="5.00047in" svg:height="4.41146in" presentation:class="outline" presentation:placeholder="false">
          <draw:text-box>
            <text:list text:style-name="a2357">
              <text:list-item>
                <text:p text:style-name="a2356" text:class-names="" text:cond-style-name=""><text:span text:style-name="a2355" text:class-names="">La focaccia barese è tipica della città di Bari.</text:span></text:p>
              </text:list-item>
            </text:list>
            <text:list text:style-name="a2360">
              <text:list-item>
                <text:p text:style-name="a2359" text:class-names="" text:cond-style-name=""><text:span text:style-name="a2358" text:class-names="">E' alta e soffice, preparata con pomodorini, olive, e olio extravergine d'oliva. Si mangia come spuntino o antipasto.</text:span></text:p>
              </text:list-item>
            </text:list>
          </draw:text-box>
          <svg:title/>
          <svg:desc/>
        </draw:frame>
        <draw:connector draw:type="line" svg:x1="13.33333in" svg:y1="2.78677in" svg:x2="12.68862in" svg:y2="7.5in" draw:id="id341" draw:style-name="a2362" draw:name="Straight Connector 31">
          <svg:title/>
          <svg:desc/>
        </draw:connector>
      </draw:page>
      <presentation:settings presentation:force-manual="true"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66667in" svg:y="1.22743in" svg:width="10in" svg:height="3.30852in"/>
      <presentation:placeholder presentation:object="subtitle" svg:x="1.66667in" svg:y="4.79739in" svg:width="10in" svg:height="1.24183in"/>
      <presentation:placeholder presentation:object="date-time" svg:x="8.02395in" svg:y="6.9979in" svg:width="4.58651in" svg:height="0.39931in"/>
      <presentation:placeholder presentation:object="footer" svg:x="0.16889in" svg:y="6.9979in" svg:width="4.91832in" svg:height="0.39931in"/>
      <presentation:placeholder presentation:object="page-number" svg:x="12.68862in" svg:y="6.9979in" svg:width="0.51497in" svg:height="0.39931in"/>
    </style:presentation-page-layout>
    <style:presentation-page-layout style:name="Master1-PPL2" style:display-name="Title and Content">
      <presentation:placeholder presentation:object="title" svg:x="1.25in" svg:y="0.58333in" svg:width="10.83333in" svg:height="1.51154in"/>
      <presentation:placeholder presentation:object="object" svg:x="1.25in" svg:y="2.19767in" svg:width="10.83333in" svg:height="4.40116in"/>
      <presentation:placeholder presentation:object="date-time" svg:x="8.02395in" svg:y="6.9979in" svg:width="4.58651in" svg:height="0.39931in"/>
      <presentation:placeholder presentation:object="footer" svg:x="0.16889in" svg:y="6.9979in" svg:width="4.91832in" svg:height="0.39931in"/>
      <presentation:placeholder presentation:object="page-number" svg:x="12.68862in" svg:y="6.9979in" svg:width="0.51497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8.02395in" svg:y="6.9979in" svg:width="4.58651in" svg:height="0.39931in"/>
      <presentation:placeholder presentation:object="footer" svg:x="0.16889in" svg:y="6.9979in" svg:width="4.91832in" svg:height="0.39931in"/>
      <presentation:placeholder presentation:object="page-number" svg:x="12.68862in" svg:y="6.9979in" svg:width="0.51497in" svg:height="0.39931in"/>
    </style:presentation-page-layout>
    <style:presentation-page-layout style:name="Master1-PPL4" style:display-name="Two Content">
      <presentation:placeholder presentation:object="title" svg:x="1.25in" svg:y="0.58333in" svg:width="10.83333in" svg:height="1.51154in"/>
      <presentation:placeholder presentation:object="object" svg:x="0.91667in" svg:y="2.10465in" svg:width="5.66667in" svg:height="4.65056in"/>
      <presentation:placeholder presentation:object="object" svg:x="6.75in" svg:y="2.10465in" svg:width="5.66667in" svg:height="4.65056in"/>
      <presentation:placeholder presentation:object="date-time" svg:x="8.02395in" svg:y="6.9979in" svg:width="4.58651in" svg:height="0.39931in"/>
      <presentation:placeholder presentation:object="footer" svg:x="0.16889in" svg:y="6.9979in" svg:width="4.91832in" svg:height="0.39931in"/>
      <presentation:placeholder presentation:object="page-number" svg:x="12.68862in" svg:y="6.9979in" svg:width="0.51497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9668in" svg:width="5.64062in" svg:height="0.90104in"/>
      <presentation:placeholder presentation:object="object" svg:x="0.9184in" svg:y="2.79772in" svg:width="5.64062in" svg:height="4.02951in"/>
      <presentation:placeholder presentation:object="outline" svg:x="6.75in" svg:y="1.89668in" svg:width="5.6684in" svg:height="0.90104in"/>
      <presentation:placeholder presentation:object="object" svg:x="6.75in" svg:y="2.79772in" svg:width="5.6684in" svg:height="4.02951in"/>
      <presentation:placeholder presentation:object="date-time" svg:x="8.02395in" svg:y="6.9979in" svg:width="4.58651in" svg:height="0.39931in"/>
      <presentation:placeholder presentation:object="footer" svg:x="0.16889in" svg:y="6.9979in" svg:width="4.91832in" svg:height="0.39931in"/>
      <presentation:placeholder presentation:object="page-number" svg:x="12.68862in" svg:y="6.9979in" svg:width="0.51497in" svg:height="0.39931in"/>
    </style:presentation-page-layout>
    <style:presentation-page-layout style:name="Master1-PPL6" style:display-name="Title Only">
      <presentation:placeholder presentation:object="title" svg:x="1.25in" svg:y="0.58333in" svg:width="10.83333in" svg:height="1.51154in"/>
      <presentation:placeholder presentation:object="date-time" svg:x="8.02395in" svg:y="6.9979in" svg:width="4.58651in" svg:height="0.39931in"/>
      <presentation:placeholder presentation:object="footer" svg:x="0.16889in" svg:y="6.9979in" svg:width="4.91832in" svg:height="0.39931in"/>
      <presentation:placeholder presentation:object="page-number" svg:x="12.68862in" svg:y="6.9979in" svg:width="0.51497in" svg:height="0.39931in"/>
    </style:presentation-page-layout>
    <style:presentation-page-layout style:name="Master1-PPL7" style:display-name="Blank">
      <presentation:placeholder presentation:object="date-time" svg:x="8.02395in" svg:y="6.9979in" svg:width="4.58651in" svg:height="0.39931in"/>
      <presentation:placeholder presentation:object="footer" svg:x="0.16889in" svg:y="6.9979in" svg:width="4.91832in" svg:height="0.39931in"/>
      <presentation:placeholder presentation:object="page-number" svg:x="12.68862in" svg:y="6.9979in" svg:width="0.51497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8.02395in" svg:y="6.9979in" svg:width="4.58651in" svg:height="0.39931in"/>
      <presentation:placeholder presentation:object="footer" svg:x="0.16889in" svg:y="6.9979in" svg:width="4.91832in" svg:height="0.39931in"/>
      <presentation:placeholder presentation:object="page-number" svg:x="12.68862in" svg:y="6.9979in" svg:width="0.51497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8.02395in" svg:y="6.9979in" svg:width="4.58651in" svg:height="0.39931in"/>
      <presentation:placeholder presentation:object="footer" svg:x="0.16889in" svg:y="6.9979in" svg:width="4.91832in" svg:height="0.39931in"/>
      <presentation:placeholder presentation:object="page-number" svg:x="12.68862in" svg:y="6.9979in" svg:width="0.51497in" svg:height="0.39931in"/>
    </style:presentation-page-layout>
    <style:presentation-page-layout style:name="Master1-PPL10" style:display-name="Title and Vertical Text">
      <presentation:placeholder presentation:object="title" svg:x="1.25in" svg:y="0.58333in" svg:width="10.83333in" svg:height="1.51154in"/>
      <presentation:placeholder presentation:object="outline" svg:x="1.25in" svg:y="2.19767in" svg:width="10.83333in" svg:height="4.40116in"/>
      <presentation:placeholder presentation:object="date-time" svg:x="8.02395in" svg:y="6.9979in" svg:width="4.58651in" svg:height="0.39931in"/>
      <presentation:placeholder presentation:object="footer" svg:x="0.16889in" svg:y="6.9979in" svg:width="4.91832in" svg:height="0.39931in"/>
      <presentation:placeholder presentation:object="page-number" svg:x="12.68862in" svg:y="6.9979in" svg:width="0.51497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8.02395in" svg:y="6.9979in" svg:width="4.58651in" svg:height="0.39931in"/>
      <presentation:placeholder presentation:object="footer" svg:x="0.16889in" svg:y="6.9979in" svg:width="4.91832in" svg:height="0.39931in"/>
      <presentation:placeholder presentation:object="page-number" svg:x="12.68862in" svg:y="6.9979in" svg:width="0.51497in" svg:height="0.39931in"/>
    </style:presentation-page-layout>
    <style:presentation-page-layout style:name="Master1-PPL12" style:display-name="1_Title only">
      <presentation:placeholder presentation:object="title" svg:x="0.93774in" svg:y="0.53165in" svg:width="5.93568in" svg:height="3.93671in"/>
      <presentation:placeholder presentation:object="graphic" svg:x="6.15133in" svg:y="-0.00734in" svg:width="7.19466in" svg:height="7.54in"/>
    </style:presentation-page-layout>
    <style:presentation-page-layout style:name="Master1-PPL13" style:display-name="Content 2">
      <presentation:placeholder presentation:object="title" svg:x="0.91667in" svg:y="0.55696in" svg:width="3.5in" svg:height="6.14304in"/>
      <presentation:placeholder presentation:object="object" svg:x="5.49367in" svg:y="0.55696in" svg:width="4.73418in" svg:height="6.14304in"/>
      <presentation:placeholder presentation:object="graphic" svg:x="10.44271in" svg:y="-0.025in" svg:width="2.9in" svg:height="7.55in"/>
      <presentation:placeholder presentation:object="date-time" svg:x="8.02395in" svg:y="6.9979in" svg:width="4.58651in" svg:height="0.39931in"/>
      <presentation:placeholder presentation:object="footer" svg:x="0.16889in" svg:y="6.9979in" svg:width="4.91832in" svg:height="0.39931in"/>
      <presentation:placeholder presentation:object="page-number" svg:x="12.68862in" svg:y="6.9979in" svg:width="0.51497in" svg:height="0.39931in"/>
    </style:presentation-page-layout>
    <style:presentation-page-layout style:name="Master1-PPL14" style:display-name="Title + picture">
      <presentation:placeholder presentation:object="title" svg:x="1.66667in" svg:y="0.81329in" svg:width="10in" svg:height="3.67591in"/>
      <presentation:placeholder presentation:object="graphic" svg:x="-0.00833in" svg:y="5.21264in" svg:width="13.35in" svg:height="2.32in"/>
    </style:presentation-page-layout>
    <style:presentation-page-layout style:name="Master1-PPL15" style:display-name="Title + subtitle + picture">
      <presentation:placeholder presentation:object="title" svg:x="1.32882in" svg:y="0.57778in" svg:width="5.49931in" svg:height="3.66906in"/>
      <presentation:placeholder presentation:object="subtitle" svg:x="1.32882in" svg:y="4.40507in" svg:width="5.49931in" svg:height="2.07237in"/>
      <presentation:placeholder presentation:object="graphic" svg:x="7.93671in" svg:y="-0.01266in" svg:width="5.40928in" svg:height="7.55in"/>
    </style:presentation-page-layout>
    <style:presentation-page-layout style:name="Master1-PPL16" style:display-name="Content 1">
      <presentation:placeholder presentation:object="title" svg:x="4.34177in" svg:y="0.20253in" svg:width="7.57966in" svg:height="1.64643in"/>
      <presentation:placeholder presentation:object="graphic" svg:x="-0.02055in" svg:y="-0.025in" svg:width="3.6in" svg:height="7.55in"/>
      <presentation:placeholder presentation:object="object" svg:x="4.34177in" svg:y="2.21172in" svg:width="7.59154in" svg:height="4.7in"/>
    </style:presentation-page-layout>
    <style:presentation-page-layout style:name="Master1-PPL17" style:display-name="Title + subtitle">
      <presentation:placeholder presentation:object="title" svg:x="1.66667in" svg:y="0.75in" svg:width="10in" svg:height="3.43038in"/>
      <presentation:placeholder presentation:object="subtitle" svg:x="1.66667in" svg:y="4.35127in" svg:width="10in" svg:height="2.15in"/>
    </style:presentation-page-layout>
    <style:presentation-page-layout style:name="Master1-PPL18" style:display-name="Two Content 1">
      <presentation:placeholder presentation:object="title" svg:x="1.25in" svg:y="0.58333in" svg:width="10.83333in" svg:height="1.51154in"/>
      <presentation:placeholder presentation:object="object" svg:x="0.91312in" svg:y="2.22295in" svg:width="4.8808in" svg:height="4.44826in"/>
      <presentation:placeholder presentation:object="object" svg:x="6.71667in" svg:y="2.22295in" svg:width="5.7in" svg:height="4.44826in"/>
      <presentation:placeholder presentation:object="date-time" svg:x="8.02395in" svg:y="6.9979in" svg:width="4.58651in" svg:height="0.39931in"/>
      <presentation:placeholder presentation:object="footer" svg:x="0.16889in" svg:y="6.9979in" svg:width="4.91832in" svg:height="0.39931in"/>
      <presentation:placeholder presentation:object="page-number" svg:x="12.68862in" svg:y="6.9979in" svg:width="0.51497in" svg:height="0.39931in"/>
    </style:presentation-page-layout>
    <style:presentation-page-layout style:name="Master1-PPL19" style:display-name="Two Content 2">
      <presentation:placeholder presentation:object="title" svg:x="1.25in" svg:y="0.58333in" svg:width="10.83333in" svg:height="1.51154in"/>
      <presentation:placeholder presentation:object="object" svg:x="0.91667in" svg:y="2.27358in" svg:width="3.75725in" svg:height="4.44826in"/>
      <presentation:placeholder presentation:object="object" svg:x="5.43038in" svg:y="2.28272in" svg:width="6.56962in" svg:height="4.44826in"/>
      <presentation:placeholder presentation:object="date-time" svg:x="8.02395in" svg:y="6.9979in" svg:width="4.58651in" svg:height="0.39931in"/>
      <presentation:placeholder presentation:object="footer" svg:x="0.16889in" svg:y="6.9979in" svg:width="4.91832in" svg:height="0.39931in"/>
      <presentation:placeholder presentation:object="page-number" svg:x="12.68862in" svg:y="6.9979in" svg:width="0.51497in" svg:height="0.39931in"/>
    </style:presentation-page-layout>
    <style:presentation-page-layout style:name="Master1-PPL20" style:display-name="Content + picture ">
      <presentation:placeholder presentation:object="title" svg:x="0.91667in" svg:y="0.39931in" svg:width="7.26812in" svg:height="1.44965in"/>
      <presentation:placeholder presentation:object="object" svg:x="0.91667in" svg:y="2.24826in" svg:width="6.32246in" svg:height="4.44826in"/>
      <presentation:placeholder presentation:object="graphic" svg:x="8.27536in" svg:y="-0.025in" svg:width="5.05797in" svg:height="7.55in"/>
      <presentation:placeholder presentation:object="date-time" svg:x="8.02395in" svg:y="6.9979in" svg:width="4.58651in" svg:height="0.39931in"/>
      <presentation:placeholder presentation:object="footer" svg:x="0.16889in" svg:y="6.9979in" svg:width="4.91832in" svg:height="0.39931in"/>
      <presentation:placeholder presentation:object="page-number" svg:x="12.68862in" svg:y="6.9979in" svg:width="0.51497in" svg:height="0.39931in"/>
    </style:presentation-page-layout>
    <style:presentation-page-layout style:name="Master1-PPL21" style:display-name="Content + table">
      <presentation:placeholder presentation:object="title" svg:x="0.91667in" svg:y="0.39931in" svg:width="11.29747in" svg:height="1.44965in"/>
      <presentation:placeholder presentation:object="object" svg:x="0.91667in" svg:y="2.33712in" svg:width="3.08in" svg:height="4.35941in"/>
      <presentation:placeholder presentation:object="table" svg:x="4.49367in" svg:y="2.33712in" svg:width="7.72046in" svg:height="4.35941in"/>
      <presentation:placeholder presentation:object="date-time" svg:x="8.02395in" svg:y="6.9979in" svg:width="4.58651in" svg:height="0.39931in"/>
      <presentation:placeholder presentation:object="footer" svg:x="0.16889in" svg:y="6.9979in" svg:width="4.91832in" svg:height="0.39931in"/>
      <presentation:placeholder presentation:object="page-number" svg:x="12.68862in" svg:y="6.9979in" svg:width="0.51497in" svg:height="0.39931in"/>
    </style:presentation-page-layout>
    <style:presentation-page-layout style:name="Master1-PPL22" style:display-name="Two Content 3">
      <presentation:placeholder presentation:object="title" svg:x="1.25in" svg:y="0.58333in" svg:width="10.83333in" svg:height="1.51154in"/>
      <presentation:placeholder presentation:object="object" svg:x="0.91667in" svg:y="2.17374in" svg:width="7.62764in" svg:height="4.7in"/>
      <presentation:placeholder presentation:object="object" svg:x="8.65823in" svg:y="2.17374in" svg:width="3.75844in" svg:height="4.7in"/>
      <presentation:placeholder presentation:object="date-time" svg:x="8.02395in" svg:y="6.9979in" svg:width="4.58651in" svg:height="0.39931in"/>
      <presentation:placeholder presentation:object="footer" svg:x="0.16889in" svg:y="6.9979in" svg:width="4.91832in" svg:height="0.39931in"/>
      <presentation:placeholder presentation:object="page-number" svg:x="12.68862in" svg:y="6.9979in" svg:width="0.51497in" svg:height="0.39931in"/>
    </style:presentation-page-layout>
    <style:presentation-page-layout style:name="Master1-PPL23" style:display-name="Table">
      <presentation:placeholder presentation:object="title" svg:x="1.25in" svg:y="0.58333in" svg:width="10.83333in" svg:height="1.51154in"/>
      <presentation:placeholder presentation:object="table" svg:x="0.91667in" svg:y="2.32421in" svg:width="11.5in" svg:height="4.02006in"/>
      <presentation:placeholder presentation:object="date-time" svg:x="8.02395in" svg:y="6.9979in" svg:width="4.58651in" svg:height="0.39931in"/>
      <presentation:placeholder presentation:object="footer" svg:x="0.16889in" svg:y="6.9979in" svg:width="4.91832in" svg:height="0.39931in"/>
      <presentation:placeholder presentation:object="page-number" svg:x="12.68862in" svg:y="6.9979in" svg:width="0.51497in" svg:height="0.39931in"/>
    </style:presentation-page-layout>
    <style:presentation-page-layout style:name="Master1-PPL24" style:display-name="Content 3">
      <presentation:placeholder presentation:object="graphic" svg:x="0.00417in" svg:y="0in" svg:width="8.54877in" svg:height="7.5in"/>
      <presentation:placeholder presentation:object="title" svg:x="6.65025in" svg:y="0.80005in" svg:width="5.36181in" svg:height="3.85693in"/>
      <presentation:placeholder presentation:object="object" svg:x="6.65025in" svg:y="4.78261in" svg:width="5.36181in" svg:height="1.91735in"/>
    </style:presentation-page-layout>
    <style:style style:family="table-cell" style:name="a1614">
      <style:table-cell-properties fo:background-color="#e97132" fo:border-top="0.00347in solid #e97132" fo:border-bottom="0.00347in solid #e97132" fo:border-left="0.00347in solid #e97132" fo:border-right="0.00347in solid #e97132"/>
      <style:text-properties fo:color="#000000" fo:font-family="+mn-lt" style:font-family-asian="+mn-ea" style:font-family-complex="+mn-cs"/>
    </style:style>
    <style:style style:family="table-cell" style:name="a1615">
      <style:table-cell-properties fo:background-color="#e97132"/>
    </style:style>
    <style:style style:family="table-cell" style:name="a1616">
      <style:table-cell-properties fo:background-color="#e97132" fo:border-top="0.00347in solid #e97132" fo:border-bottom="0.00347in solid #e97132"/>
    </style:style>
    <style:style style:family="table-cell" style:name="a1617">
      <style:table-cell-properties fo:background-color="#e97132"/>
    </style:style>
    <style:style style:family="table-cell" style:name="a1618">
      <style:table-cell-properties fo:background-color="#e97132"/>
    </style:style>
    <style:style style:family="table-cell" style:name="a1619">
      <style:table-cell-properties fo:background-color="#e97132" fo:border-top="0.00347in solid #e97132" fo:border-bottom="0.00347in solid #ffffff" fo:border-left="0.00347in solid #e97132" fo:border-right="0.00347in solid #e97132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600">
      <style:table-cell-properties fo:background-color="#ffffff" fo:border-top="0.01389in solid #a02b93" fo:border-bottom="0.01389in solid #a02b93" fo:border-left="0.01389in solid #a02b93" fo:border-right="0.01389in solid #a02b93"/>
      <style:text-properties fo:color="#000000" fo:font-family="+mn-lt" style:font-family-asian="+mn-ea" style:font-family-complex="+mn-cs"/>
    </style:style>
    <style:style style:family="table-cell" style:name="a1601">
      <style:table-cell-properties fo:background-color="#f0e8ee"/>
    </style:style>
    <style:style style:family="table-cell" style:name="a1602">
      <style:table-cell-properties fo:background-color="#f0e8ee"/>
    </style:style>
    <style:style style:family="table-cell" style:name="a1603">
      <style:table-cell-properties fo:background-color="#a02b93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604">
      <style:table-cell-properties fo:background-color="#ffffff" fo:border-top="0.05556in double #a02b93"/>
      <style:text-properties fo:font-weight="bold" style:font-weight-asian="bold" style:font-weight-complex="bold"/>
    </style:style>
    <style:style style:family="table-cell" style:name="a1605">
      <style:table-cell-properties/>
      <style:text-properties fo:font-weight="bold" style:font-weight-asian="bold" style:font-weight-complex="bold"/>
    </style:style>
    <style:style style:family="graphic" style:name="Graphics"/>
    <style:style style:family="table-cell" style:name="a1606">
      <style:table-cell-properties/>
      <style:text-properties fo:font-weight="bold" style:font-weight-asian="bold" style:font-weight-complex="bold"/>
    </style:style>
    <style:style style:family="table-cell" style:name="a1607">
      <style:table-cell-properties fo:background-color="transparent" fo:border-top="0.01389in solid #a02b93" fo:border-bottom="0.01389in solid #a02b93" fo:border-left="0.01389in solid #a02b93" fo:border-right="0.01389in solid #a02b93"/>
      <style:text-properties fo:color="#000000" fo:font-family="+mn-lt" style:font-family-asian="+mn-ea" style:font-family-complex="+mn-cs"/>
    </style:style>
    <style:style style:family="table-cell" style:name="a1608">
      <style:table-cell-properties fo:background-color="#a02b93"/>
    </style:style>
    <style:style style:family="table-cell" style:name="a1609">
      <style:table-cell-properties fo:background-color="#a02b93"/>
    </style:style>
    <style:style style:family="table-cell" style:name="a1620">
      <style:table-cell-properties fo:background-color="#e97132" fo:border-top="0.00347in solid #e97132" fo:border-bottom="0.00347in solid #e97132" fo:border-left="0.00347in solid #e97132" fo:border-right="0.00347in solid #e97132"/>
      <style:text-properties fo:font-weight="bold" style:font-weight-asian="bold" style:font-weight-complex="bold"/>
    </style:style>
    <style:style style:family="table-cell" style:name="a1621">
      <style:table-cell-properties fo:background-color="#e97132" fo:border-top="0.00347in solid #e97132" fo:border-bottom="0.00347in solid #e97132" fo:border-left="0.00347in solid #e97132" fo:border-right="0.00347in solid #e97132"/>
      <style:text-properties fo:font-weight="bold" style:font-weight-asian="bold" style:font-weight-complex="bold"/>
    </style:style>
    <style:style style:family="table-cell" style:name="a1622">
      <style:table-cell-properties fo:background-color="#e97132" fo:border-top="0.00347in solid #e97132" fo:border-bottom="0.00347in solid #e97132" fo:border-left="0.00347in solid #e97132" fo:border-right="0.00347in solid #e97132"/>
      <style:text-properties fo:font-weight="bold" style:font-weight-asian="bold" style:font-weight-complex="bold"/>
    </style:style>
    <style:style style:family="table-cell" style:name="a1591">
      <style:table-cell-properties fo:background-color="#e7eaed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1623">
      <style:table-cell-properties fo:background-color="#ffffff" fo:border-top="0.01389in solid #e97132" fo:border-bottom="0.01389in solid #e97132" fo:border-left="0.01389in solid #e97132" fo:border-right="0.01389in solid #e97132"/>
      <style:text-properties fo:color="#000000" fo:font-family="+mn-lt" style:font-family-asian="+mn-ea" style:font-family-complex="+mn-cs"/>
    </style:style>
    <style:style style:family="table-cell" style:name="a1592">
      <style:table-cell-properties/>
    </style:style>
    <style:style style:family="table-cell" style:name="a1624">
      <style:table-cell-properties fo:background-color="#fbebe8"/>
    </style:style>
    <style:style style:family="table-cell" style:name="a1593">
      <style:table-cell-properties fo:background-color="#ccd2d8"/>
    </style:style>
    <style:style style:family="table-cell" style:name="a1625">
      <style:table-cell-properties fo:background-color="#fbebe8"/>
    </style:style>
    <style:style style:family="table-cell" style:name="a1594">
      <style:table-cell-properties/>
    </style:style>
    <style:style style:family="table-cell" style:name="a1626">
      <style:table-cell-properties fo:background-color="#e97132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595">
      <style:table-cell-properties fo:background-color="#ccd2d8"/>
    </style:style>
    <style:style style:family="table-cell" style:name="a1627">
      <style:table-cell-properties fo:background-color="#ffffff" fo:border-top="0.05556in double #e97132"/>
      <style:text-properties fo:font-weight="bold" style:font-weight-asian="bold" style:font-weight-complex="bold"/>
    </style:style>
    <style:style style:family="table-cell" style:name="a1596">
      <style:table-cell-properties fo:background-color="#156082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628">
      <style:table-cell-properties/>
      <style:text-properties fo:font-weight="bold" style:font-weight-asian="bold" style:font-weight-complex="bold"/>
    </style:style>
    <style:style style:family="table-cell" style:name="a1597">
      <style:table-cell-properties fo:background-color="#156082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629">
      <style:table-cell-properties/>
      <style:text-properties fo:font-weight="bold" style:font-weight-asian="bold" style:font-weight-complex="bold"/>
    </style:style>
    <style:style style:family="table-cell" style:name="a1598">
      <style:table-cell-properties fo:background-color="#156082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610">
      <style:table-cell-properties fo:background-color="transparent" fo:border-bottom="0.02778in solid #a02b93"/>
      <style:text-properties fo:font-weight="bold" style:font-weight-asian="bold" style:font-weight-complex="bold"/>
    </style:style>
    <style:style style:family="table-cell" style:name="a1599">
      <style:table-cell-properties fo:background-color="#156082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611">
      <style:table-cell-properties fo:background-color="transparent" fo:border-top="0.05556in double #a02b93"/>
      <style:text-properties fo:font-weight="bold" style:font-weight-asian="bold" style:font-weight-complex="bold"/>
    </style:style>
    <style:style style:family="table-cell" style:name="a1612">
      <style:table-cell-properties/>
      <style:text-properties fo:font-weight="bold" style:font-weight-asian="bold" style:font-weight-complex="bold"/>
    </style:style>
    <style:style style:family="table-cell" style:name="a1613">
      <style:table-cell-properties/>
      <style:text-properties fo:font-weight="bold" style:font-weight-asian="bold" style:font-weight-complex="bold"/>
    </style:style>
    <style:default-style style:family="graphic">
      <style:graphic-properties draw:fill="solid" draw:fill-color="#155767" draw:opacity="100%" draw:stroke="solid" svg:stroke-width="0.01389in" svg:stroke-color="#042027" svg:stroke-opacity="100%" draw:stroke-linejoin="miter" svg:stroke-linecap="butt"/>
    </style:default-style>
    <draw:fill-image draw:name="a2074" xlink:href="media/image13.jpeg" xlink:show="embed" xlink:actuate="onLoad"/>
    <table:table-template table:name="{5C22544A-7EE6-4342-B048-85BDC9FD1C3A}">
      <table:first-row table:style-name="a1596" table:paragraph-style-name=""/>
      <table:last-row table:style-name="a1597" table:paragraph-style-name=""/>
      <table:first-column table:style-name="a1598" table:paragraph-style-name=""/>
      <table:last-column table:style-name="a1599" table:paragraph-style-name=""/>
      <table:body table:style-name="a1591" table:paragraph-style-name=""/>
      <table:even-rows table:style-name="a1594" table:paragraph-style-name=""/>
      <table:odd-rows table:style-name="a1595" table:paragraph-style-name=""/>
      <table:even-columns table:style-name="a1592" table:paragraph-style-name=""/>
      <table:odd-columns table:style-name="a1593" table:paragraph-style-name=""/>
    </table:table-template>
    <table:table-template table:name="{284E427A-3D55-4303-BF80-6455036E1DE7}">
      <table:first-row table:style-name="a1619" table:paragraph-style-name=""/>
      <table:last-row table:style-name="a1620" table:paragraph-style-name=""/>
      <table:first-column table:style-name="a1621" table:paragraph-style-name=""/>
      <table:last-column table:style-name="a1622" table:paragraph-style-name=""/>
      <table:body table:style-name="a1614" table:paragraph-style-name=""/>
      <table:even-rows table:style-name="a1617" table:paragraph-style-name=""/>
      <table:odd-rows table:style-name="a1618" table:paragraph-style-name=""/>
      <table:even-columns table:style-name="a1615" table:paragraph-style-name=""/>
      <table:odd-columns table:style-name="a1616" table:paragraph-style-name=""/>
    </table:table-template>
    <table:table-template table:name="{BDBED569-4797-4DF1-A0F4-6AAB3CD982D8}">
      <table:first-row table:style-name="a1610" table:paragraph-style-name=""/>
      <table:last-row table:style-name="a1611" table:paragraph-style-name=""/>
      <table:first-column table:style-name="a1612" table:paragraph-style-name=""/>
      <table:last-column table:style-name="a1613" table:paragraph-style-name=""/>
      <table:body table:style-name="a1607" table:paragraph-style-name=""/>
      <table:odd-rows table:style-name="a1609" table:paragraph-style-name=""/>
      <table:odd-columns table:style-name="a1608" table:paragraph-style-name=""/>
    </table:table-template>
    <table:table-template table:name="{9DCAF9ED-07DC-4A11-8D7F-57B35C25682E}">
      <table:first-row table:style-name="a1626" table:paragraph-style-name=""/>
      <table:last-row table:style-name="a1627" table:paragraph-style-name=""/>
      <table:first-column table:style-name="a1628" table:paragraph-style-name=""/>
      <table:last-column table:style-name="a1629" table:paragraph-style-name=""/>
      <table:body table:style-name="a1623" table:paragraph-style-name=""/>
      <table:odd-rows table:style-name="a1625" table:paragraph-style-name=""/>
      <table:odd-columns table:style-name="a1624" table:paragraph-style-name=""/>
    </table:table-template>
    <table:table-template table:name="{FABFCF23-3B69-468F-B69F-88F6DE6A72F2}">
      <table:first-row table:style-name="a1603" table:paragraph-style-name=""/>
      <table:last-row table:style-name="a1604" table:paragraph-style-name=""/>
      <table:first-column table:style-name="a1605" table:paragraph-style-name=""/>
      <table:last-column table:style-name="a1606" table:paragraph-style-name=""/>
      <table:body table:style-name="a1600" table:paragraph-style-name=""/>
      <table:odd-rows table:style-name="a1602" table:paragraph-style-name=""/>
      <table:odd-columns table:style-name="a1601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left" style:tab-stop-distance="1in" fo:margin-left="2.25in" fo:margin-right="0in" fo:text-indent="-0.25in" fo:margin-top="0.13889in" fo:margin-bottom="0.20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5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8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0">
      <style:paragraph-properties fo:line-height="100%" fo:text-align="left" style:tab-stop-distance="1in" fo:margin-left="0.75in" fo:margin-right="0in" fo:text-indent="-0.25in" fo:margin-top="0.13889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2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03">
      <style:paragraph-properties fo:line-height="100%" fo:text-align="left" style:tab-stop-distance="1in" fo:margin-left="1in" fo:margin-right="0in" fo:text-indent="-0.25in" fo:margin-top="0.13889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8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Walbaum Display Light" fo:font-size="0.44444in" style:font-size-asian="0.44444in" style:font-size-complex="0.44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4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Walbaum Display Light" fo:font-size="0.16667in" style:font-size-asian="0.16667in" style:font-size-complex="0.16667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5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7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5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none" draw:stroke="solid" svg:stroke-width="0.01389in" svg:stroke-color="#ba9ca0" svg:stroke-opacity="70%" draw:stroke-linejoin="miter" svg:stroke-linecap="butt"/>
    </style:style>
    <style:style style:family="graphic" style:name="a2">
      <style:graphic-properties draw:fill="none" draw:stroke="solid" svg:stroke-width="0.01389in" svg:stroke-color="#ba9ca0" svg:stroke-opacity="70%" draw:stroke-linejoin="miter" svg:stroke-linecap="butt"/>
    </style:style>
    <style:style style:family="graphic" style:name="a3">
      <style:graphic-properties draw:fill="none" draw:stroke="solid" svg:stroke-width="0.01389in" svg:stroke-color="#ba9ca0" svg:stroke-opacity="70%" draw:stroke-linejoin="miter" svg:stroke-linecap="butt"/>
    </style:style>
    <style:style style:family="graphic" style:name="a4">
      <style:graphic-properties draw:fill="none" draw:stroke="solid" svg:stroke-width="0.01389in" svg:stroke-color="#ba9ca0" svg:stroke-opacity="70%" draw:stroke-linejoin="miter" svg:stroke-linecap="butt"/>
    </style:style>
    <style:style style:family="graphic" style:name="a5">
      <style:graphic-properties draw:fill="none" draw:stroke="solid" svg:stroke-width="0.01389in" svg:stroke-color="#ba9ca0" svg:stroke-opacity="70%" draw:stroke-linejoin="miter" svg:stroke-linecap="butt"/>
    </style:style>
    <style:style style:family="graphic" style:name="a6">
      <style:graphic-properties draw:fill="none" draw:stroke="solid" svg:stroke-width="0.01389in" svg:stroke-color="#ba9ca0" svg:stroke-opacity="70%" draw:stroke-linejoin="miter" svg:stroke-linecap="butt"/>
    </style:style>
    <style:style style:family="graphic" style:name="a7">
      <style:graphic-properties draw:fill="none" draw:stroke="solid" svg:stroke-width="0.01389in" svg:stroke-color="#ba9ca0" svg:stroke-opacity="70%" draw:stroke-linejoin="miter" svg:stroke-linecap="butt"/>
    </style:style>
    <style:style style:family="text" style:name="a520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1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Walbaum Display Light" fo:font-size="0.16667in" style:font-size-asian="0.16667in" style:font-size-complex="0.16667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Walbaum Display Light" fo:font-size="0.16667in" style:font-size-asian="0.16667in" style:font-size-complex="0.16667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9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90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2">
      <style:graphic-properties fo:wrap-option="wrap" fo:padding-top="0.05in" fo:padding-bottom="0.05in" fo:padding-left="0.1in" fo:padding-right="0.1in" draw:textarea-vertical-align="middle" draw:textarea-horizontal-align="center" draw:fill="solid" draw:fill-color="#001e2e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0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3">
      <style:graphic-properties draw:fill="none" draw:stroke="solid" svg:stroke-width="0.01389in" svg:stroke-color="#a57931" svg:stroke-opacity="70%" draw:stroke-linejoin="miter" svg:stroke-linecap="butt" draw:decorative="tru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1">
      <style:paragraph-properties fo:line-height="100%" fo:text-align="left" style:tab-stop-distance="1in" fo:margin-left="2.25in" fo:margin-right="0in" fo:text-indent="-0.25in" fo:margin-top="0.13889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4">
      <style:graphic-properties draw:fill="none" draw:stroke="solid" svg:stroke-width="0.01389in" svg:stroke-color="#a57931" svg:stroke-opacity="70%" draw:stroke-linejoin="miter" svg:stroke-linecap="butt" draw:decorative="tru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5">
      <style:graphic-properties draw:fill="none" draw:stroke="solid" svg:stroke-width="0.01389in" svg:stroke-color="#a57931" svg:stroke-opacity="70%" draw:stroke-linejoin="miter" svg:stroke-linecap="butt" draw:decorative="true"/>
    </style:style>
    <style:style style:family="text" style:name="a806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4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5">
      <style:paragraph-properties fo:line-height="100%" fo:text-align="left" style:tab-stop-distance="1in" fo:margin-left="0in" fo:margin-right="0in" fo:text-indent="0in" fo:margin-top="0.13889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9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6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7">
      <style:paragraph-properties fo:line-height="100%" fo:text-align="left" style:tab-stop-distance="1in" fo:margin-left="0.75in" fo:margin-right="0in" fo:text-indent="-0.25in" fo:margin-top="0.13889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9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1">
      <style:graphic-properties draw:fill="none" draw:stroke="solid" svg:stroke-width="0.01389in" svg:stroke-color="#a57931" svg:stroke-opacity="70%" draw:stroke-linejoin="miter" svg:stroke-linecap="butt" draw:decorative="true"/>
    </style:style>
    <style:style style:family="paragraph" style:name="a5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2">
      <style:graphic-properties draw:fill="none" draw:stroke="solid" svg:stroke-width="0.01389in" svg:stroke-color="#a57931" svg:stroke-opacity="70%" draw:stroke-linejoin="miter" svg:stroke-linecap="butt" draw:decorative="true"/>
    </style:style>
    <style:style style:family="graphic" style:name="a1153">
      <style:graphic-properties draw:fill="none" draw:stroke="solid" svg:stroke-width="0.01389in" svg:stroke-color="#a57931" svg:stroke-opacity="70%" draw:stroke-linejoin="miter" svg:stroke-linecap="butt" draw:decorative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4">
      <style:graphic-properties draw:fill="none" draw:stroke="solid" svg:stroke-width="0.01389in" svg:stroke-color="#a57931" svg:stroke-opacity="70%" draw:stroke-linejoin="miter" svg:stroke-linecap="butt" draw:decorative="true"/>
    </style:style>
    <style:style style:family="paragraph" style:name="a5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5">
      <style:graphic-properties draw:fill="none" draw:stroke="solid" svg:stroke-width="0.01389in" svg:stroke-color="#a57931" svg:stroke-opacity="70%" draw:stroke-linejoin="miter" svg:stroke-linecap="butt" draw:decorative="true"/>
    </style:style>
    <style:style style:family="graphic" style:name="a1156">
      <style:graphic-properties draw:fill="none" draw:stroke="solid" svg:stroke-width="0.01389in" svg:stroke-color="#a57931" svg:stroke-opacity="70%" draw:stroke-linejoin="miter" svg:stroke-linecap="butt" draw:decorative="true"/>
    </style:style>
    <style:style style:family="graphic" style:name="a1157">
      <style:graphic-properties draw:fill="none" draw:stroke="solid" svg:stroke-width="0.01389in" svg:stroke-color="#a57931" svg:stroke-opacity="70%" draw:stroke-linejoin="miter" svg:stroke-linecap="butt" draw:decorative="true"/>
    </style:style>
    <style:style style:family="text" style:name="a1158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Walbaum Display Light" fo:font-size="0.5in" style:font-size-asian="0.5in" style:font-size-complex="0.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50%" fo:text-align="left" style:tab-stop-distance="1in" fo:margin-left="0.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0">
      <style:paragraph-properties fo:line-height="100%" fo:text-align="left" style:tab-stop-distance="1in" fo:margin-left="1.25in" fo:margin-right="0in" fo:text-indent="-0.25in" fo:margin-top="0.13889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50%" fo:text-align="left" style:tab-stop-distance="1in" fo:margin-left="1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2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3">
      <style:paragraph-properties fo:line-height="100%" fo:text-align="left" style:tab-stop-distance="1in" fo:margin-left="1.75in" fo:margin-right="0in" fo:text-indent="-0.25in" fo:margin-top="0.13889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50%" fo:text-align="left" style:tab-stop-distance="1in" fo:margin-left="1.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5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6">
      <style:paragraph-properties fo:line-height="100%" fo:text-align="left" style:tab-stop-distance="1in" fo:margin-left="2.25in" fo:margin-right="0in" fo:text-indent="-0.25in" fo:margin-top="0.13889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9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1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100%" fo:text-align="left" style:tab-stop-distance="1in" fo:margin-left="0.5in" fo:margin-right="0in" fo:text-indent="-0.5in" fo:margin-top="0.13889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5">
      <style:paragraph-properties fo:line-height="100%" fo:text-align="left" style:tab-stop-distance="1in" fo:margin-left="1in" fo:margin-right="0in" fo:text-indent="-0.5in" fo:margin-top="0.13889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7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100%" fo:text-align="left" style:tab-stop-distance="1in" fo:margin-left="1.5in" fo:margin-right="0in" fo:text-indent="-0.5in" fo:margin-top="0.13889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50%" fo:text-align="left" style:tab-stop-distance="1in" fo:margin-left="2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4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1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.3in" fo:padding-bottom="0.05in" fo:padding-left="0.2in" fo:padding-right="0.2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7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4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Walbaum Display Light" fo:font-size="0.16667in" style:font-size-asian="0.16667in" style:font-size-complex="0.16667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7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8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0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71">
      <style:paragraph-properties fo:line-height="100%" fo:text-align="left" style:tab-stop-distance="1in" fo:margin-left="2in" fo:margin-right="0in" fo:text-indent="-0.5in" fo:margin-top="0.13889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6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Walbaum Display Light" fo:font-size="0.44444in" style:font-size-asian="0.44444in" style:font-size-complex="0.44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4">
      <style:paragraph-properties fo:line-height="100%" fo:text-align="left" style:tab-stop-distance="1in" fo:margin-left="2.4375in" fo:margin-right="0in" fo:text-indent="-0.5in" fo:margin-top="0.13889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7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9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2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Walbaum Display Light" fo:font-size="0.16667in" style:font-size-asian="0.16667in" style:font-size-complex="0.16667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3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58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2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0">
      <style:paragraph-properties fo:line-height="100%" fo:text-align="left" style:tab-stop-distance="1in" fo:margin-left="0in" fo:margin-right="0in" fo:text-indent="-0.25in" fo:margin-top="0.13889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2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100%" fo:text-align="left" style:tab-stop-distance="1in" fo:margin-left="0.5in" fo:margin-right="0in" fo:text-indent="-0.25in" fo:margin-top="0.13889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6">
      <style:paragraph-properties fo:line-height="100%" fo:text-align="left" style:tab-stop-distance="1in" fo:margin-left="0.75in" fo:margin-right="0in" fo:text-indent="-0.25in" fo:margin-top="0.13889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8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100%" fo:text-align="left" style:tab-stop-distance="1in" fo:margin-left="1in" fo:margin-right="0in" fo:text-indent="-0.25in" fo:margin-top="0.13889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1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Walbaum Display Light" fo:font-size="0.16667in" style:font-size-asian="0.16667in" style:font-size-complex="0.16667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5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4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7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Walbaum Display Light" fo:font-size="0.16667in" style:font-size-asian="0.16667in" style:font-size-complex="0.16667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4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64">
      <style:graphic-properties draw:fill="none" draw:stroke="solid" svg:stroke-width="0.01389in" svg:stroke-color="#a57931" svg:stroke-opacity="70%" draw:stroke-linejoin="miter" svg:stroke-linecap="butt" draw:decorative="true"/>
    </style:style>
    <style:style style:family="paragraph" style:name="a8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65">
      <style:graphic-properties draw:fill="none" draw:stroke="solid" svg:stroke-width="0.01389in" svg:stroke-color="#a57931" svg:stroke-opacity="70%" draw:stroke-linejoin="miter" svg:stroke-linecap="butt" draw:decorative="true"/>
    </style:style>
    <style:style style:family="presentation" style:name="a8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6">
      <style:graphic-properties draw:fill="none" draw:stroke="solid" svg:stroke-width="0.01389in" svg:stroke-color="#a57931" svg:stroke-opacity="70%" draw:stroke-linejoin="miter" svg:stroke-linecap="butt" draw:decorative="true"/>
    </style:style>
    <style:style style:family="graphic" style:name="a1467">
      <style:graphic-properties draw:fill="none" draw:stroke="solid" svg:stroke-width="0.01389in" svg:stroke-color="#a57931" svg:stroke-opacity="70%" draw:stroke-linejoin="miter" svg:stroke-linecap="butt" draw:decorative="true"/>
    </style:style>
    <style:style style:family="graphic" style:name="a1468">
      <style:graphic-properties draw:fill="none" draw:stroke="solid" svg:stroke-width="0.01389in" svg:stroke-color="#a57931" svg:stroke-opacity="70%" draw:stroke-linejoin="miter" svg:stroke-linecap="butt" draw:decorative="tru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69">
      <style:graphic-properties draw:fill="none" draw:stroke="solid" svg:stroke-width="0.01389in" svg:stroke-color="#a57931" svg:stroke-opacity="70%" draw:stroke-linejoin="miter" svg:stroke-linecap="butt" draw:decorative="true"/>
    </style:style>
    <style:style style:family="paragraph" style:name="a11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72">
      <style:graphic-properties draw:fill="none" draw:stroke="solid" svg:stroke-width="0.01389in" svg:stroke-color="#a57931" svg:stroke-opacity="70%" draw:stroke-linejoin="miter" svg:stroke-linecap="butt" draw:decorative="true"/>
    </style:style>
    <style:style style:family="graphic" style:name="a873">
      <style:graphic-properties draw:fill="none" draw:stroke="solid" svg:stroke-width="0.01389in" svg:stroke-color="#a57931" svg:stroke-opacity="70%" draw:stroke-linejoin="miter" svg:stroke-linecap="butt" draw:decorative="true"/>
    </style:style>
    <style:style style:family="graphic" style:name="a1470">
      <style:graphic-properties draw:fill="none" draw:stroke="solid" svg:stroke-width="0.01389in" svg:stroke-color="#a57931" svg:stroke-opacity="70%" draw:stroke-linejoin="miter" svg:stroke-linecap="butt" draw:decorative="true"/>
    </style:style>
    <style:style style:family="graphic" style:name="a874">
      <style:graphic-properties draw:fill="none" draw:stroke="solid" svg:stroke-width="0.01389in" svg:stroke-color="#a57931" svg:stroke-opacity="70%" draw:stroke-linejoin="miter" svg:stroke-linecap="butt" draw:decorative="true"/>
    </style:style>
    <style:style style:family="text" style:name="a1471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Walbaum Display Light" fo:font-size="0.5in" style:font-size-asian="0.5in" style:font-size-complex="0.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5">
      <style:graphic-properties draw:fill="none" draw:stroke="solid" svg:stroke-width="0.01389in" svg:stroke-color="#a57931" svg:stroke-opacity="70%" draw:stroke-linejoin="miter" svg:stroke-linecap="butt" draw:decorative="true"/>
    </style:style>
    <style:style style:family="paragraph" style:name="a14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4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5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7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479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2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Walbaum Display Light" fo:font-size="0.16667in" style:font-size-asian="0.16667in" style:font-size-complex="0.16667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5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6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5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8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Walbaum Display Light" fo:font-size="0.16667in" style:font-size-asian="0.16667in" style:font-size-complex="0.16667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9">
      <style:graphic-properties fo:wrap-option="wrap" fo:padding-top="0.05in" fo:padding-bottom="0.05in" fo:padding-left="0.1in" fo:padding-right="0.1in" draw:textarea-vertical-align="middle" draw:textarea-horizontal-align="center" draw:fill="solid" draw:fill-color="#001e2e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Walbaum Display Light" fo:font-size="0.16667in" style:font-size-asian="0.16667in" style:font-size-complex="0.16667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20">
      <style:graphic-properties draw:fill="none" draw:stroke="solid" svg:stroke-width="0.01389in" svg:stroke-color="#a57931" svg:stroke-opacity="70%" draw:stroke-linejoin="miter" svg:stroke-linecap="butt" draw:decorative="tru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1">
      <style:graphic-properties draw:fill="none" draw:stroke="solid" svg:stroke-width="0.01389in" svg:stroke-color="#a57931" svg:stroke-opacity="70%" draw:stroke-linejoin="miter" svg:stroke-linecap="butt" draw:decorative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22">
      <style:graphic-properties draw:fill="none" draw:stroke="solid" svg:stroke-width="0.01389in" svg:stroke-color="#a57931" svg:stroke-opacity="70%" draw:stroke-linejoin="miter" svg:stroke-linecap="butt" draw:decorative="true"/>
    </style:style>
    <style:style style:family="text" style:name="a426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3">
      <style:graphic-properties draw:fill="none" draw:stroke="solid" svg:stroke-width="0.01389in" svg:stroke-color="#a57931" svg:stroke-opacity="70%" draw:stroke-linejoin="miter" svg:stroke-linecap="butt" draw:decorative="true"/>
    </style:style>
    <style:style style:family="text" style:name="a427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4">
      <style:graphic-properties draw:fill="none" draw:stroke="solid" svg:stroke-width="0.01389in" svg:stroke-color="#a57931" svg:stroke-opacity="70%" draw:stroke-linejoin="miter" svg:stroke-linecap="butt" draw:decorative="true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5">
      <style:graphic-properties draw:fill="none" draw:stroke="solid" svg:stroke-width="0.01389in" svg:stroke-color="#a57931" svg:stroke-opacity="70%" draw:stroke-linejoin="miter" svg:stroke-linecap="butt" draw:decorative="tru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26">
      <style:graphic-properties draw:fill="none" draw:stroke="solid" svg:stroke-width="0.01389in" svg:stroke-color="#a57931" svg:stroke-opacity="70%" draw:stroke-linejoin="miter" svg:stroke-linecap="butt" draw:decorative="true"/>
    </style:style>
    <style:style style:family="text" style:name="a1027">
      <style:text-properties fo:text-transform="uppercase" fo:color="#93767a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text-transform="uppercase" fo:color="#ba9ca0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1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0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4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1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Walbaum Display Light" fo:font-size="0.83333in" style:font-size-asian="0.83333in" style:font-size-complex="0.8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5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08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6">
      <style:graphic-properties draw:fill="none" draw:stroke="solid" svg:stroke-width="0.01389in" svg:stroke-color="#a57931" svg:stroke-opacity="70%" draw:stroke-linejoin="miter" svg:stroke-linecap="butt" draw:decorative="true"/>
    </style:style>
    <style:style style:family="graphic" style:name="a1307">
      <style:graphic-properties draw:fill="none" draw:stroke="solid" svg:stroke-width="0.01389in" svg:stroke-color="#a57931" svg:stroke-opacity="70%" draw:stroke-linejoin="miter" svg:stroke-linecap="butt" draw:decorative="true"/>
    </style:style>
    <style:style style:family="graphic" style:name="a1308">
      <style:graphic-properties draw:fill="none" draw:stroke="solid" svg:stroke-width="0.01389in" svg:stroke-color="#a57931" svg:stroke-opacity="70%" draw:stroke-linejoin="miter" svg:stroke-linecap="butt" draw:decorative="true"/>
    </style:style>
    <style:style style:family="graphic" style:name="a1309">
      <style:graphic-properties draw:fill="none" draw:stroke="solid" svg:stroke-width="0.01389in" svg:stroke-color="#a57931" svg:stroke-opacity="70%" draw:stroke-linejoin="miter" svg:stroke-linecap="butt" draw:decorative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0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1310">
      <style:graphic-properties draw:fill="none" draw:stroke="solid" svg:stroke-width="0.01389in" svg:stroke-color="#a57931" svg:stroke-opacity="70%" draw:stroke-linejoin="miter" svg:stroke-linecap="butt" draw:decorative="true"/>
    </style:style>
    <style:style style:family="text" style:name="a714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1">
      <style:graphic-properties draw:fill="none" draw:stroke="solid" svg:stroke-width="0.01389in" svg:stroke-color="#a57931" svg:stroke-opacity="70%" draw:stroke-linejoin="miter" svg:stroke-linecap="butt" draw:decorative="true"/>
    </style:style>
    <style:style style:family="graphic" style:name="a1312">
      <style:graphic-properties draw:fill="none" draw:stroke="solid" svg:stroke-width="0.01389in" svg:stroke-color="#a57931" svg:stroke-opacity="70%" draw:stroke-linejoin="miter" svg:stroke-linecap="butt" draw:decorative="true"/>
    </style:style>
    <style:style style:family="text" style:name="a716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3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Walbaum Display Light" fo:font-size="0.5in" style:font-size-asian="0.5in" style:font-size-complex="0.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Walbaum Display Light" fo:font-size="0.16667in" style:font-size-asian="0.16667in" style:font-size-complex="0.16667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6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7">
      <style:paragraph-properties fo:line-height="100%" fo:text-align="left" style:tab-stop-distance="1in" fo:margin-left="0in" fo:margin-right="0in" fo:text-indent="0in" fo:margin-top="0.13889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8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9">
      <style:paragraph-properties fo:line-height="100%" fo:text-align="left" style:tab-stop-distance="1in" fo:margin-left="0.75in" fo:margin-right="0in" fo:text-indent="-0.25in" fo:margin-top="0.13889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3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68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Walbaum Display Light" fo:font-size="0.16667in" style:font-size-asian="0.16667in" style:font-size-complex="0.16667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0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6">
      <style:graphic-properties draw:fill="none" draw:stroke="solid" svg:stroke-width="0.01389in" svg:stroke-color="#a57931" svg:stroke-opacity="70%" draw:stroke-linejoin="miter" svg:stroke-linecap="butt" draw:decorative="true"/>
    </style:style>
    <style:style style:family="graphic" style:name="a1067">
      <style:graphic-properties draw:fill="none" draw:stroke="solid" svg:stroke-width="0.01389in" svg:stroke-color="#a57931" svg:stroke-opacity="70%" draw:stroke-linejoin="miter" svg:stroke-linecap="butt" draw:decorative="true"/>
    </style:style>
    <style:style style:family="graphic" style:name="a1068">
      <style:graphic-properties draw:fill="none" draw:stroke="solid" svg:stroke-width="0.01389in" svg:stroke-color="#a57931" svg:stroke-opacity="70%" draw:stroke-linejoin="miter" svg:stroke-linecap="butt" draw:decorative="true"/>
    </style:style>
    <style:style style:family="graphic" style:name="a1069">
      <style:graphic-properties draw:fill="none" draw:stroke="solid" svg:stroke-width="0.01389in" svg:stroke-color="#a57931" svg:stroke-opacity="70%" draw:stroke-linejoin="miter" svg:stroke-linecap="butt" draw:decorative="true"/>
    </style:style>
    <style:style style:family="paragraph" style:name="a7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2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1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22">
      <style:paragraph-properties fo:line-height="100%" fo:text-align="left" style:tab-stop-distance="1in" fo:margin-left="1.25in" fo:margin-right="0in" fo:text-indent="-0.25in" fo:margin-top="0.13889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4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25">
      <style:paragraph-properties fo:line-height="100%" fo:text-align="left" style:tab-stop-distance="1in" fo:margin-left="1.75in" fo:margin-right="0in" fo:text-indent="-0.25in" fo:margin-top="0.13889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7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8">
      <style:paragraph-properties fo:line-height="100%" fo:text-align="left" style:tab-stop-distance="1in" fo:margin-left="2.25in" fo:margin-right="0in" fo:text-indent="-0.25in" fo:margin-top="0.13889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0">
      <style:graphic-properties draw:fill="none" draw:stroke="solid" svg:stroke-width="0.01389in" svg:stroke-color="#a57931" svg:stroke-opacity="70%" draw:stroke-linejoin="miter" svg:stroke-linecap="butt" draw:decorative="tru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71">
      <style:graphic-properties draw:fill="none" draw:stroke="solid" svg:stroke-width="0.01389in" svg:stroke-color="#a57931" svg:stroke-opacity="70%" draw:stroke-linejoin="miter" svg:stroke-linecap="butt" draw:decorative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2">
      <style:graphic-properties draw:fill="none" draw:stroke="solid" svg:stroke-width="0.01389in" svg:stroke-color="#a57931" svg:stroke-opacity="70%" draw:stroke-linejoin="miter" svg:stroke-linecap="butt" draw:decorative="tru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3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Walbaum Display Light" fo:font-size="0.5in" style:font-size-asian="0.5in" style:font-size-complex="0.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6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00%" fo:text-align="left" style:tab-stop-distance="1in" fo:margin-left="0in" fo:margin-right="0in" fo:text-indent="0in" fo:margin-top="0.13889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8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100%" fo:text-align="left" style:tab-stop-distance="1in" fo:margin-left="0in" fo:margin-right="0in" fo:text-indent="-0.25in" fo:margin-top="0.13889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3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331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2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4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6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9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Walbaum Display Light" fo:font-size="0.16667in" style:font-size-asian="0.16667in" style:font-size-complex="0.16667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2">
      <style:paragraph-properties fo:line-height="100%" fo:text-align="left" style:tab-stop-distance="1in" fo:margin-left="0.5in" fo:margin-right="0in" fo:text-indent="-0.25in" fo:margin-top="0.13889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100%" fo:text-align="left" style:tab-stop-distance="1in" fo:margin-left="0.75in" fo:margin-right="0in" fo:text-indent="-0.25in" fo:margin-top="0.13889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100%" fo:text-align="left" style:tab-stop-distance="1in" fo:margin-left="1in" fo:margin-right="0in" fo:text-indent="-0.25in" fo:margin-top="0.13889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2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3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1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100%" fo:text-align="left" style:tab-stop-distance="1in" fo:margin-left="0in" fo:margin-right="0in" fo:text-indent="0in" fo:margin-top="0.13889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3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100%" fo:text-align="left" style:tab-stop-distance="1in" fo:margin-left="0in" fo:margin-right="0in" fo:text-indent="-0.25in" fo:margin-top="0.13889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100%" fo:text-align="left" style:tab-stop-distance="1in" fo:margin-left="0.5in" fo:margin-right="0in" fo:text-indent="-0.25in" fo:margin-top="0.13889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9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35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drawing-page" style:name="a758">
      <style:drawing-page-properties draw:fill="solid" draw:fill-color="#f1e5d1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9">
      <style:graphic-properties draw:fill="none" draw:stroke="solid" svg:stroke-width="0.01389in" svg:stroke-color="#a57931" svg:stroke-opacity="70%" draw:stroke-linejoin="miter" svg:stroke-linecap="butt" draw:decorative="true"/>
    </style:style>
    <style:style style:family="paragraph" style:name="a13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0">
      <style:graphic-properties draw:fill="none" draw:stroke="solid" svg:stroke-width="0.01389in" svg:stroke-color="#a57931" svg:stroke-opacity="70%" draw:stroke-linejoin="miter" svg:stroke-linecap="butt" draw:decorative="true"/>
    </style:style>
    <style:style style:family="text" style:name="a761">
      <style:text-properties fo:text-transform="uppercase" fo:color="#155767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5">
      <style:paragraph-properties fo:line-height="10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3in" fo:padding-bottom="0.05in" fo:padding-left="0.1in" fo:padding-right="0.3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3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79">
      <style:graphic-properties draw:fill="none" draw:stroke="solid" svg:stroke-width="0.01389in" svg:stroke-color="#a57931" svg:stroke-opacity="70%" draw:stroke-linejoin="miter" svg:stroke-linecap="butt" draw:decorative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0">
      <style:graphic-properties draw:fill="none" draw:stroke="solid" svg:stroke-width="0.01389in" svg:stroke-color="#a57931" svg:stroke-opacity="70%" draw:stroke-linejoin="miter" svg:stroke-linecap="butt" draw:decorative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1">
      <style:graphic-properties draw:fill="none" draw:stroke="solid" svg:stroke-width="0.01389in" svg:stroke-color="#a57931" svg:stroke-opacity="70%" draw:stroke-linejoin="miter" svg:stroke-linecap="butt" draw:decorative="true"/>
    </style:style>
    <style:style style:family="paragraph" style:name="a78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2">
      <style:graphic-properties draw:fill="none" draw:stroke="solid" svg:stroke-width="0.01389in" svg:stroke-color="#a57931" svg:stroke-opacity="70%" draw:stroke-linejoin="miter" svg:stroke-linecap="butt" draw:decorative="true"/>
    </style:style>
    <style:style style:family="graphic" style:name="a1383">
      <style:graphic-properties draw:fill="none" draw:stroke="solid" svg:stroke-width="0.01389in" svg:stroke-color="#a57931" svg:stroke-opacity="70%" draw:stroke-linejoin="miter" svg:stroke-linecap="butt" draw:decorative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4">
      <style:graphic-properties draw:fill="none" draw:stroke="solid" svg:stroke-width="0.01389in" svg:stroke-color="#a57931" svg:stroke-opacity="70%" draw:stroke-linejoin="miter" svg:stroke-linecap="butt" draw:decorative="true"/>
    </style:style>
    <style:style style:family="paragraph" style:name="a78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5">
      <style:graphic-properties draw:fill="none" draw:stroke="solid" svg:stroke-width="0.01389in" svg:stroke-color="#a57931" svg:stroke-opacity="70%" draw:stroke-linejoin="miter" svg:stroke-linecap="butt" draw:decorative="true"/>
    </style:style>
    <style:style style:family="text" style:name="a1386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Walbaum Display Light" fo:font-size="0.5in" style:font-size-asian="0.5in" style:font-size-complex="0.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9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1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2">
      <style:paragraph-properties fo:line-height="100%" fo:text-align="left" style:tab-stop-distance="1in" fo:margin-left="0.75in" fo:margin-right="0in" fo:text-indent="-0.25in" fo:margin-top="0.13889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4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395">
      <style:paragraph-properties fo:line-height="100%" fo:text-align="left" style:tab-stop-distance="1in" fo:margin-left="1.25in" fo:margin-right="0in" fo:text-indent="-0.25in" fo:margin-top="0.13889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7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100%" fo:text-align="left" style:tab-stop-distance="1in" fo:margin-left="1.75in" fo:margin-right="0in" fo:text-indent="-0.25in" fo:margin-top="0.13889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9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Univers Condensed Light" fo:font-size="0.27778in" style:font-size-asian="0.27778in" style:font-size-complex="0.27778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3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0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1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2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Univers Condensed Light" fo:font-size="0.27778in" style:font-size-asian="0.27778in" style:font-size-complex="0.27778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4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61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5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Walbaum Display Light" fo:font-size="0.16667in" style:font-size-asian="0.16667in" style:font-size-complex="0.16667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8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1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8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37">
      <style:graphic-properties draw:fill="none" draw:stroke="solid" svg:stroke-width="0.01389in" svg:stroke-color="#a57931" svg:stroke-opacity="70%" draw:stroke-linejoin="miter" svg:stroke-linecap="butt" draw:decorative="true"/>
    </style:style>
    <style:style style:family="graphic" style:name="a1238">
      <style:graphic-properties draw:fill="none" draw:stroke="solid" svg:stroke-width="0.01389in" svg:stroke-color="#a57931" svg:stroke-opacity="70%" draw:stroke-linejoin="miter" svg:stroke-linecap="butt" draw:decorative="true"/>
    </style:style>
    <style:style style:family="graphic" style:name="a1239">
      <style:graphic-properties draw:fill="none" draw:stroke="solid" svg:stroke-width="0.01389in" svg:stroke-color="#a57931" svg:stroke-opacity="70%" draw:stroke-linejoin="miter" svg:stroke-linecap="butt" draw:decorative="true"/>
    </style:style>
    <style:style style:family="paragraph" style:name="a3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0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Walbaum Display Light" fo:font-size="0.5in" style:font-size-asian="0.5in" style:font-size-complex="0.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3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4">
      <style:paragraph-properties fo:line-height="100%" fo:text-align="left" style:tab-stop-distance="1in" fo:margin-left="0in" fo:margin-right="0in" fo:text-indent="0in" fo:margin-top="0.13889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5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246">
      <style:paragraph-properties fo:line-height="100%" fo:text-align="left" style:tab-stop-distance="1in" fo:margin-left="0.75in" fo:margin-right="0in" fo:text-indent="-0.25in" fo:margin-top="0.13889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8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100%" fo:text-align="left" style:tab-stop-distance="1in" fo:margin-left="1.25in" fo:margin-right="0in" fo:text-indent="-0.25in" fo:margin-top="0.13889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1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Walbaum Display Light" fo:font-size="0.16667in" style:font-size-asian="0.16667in" style:font-size-complex="0.16667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2">
      <style:paragraph-properties fo:line-height="100%" fo:text-align="left" style:tab-stop-distance="1in" fo:margin-left="1.75in" fo:margin-right="0in" fo:text-indent="-0.25in" fo:margin-top="0.13889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4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100%" fo:text-align="left" style:tab-stop-distance="1in" fo:margin-left="2.25in" fo:margin-right="0in" fo:text-indent="-0.25in" fo:margin-top="0.13889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8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51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15">
      <style:graphic-properties draw:fill="none" draw:stroke="solid" svg:stroke-width="0.01389in" svg:stroke-color="#a57931" svg:stroke-opacity="70%" draw:stroke-linejoin="miter" svg:stroke-linecap="butt" draw:decorative="true"/>
    </style:style>
    <style:style style:family="presentation" style:name="a1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16">
      <style:graphic-properties draw:fill="none" draw:stroke="solid" svg:stroke-width="0.01389in" svg:stroke-color="#a57931" svg:stroke-opacity="70%" draw:stroke-linejoin="miter" svg:stroke-linecap="butt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7">
      <style:graphic-properties draw:fill="none" draw:stroke="solid" svg:stroke-width="0.01389in" svg:stroke-color="#a57931" svg:stroke-opacity="70%" draw:stroke-linejoin="miter" svg:stroke-linecap="butt" draw:decorative="true"/>
    </style:style>
    <style:style style:family="paragraph" style:name="a15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Walbaum Display Light" fo:font-size="0.16667in" style:font-size-asian="0.16667in" style:font-size-complex="0.16667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0">
      <style:graphic-properties fo:wrap-option="wrap" fo:padding-top="0.3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1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6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Walbaum Display Light" fo:font-size="0.16667in" style:font-size-asian="0.16667in" style:font-size-complex="0.16667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9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1">
      <style:text-properties fo:text-transform="uppercase" fo:color="#ba9ca0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24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21">
      <style:drawing-page-properties draw:fill="solid" draw:fill-color="#f1e5d1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925">
      <style:paragraph-properties fo:line-height="10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2">
      <style:graphic-properties draw:fill="none" draw:stroke="solid" svg:stroke-width="0.01389in" svg:stroke-color="#a57931" svg:stroke-opacity="70%" draw:stroke-linejoin="miter" svg:stroke-linecap="butt" draw:decorative="true"/>
    </style:style>
    <style:style style:family="presentation" style:name="a926">
      <style:graphic-properties fo:wrap-option="wrap" fo:padding-top="0.3in" fo:padding-bottom="0.05in" fo:padding-left="0.1in" fo:padding-right="0.3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23">
      <style:graphic-properties draw:fill="none" draw:stroke="solid" svg:stroke-width="0.01389in" svg:stroke-color="#a57931" svg:stroke-opacity="70%" draw:stroke-linejoin="miter" svg:stroke-linecap="butt" draw:decorative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24">
      <style:graphic-properties draw:fill="none" draw:stroke="solid" svg:stroke-width="0.01389in" svg:stroke-color="#a57931" svg:stroke-opacity="70%" draw:stroke-linejoin="miter" svg:stroke-linecap="butt" draw:decorative="true"/>
    </style:style>
    <style:style style:family="paragraph" style:name="a9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5">
      <style:graphic-properties draw:fill="none" draw:stroke="solid" svg:stroke-width="0.01389in" svg:stroke-color="#a57931" svg:stroke-opacity="70%" draw:stroke-linejoin="miter" svg:stroke-linecap="butt" draw:decorative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6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8">
      <style:graphic-properties fo:wrap-option="wrap" fo:padding-top="0.3in" fo:padding-bottom="0.05in" fo:padding-left="0.3in" fo:padding-right="0.1in" draw:textarea-vertical-align="top" draw:textarea-horizontal-align="left" draw:fill="solid" draw:fill-color="#001e2e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9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6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0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5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 Ligh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8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8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 Ligh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1">
      <style:paragraph-properties fo:line-height="100%" fo:text-align="left" style:tab-stop-distance="1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 Ligh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4">
      <style:paragraph-properties fo:line-height="100%" fo:text-align="left" style:tab-stop-distance="1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9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29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55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5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Walbaum Display Light" fo:font-size="0.16667in" style:font-size-asian="0.16667in" style:font-size-complex="0.16667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Walbaum Display Light" fo:font-size="0.91667in" style:font-size-asian="0.91667in" style:font-size-complex="0.91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Walbaum Display Light" fo:font-size="0.91667in" style:font-size-asian="0.91667in" style:font-size-complex="0.91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9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60">
      <style:graphic-properties draw:fill="none" draw:stroke="solid" svg:stroke-width="0.01389in" svg:stroke-color="#a57931" svg:stroke-opacity="70%" draw:stroke-linejoin="miter" svg:stroke-linecap="butt" draw:decorative="true"/>
    </style:style>
    <style:style style:family="graphic" style:name="a961">
      <style:graphic-properties draw:fill="none" draw:stroke="solid" svg:stroke-width="0.01389in" svg:stroke-color="#a57931" svg:stroke-opacity="70%" draw:stroke-linejoin="miter" svg:stroke-linecap="butt" draw:decorative="true"/>
    </style:style>
    <style:style style:family="text" style:name="a962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Walbaum Display Light" fo:font-size="0.5in" style:font-size-asian="0.5in" style:font-size-complex="0.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6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7">
      <style:graphic-properties fo:wrap-option="wrap" fo:padding-top="0.3in" fo:padding-bottom="0.05in" fo:padding-left="0.2in" fo:padding-right="0.2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left" style:tab-stop-distance="1in" fo:margin-left="0.25in" fo:margin-right="0in" fo:text-indent="-0.25in" fo:margin-top="0.13889in" fo:margin-bottom="0.20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Walbaum Display Light" fo:font-size="0.16667in" style:font-size-asian="0.16667in" style:font-size-complex="0.16667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1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fo:text-align="left" style:tab-stop-distance="1in" fo:margin-left="0.75in" fo:margin-right="0in" fo:text-indent="-0.25in" fo:margin-top="0.13889in" fo:margin-bottom="0.20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4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left" style:tab-stop-distance="1in" fo:margin-left="1.25in" fo:margin-right="0in" fo:text-indent="-0.25in" fo:margin-top="0.13889in" fo:margin-bottom="0.20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7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978">
      <style:paragraph-properties fo:line-height="100%" fo:text-align="left" style:tab-stop-distance="1in" fo:margin-left="1.75in" fo:margin-right="0in" fo:text-indent="-0.25in" fo:margin-top="0.13889in" fo:margin-bottom="0.20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2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2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2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7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0.75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7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72">
      <text:list-level-style-number text:level="1" style:num-format="a" style:num-letter-sync="true" style:num-suffix=")" style:num-list-format-name="">
        <style:list-level-properties text:space-before="0in" text:min-label-width="0.5in"/>
        <style:text-properties fo:font-family="Walbaum Display Light" fo:font-size="80%"/>
      </text:list-level-style-number>
      <text:list-level-style-number text:level="2" style:num-format="a" style:num-letter-sync="true" style:num-suffix=")" style:num-list-format-name="">
        <style:list-level-properties text:space-before="0.5in" text:min-label-width="0.5in"/>
        <style:text-properties fo:font-family="Walbaum Display Light" fo:font-size="80%"/>
      </text:list-level-style-number>
      <text:list-level-style-number text:level="3" style:num-format="a" style:num-letter-sync="true" style:num-suffix=")" style:num-list-format-name="">
        <style:list-level-properties text:space-before="1in" text:min-label-width="0.5in"/>
        <style:text-properties fo:font-family="Walbaum Display Light" fo:font-size="80%"/>
      </text:list-level-style-number>
      <text:list-level-style-number text:level="4" style:num-format="a" style:num-letter-sync="true" style:num-suffix=")" style:num-list-format-name="">
        <style:list-level-properties text:space-before="1.5in" text:min-label-width="0.5in"/>
        <style:text-properties fo:font-family="Walbaum Display Light" fo:font-size="80%"/>
      </text:list-level-style-number>
      <text:list-level-style-number text:level="5" style:num-format="a" style:num-letter-sync="true" style:num-suffix=")" style:num-list-format-name="">
        <style:list-level-properties text:space-before="1.9375in" text:min-label-width="0.5in"/>
        <style:text-properties fo:font-family="Walbaum Display Light" fo:font-size="80%"/>
      </text:list-level-style-number>
      <text:list-level-style-number text:level="6" style:num-format="a" style:num-letter-sync="true" style:num-suffix=")" style:num-list-format-name="">
        <style:list-level-properties text:space-before="2.25in" text:min-label-width="0.5in"/>
        <style:text-properties fo:font-family="Walbaum Display Light" fo:font-size="80%"/>
      </text:list-level-style-number>
      <text:list-level-style-number text:level="7" style:num-format="a" style:num-letter-sync="true" style:num-suffix=")" style:num-list-format-name="">
        <style:list-level-properties text:space-before="2.75in" text:min-label-width="0.5in"/>
        <style:text-properties fo:font-family="Walbaum Display Light" fo:font-size="80%"/>
      </text:list-level-style-number>
      <text:list-level-style-number text:level="8" style:num-format="a" style:num-letter-sync="true" style:num-suffix=")" style:num-list-format-name="">
        <style:list-level-properties text:space-before="3.25in" text:min-label-width="0.5in"/>
        <style:text-properties fo:font-family="Walbaum Display Light" fo:font-size="80%"/>
      </text:list-level-style-number>
      <text:list-level-style-number text:level="9" style:num-format="a" style:num-letter-sync="true" style:num-suffix=")" style:num-list-format-name="">
        <style:list-level-properties text:space-before="3.75in" text:min-label-width="0.5in"/>
        <style:text-properties fo:font-family="Walbaum Display Light" fo:font-size="80%"/>
      </text:list-level-style-number>
    </text:list-style>
    <text:list-style style:name="a1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0.75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7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75">
      <text:list-level-style-number text:level="1" style:num-format="i" style:num-suffix="." style:num-list-format-name="">
        <style:list-level-properties text:space-before="0in" text:min-label-width="0.5in"/>
        <style:text-properties fo:font-family="Walbaum Display Light" fo:font-size="80%"/>
      </text:list-level-style-number>
      <text:list-level-style-number text:level="2" style:num-format="i" style:num-suffix="." style:num-list-format-name="">
        <style:list-level-properties text:space-before="0.5in" text:min-label-width="0.5in"/>
        <style:text-properties fo:font-family="Walbaum Display Light" fo:font-size="80%"/>
      </text:list-level-style-number>
      <text:list-level-style-number text:level="3" style:num-format="i" style:num-suffix="." style:num-list-format-name="">
        <style:list-level-properties text:space-before="1in" text:min-label-width="0.5in"/>
        <style:text-properties fo:font-family="Walbaum Display Light" fo:font-size="80%"/>
      </text:list-level-style-number>
      <text:list-level-style-number text:level="4" style:num-format="i" style:num-suffix="." style:num-list-format-name="">
        <style:list-level-properties text:space-before="1.5in" text:min-label-width="0.5in"/>
        <style:text-properties fo:font-family="Walbaum Display Light" fo:font-size="80%"/>
      </text:list-level-style-number>
      <text:list-level-style-number text:level="5" style:num-format="i" style:num-suffix="." style:num-list-format-name="">
        <style:list-level-properties text:space-before="1.9375in" text:min-label-width="0.5in"/>
        <style:text-properties fo:font-family="Walbaum Display Light" fo:font-size="80%"/>
      </text:list-level-style-number>
      <text:list-level-style-number text:level="6" style:num-format="i" style:num-suffix="." style:num-list-format-name="">
        <style:list-level-properties text:space-before="2.25in" text:min-label-width="0.5in"/>
        <style:text-properties fo:font-family="Walbaum Display Light" fo:font-size="80%"/>
      </text:list-level-style-number>
      <text:list-level-style-number text:level="7" style:num-format="i" style:num-suffix="." style:num-list-format-name="">
        <style:list-level-properties text:space-before="2.75in" text:min-label-width="0.5in"/>
        <style:text-properties fo:font-family="Walbaum Display Light" fo:font-size="80%"/>
      </text:list-level-style-number>
      <text:list-level-style-number text:level="8" style:num-format="i" style:num-suffix="." style:num-list-format-name="">
        <style:list-level-properties text:space-before="3.25in" text:min-label-width="0.5in"/>
        <style:text-properties fo:font-family="Walbaum Display Light" fo:font-size="80%"/>
      </text:list-level-style-number>
      <text:list-level-style-number text:level="9" style:num-format="i" style:num-suffix="." style:num-list-format-name="">
        <style:list-level-properties text:space-before="3.75in" text:min-label-width="0.5in"/>
        <style:text-properties fo:font-family="Walbaum Display Light" fo:font-size="80%"/>
      </text:list-level-style-number>
    </text:list-style>
    <text:list-style style:name="a15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2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5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6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0.75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4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0.75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5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0.75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5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0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4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4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0.75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7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8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9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2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9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2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3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0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0.75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3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0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0.75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3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3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0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0.75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7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1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0.75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7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5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58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2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3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0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0.75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4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1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0.75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4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5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5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9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3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3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8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4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8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3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3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7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3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3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7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3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0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0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4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63">
      <text:list-level-style-number text:level="1" style:num-format="1" style:num-suffix="." style:num-list-format-name="">
        <style:list-level-properties text:space-before="0in" text:min-label-width="0.5in"/>
        <style:text-properties fo:font-family="Walbaum Display Light" fo:font-size="80%"/>
      </text:list-level-style-number>
      <text:list-level-style-number text:level="2" style:num-format="1" style:num-suffix="." style:num-list-format-name="">
        <style:list-level-properties text:space-before="0.5in" text:min-label-width="0.5in"/>
        <style:text-properties fo:font-family="Walbaum Display Light" fo:font-size="80%"/>
      </text:list-level-style-number>
      <text:list-level-style-number text:level="3" style:num-format="1" style:num-suffix="." style:num-list-format-name="">
        <style:list-level-properties text:space-before="1in" text:min-label-width="0.5in"/>
        <style:text-properties fo:font-family="Walbaum Display Light" fo:font-size="80%"/>
      </text:list-level-style-number>
      <text:list-level-style-number text:level="4" style:num-format="1" style:num-suffix="." style:num-list-format-name="">
        <style:list-level-properties text:space-before="1.5in" text:min-label-width="0.5in"/>
        <style:text-properties fo:font-family="Walbaum Display Light" fo:font-size="80%"/>
      </text:list-level-style-number>
      <text:list-level-style-number text:level="5" style:num-format="1" style:num-suffix="." style:num-list-format-name="">
        <style:list-level-properties text:space-before="1.9375in" text:min-label-width="0.5in"/>
        <style:text-properties fo:font-family="Walbaum Display Light" fo:font-size="80%"/>
      </text:list-level-style-number>
      <text:list-level-style-number text:level="6" style:num-format="1" style:num-suffix="." style:num-list-format-name="">
        <style:list-level-properties text:space-before="2.25in" text:min-label-width="0.5in"/>
        <style:text-properties fo:font-family="Walbaum Display Light" fo:font-size="80%"/>
      </text:list-level-style-number>
      <text:list-level-style-number text:level="7" style:num-format="1" style:num-suffix="." style:num-list-format-name="">
        <style:list-level-properties text:space-before="2.75in" text:min-label-width="0.5in"/>
        <style:text-properties fo:font-family="Walbaum Display Light" fo:font-size="80%"/>
      </text:list-level-style-number>
      <text:list-level-style-number text:level="8" style:num-format="1" style:num-suffix="." style:num-list-format-name="">
        <style:list-level-properties text:space-before="3.25in" text:min-label-width="0.5in"/>
        <style:text-properties fo:font-family="Walbaum Display Light" fo:font-size="80%"/>
      </text:list-level-style-number>
      <text:list-level-style-number text:level="9" style:num-format="1" style:num-suffix="." style:num-list-format-name="">
        <style:list-level-properties text:space-before="3.75in" text:min-label-width="0.5in"/>
        <style:text-properties fo:font-family="Walbaum Display Light" fo:font-size="80%"/>
      </text:list-level-style-number>
    </text:list-style>
    <text:list-style style:name="a1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8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5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66">
      <text:list-level-style-number text:level="1" style:num-format="a" style:num-letter-sync="true" style:num-suffix="." style:num-list-format-name="">
        <style:list-level-properties text:space-before="0in" text:min-label-width="0.5in"/>
        <style:text-properties fo:font-family="Walbaum Display Light" fo:font-size="80%"/>
      </text:list-level-style-number>
      <text:list-level-style-number text:level="2" style:num-format="a" style:num-letter-sync="true" style:num-suffix="." style:num-list-format-name="">
        <style:list-level-properties text:space-before="0.5in" text:min-label-width="0.5in"/>
        <style:text-properties fo:font-family="Walbaum Display Light" fo:font-size="80%"/>
      </text:list-level-style-number>
      <text:list-level-style-number text:level="3" style:num-format="a" style:num-letter-sync="true" style:num-suffix="." style:num-list-format-name="">
        <style:list-level-properties text:space-before="1in" text:min-label-width="0.5in"/>
        <style:text-properties fo:font-family="Walbaum Display Light" fo:font-size="80%"/>
      </text:list-level-style-number>
      <text:list-level-style-number text:level="4" style:num-format="a" style:num-letter-sync="true" style:num-suffix="." style:num-list-format-name="">
        <style:list-level-properties text:space-before="1.5in" text:min-label-width="0.5in"/>
        <style:text-properties fo:font-family="Walbaum Display Light" fo:font-size="80%"/>
      </text:list-level-style-number>
      <text:list-level-style-number text:level="5" style:num-format="a" style:num-letter-sync="true" style:num-suffix="." style:num-list-format-name="">
        <style:list-level-properties text:space-before="1.9375in" text:min-label-width="0.5in"/>
        <style:text-properties fo:font-family="Walbaum Display Light" fo:font-size="80%"/>
      </text:list-level-style-number>
      <text:list-level-style-number text:level="6" style:num-format="a" style:num-letter-sync="true" style:num-suffix="." style:num-list-format-name="">
        <style:list-level-properties text:space-before="2.25in" text:min-label-width="0.5in"/>
        <style:text-properties fo:font-family="Walbaum Display Light" fo:font-size="80%"/>
      </text:list-level-style-number>
      <text:list-level-style-number text:level="7" style:num-format="a" style:num-letter-sync="true" style:num-suffix="." style:num-list-format-name="">
        <style:list-level-properties text:space-before="2.75in" text:min-label-width="0.5in"/>
        <style:text-properties fo:font-family="Walbaum Display Light" fo:font-size="80%"/>
      </text:list-level-style-number>
      <text:list-level-style-number text:level="8" style:num-format="a" style:num-letter-sync="true" style:num-suffix="." style:num-list-format-name="">
        <style:list-level-properties text:space-before="3.25in" text:min-label-width="0.5in"/>
        <style:text-properties fo:font-family="Walbaum Display Light" fo:font-size="80%"/>
      </text:list-level-style-number>
      <text:list-level-style-number text:level="9" style:num-format="a" style:num-letter-sync="true" style:num-suffix="." style:num-list-format-name="">
        <style:list-level-properties text:space-before="3.75in" text:min-label-width="0.5in"/>
        <style:text-properties fo:font-family="Walbaum Display Light" fo:font-size="80%"/>
      </text:list-level-style-number>
    </text:list-style>
    <text:list-style style:name="a1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5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69">
      <text:list-level-style-number text:level="1" style:num-format="1" style:num-suffix=")" style:num-list-format-name="">
        <style:list-level-properties text:space-before="0in" text:min-label-width="0.5in"/>
        <style:text-properties fo:font-family="Walbaum Display Light" fo:font-size="80%"/>
      </text:list-level-style-number>
      <text:list-level-style-number text:level="2" style:num-format="1" style:num-suffix=")" style:num-list-format-name="">
        <style:list-level-properties text:space-before="0.5in" text:min-label-width="0.5in"/>
        <style:text-properties fo:font-family="Walbaum Display Light" fo:font-size="80%"/>
      </text:list-level-style-number>
      <text:list-level-style-number text:level="3" style:num-format="1" style:num-suffix=")" style:num-list-format-name="">
        <style:list-level-properties text:space-before="1in" text:min-label-width="0.5in"/>
        <style:text-properties fo:font-family="Walbaum Display Light" fo:font-size="80%"/>
      </text:list-level-style-number>
      <text:list-level-style-number text:level="4" style:num-format="1" style:num-suffix=")" style:num-list-format-name="">
        <style:list-level-properties text:space-before="1.5in" text:min-label-width="0.5in"/>
        <style:text-properties fo:font-family="Walbaum Display Light" fo:font-size="80%"/>
      </text:list-level-style-number>
      <text:list-level-style-number text:level="5" style:num-format="1" style:num-suffix=")" style:num-list-format-name="">
        <style:list-level-properties text:space-before="1.9375in" text:min-label-width="0.5in"/>
        <style:text-properties fo:font-family="Walbaum Display Light" fo:font-size="80%"/>
      </text:list-level-style-number>
      <text:list-level-style-number text:level="6" style:num-format="1" style:num-suffix=")" style:num-list-format-name="">
        <style:list-level-properties text:space-before="2.25in" text:min-label-width="0.5in"/>
        <style:text-properties fo:font-family="Walbaum Display Light" fo:font-size="80%"/>
      </text:list-level-style-number>
      <text:list-level-style-number text:level="7" style:num-format="1" style:num-suffix=")" style:num-list-format-name="">
        <style:list-level-properties text:space-before="2.75in" text:min-label-width="0.5in"/>
        <style:text-properties fo:font-family="Walbaum Display Light" fo:font-size="80%"/>
      </text:list-level-style-number>
      <text:list-level-style-number text:level="8" style:num-format="1" style:num-suffix=")" style:num-list-format-name="">
        <style:list-level-properties text:space-before="3.25in" text:min-label-width="0.5in"/>
        <style:text-properties fo:font-family="Walbaum Display Light" fo:font-size="80%"/>
      </text:list-level-style-number>
      <text:list-level-style-number text:level="9" style:num-format="1" style:num-suffix=")" style:num-list-format-name="">
        <style:list-level-properties text:space-before="3.75in" text:min-label-width="0.5in"/>
        <style:text-properties fo:font-family="Walbaum Display Light" fo:font-size="80%"/>
      </text:list-level-style-number>
    </text:list-style>
    <text:list-style style:name="a15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number:date-style xmlns:number="urn:oasis:names:tc:opendocument:xmlns:datastyle:1.0" style:name="a73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8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1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6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3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0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5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3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5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4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AngleLinesVTI" style:page-layout-name="pageLayout1" draw:style-name="a0">
      <draw:connector draw:type="line" svg:x1="3.41177in" svg:y1="0in" svg:x2="0in" svg:y2="0.75in" draw:id="id0" draw:style-name="a1" draw:name="Straight Connector 20">
        <svg:title/>
        <svg:desc/>
      </draw:connector>
      <draw:connector draw:type="line" svg:x1="0.98837in" svg:y1="0in" svg:x2="0in" svg:y2="7.15625in" draw:id="id1" draw:style-name="a2" draw:name="Straight Connector 21">
        <svg:title/>
        <svg:desc/>
      </draw:connector>
      <draw:connector draw:type="line" svg:x1="6.82813in" svg:y1="7.5in" svg:x2="-0.04688in" svg:y2="6.33333in" draw:id="id2" draw:style-name="a3" draw:name="Straight Connector 22">
        <svg:title/>
        <svg:desc/>
      </draw:connector>
      <draw:connector draw:type="line" svg:x1="13.33333in" svg:y1="6.39583in" svg:x2="9.25521in" svg:y2="7.5in" draw:id="id3" draw:style-name="a4" draw:name="Straight Connector 23">
        <svg:title/>
        <svg:desc/>
      </draw:connector>
      <draw:connector draw:type="line" svg:x1="13.33333in" svg:y1="1.80208in" svg:x2="12.62375in" svg:y2="7.5in" draw:id="id4" draw:style-name="a5" draw:name="Straight Connector 24">
        <svg:title/>
        <svg:desc/>
      </draw:connector>
      <draw:connector draw:type="line" svg:x1="13.33333in" svg:y1="4.65698in" svg:x2="11.79085in" svg:y2="0in" draw:id="id5" draw:style-name="a6" draw:name="Straight Connector 25">
        <svg:title/>
        <svg:desc/>
      </draw:connector>
      <draw:connector draw:type="line" svg:x1="13.33333in" svg:y1="1.01401in" svg:x2="7.14063in" svg:y2="-0.00521in" draw:id="id6" draw:style-name="a7" draw:name="Straight Connector 26">
        <svg:title/>
        <svg:desc/>
      </draw:connector>
      <draw:frame draw:id="id7" presentation:style-name="a11" draw:name="Title Placeholder 1" svg:x="1.25in" svg:y="0.58333in" svg:width="10.83333in" svg:height="1.51154in" presentation:class="title" presentation:placeholder="false">
        <draw:text-box>
          <text:p text:style-name="a10" text:class-names="" text:cond-style-name=""><text:span text:style-name="a8" text:class-names="">Click to edit Master title style</text:span><text:span text:style-name="a9" text:class-names=""/></text:p>
        </draw:text-box>
        <svg:title/>
        <svg:desc/>
      </draw:frame>
      <draw:frame draw:id="id8" presentation:style-name="a28" draw:name="Text Placeholder 2" svg:x="1.25in" svg:y="2.19767in" svg:width="10.83333in" svg:height="4.40116in" presentation:class="outline" presentation:placeholder="false">
        <draw:text-box>
          <text:list text:style-name="a14">
            <text:list-item>
              <text:p text:style-name="a13" text:class-names="" text:cond-style-name=""><text:span text:style-name="a12" text:class-names="">Click to edit Master text styles</text:span></text:p>
            </text:list-item>
          </text:list>
          <text:list text:style-name="a17">
            <text:list-item>
              <text:list text:style-name="a17">
                <text:list-item>
                  <text:p text:style-name="a16" text:class-names="" text:cond-style-name=""><text:span text:style-name="a15" text:class-names="">Second level</text:span></text:p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p text:style-name="a19" text:class-names="" text:cond-style-name=""><text:span text:style-name="a18" text:class-names="">Third level</text:span></text:p>
                    </text:list-item>
                  </text:list>
                </text:list-item>
              </text:list>
            </text:list-item>
          </text:list>
          <text:list text:style-name="a23">
            <text:list-item>
              <text:list text:style-name="a23">
                <text:list-item>
                  <text:list text:style-name="a23">
                    <text:list-item>
                      <text:list text:style-name="a23">
                        <text:list-item>
                          <text:p text:style-name="a22" text:class-names="" text:cond-style-name=""><text:span text:style-name="a2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">
            <text:list-item>
              <text:list text:style-name="a27">
                <text:list-item>
                  <text:list text:style-name="a27">
                    <text:list-item>
                      <text:list text:style-name="a27">
                        <text:list-item>
                          <text:list text:style-name="a27">
                            <text:list-item>
                              <text:p text:style-name="a26" text:class-names="" text:cond-style-name=""><text:span text:style-name="a24" text:class-names="">Fifth level</text:span><text:span text:style-name="a2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" presentation:style-name="a33" draw:name="Date Placeholder 3" svg:x="8.02395in" svg:y="6.9979in" svg:width="4.58651in" svg:height="0.39931in" presentation:class="date-time" presentation:placeholder="false">
        <draw:text-box>
          <text:p text:style-name="a32" text:class-names="" text:cond-style-name=""><text:span text:style-name="a29" text:class-names=""><text:date text:fixed="false" style:data-style-name="a30">3/21/2026</text:date></text:span><text:span text:style-name="a31" text:class-names=""/></text:p>
        </draw:text-box>
        <svg:title/>
        <svg:desc/>
      </draw:frame>
      <draw:frame draw:id="id10" presentation:style-name="a36" draw:name="Footer Placeholder 4" svg:x="0.16889in" svg:y="6.9979in" svg:width="4.91832in" svg:height="0.39931in" presentation:class="footer" presentation:placeholder="false">
        <draw:text-box>
          <text:p text:style-name="a35" text:class-names="" text:cond-style-name=""><text:span text:style-name="a34" text:class-names=""/></text:p>
        </draw:text-box>
        <svg:title/>
        <svg:desc/>
      </draw:frame>
      <draw:frame draw:id="id11" presentation:style-name="a40" draw:name="Slide Number Placeholder 5" svg:x="12.68862in" svg:y="6.9979in" svg:width="0.51497in" svg:height="0.39931in" presentation:class="page-number" presentation:placeholder="false">
        <draw:text-box>
          <text:p text:style-name="a39" text:class-names="" text:cond-style-name=""><text:span text:style-name="a37" text:class-names=""><text:page-number style:num-format="1" text:fixed="false">‹N›</text:page-number></text:span><text:span text:style-name="a38" text:class-names=""/></text:p>
        </draw:text-box>
        <svg:title/>
        <svg:desc/>
      </draw:frame>
      <presentation:notes style:page-layout-name="pageLayout2" draw:style-name="a72">
        <draw:frame draw:id="id12" presentation:style-name="a43" draw:name="Header Placeholder 1" svg:x="0in" svg:y="0in" svg:width="3.25in" svg:height="0.50174in" presentation:class="header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3" presentation:style-name="a48" draw:name="Date Placeholder 2" svg:x="4.24826in" svg:y="0in" svg:width="3.25in" svg:height="0.50174in" presentation:class="date-time" presentation:placeholder="false">
          <draw:text-box>
            <text:p text:style-name="a47" text:class-names="" text:cond-style-name=""><text:span text:style-name="a44" text:class-names=""><text:date text:fixed="false" style:data-style-name="a45">3/21/2026</text:date></text:span><text:span text:style-name="a46" text:class-names=""/></text:p>
          </draw:text-box>
          <svg:title/>
          <svg:desc/>
        </draw:frame>
        <draw:page-thumbnail svg:x="0.75in" svg:y="1.25in" svg:width="6in" svg:height="3.375in" presentation:class="page" draw:id="id14" presentation:style-name="a49" draw:name="Slide Image Placeholder 3">
          <svg:title/>
          <svg:desc/>
        </draw:page-thumbnail>
        <draw:frame draw:id="id15" presentation:style-name="a64" draw:name="Notes Placeholder 4" svg:x="0.75in" svg:y="4.8125in" svg:width="6in" svg:height="3.9375in" presentation:class="notes" presentation:placeholder="false">
          <draw:text-box>
            <text:p text:style-name="a51" text:class-names="" text:cond-style-name=""><text:span text:style-name="a50" text:class-names="">Click to edit Master text styles</text:span></text:p>
            <text:list text:style-name="a54">
              <text:list-item>
                <text:list text:style-name="a54">
                  <text:list-item>
                    <text:p text:style-name="a53" text:class-names="" text:cond-style-name=""><text:span text:style-name="a52" text:class-names="">Second level</text:span></text:p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p text:style-name="a56" text:class-names="" text:cond-style-name=""><text:span text:style-name="a5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0">
              <text:list-item>
                <text:list text:style-name="a60">
                  <text:list-item>
                    <text:list text:style-name="a60">
                      <text:list-item>
                        <text:list text:style-name="a60">
                          <text:list-item>
                            <text:p text:style-name="a59" text:class-names="" text:cond-style-name=""><text:span text:style-name="a5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">
              <text:list-item>
                <text:list text:style-name="a63">
                  <text:list-item>
                    <text:list text:style-name="a63">
                      <text:list-item>
                        <text:list text:style-name="a63">
                          <text:list-item>
                            <text:list text:style-name="a63">
                              <text:list-item>
                                <text:p text:style-name="a62" text:class-names="" text:cond-style-name=""><text:span text:style-name="a6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67" draw:name="Footer Placeholder 5" svg:x="0in" svg:y="9.49826in" svg:width="3.25in" svg:height="0.50174in" presentation:class="footer" presentation:placeholder="false">
          <draw:text-box>
            <text:p text:style-name="a66" text:class-names="" text:cond-style-name=""><text:span text:style-name="a65" text:class-names=""/></text:p>
          </draw:text-box>
          <svg:title/>
          <svg:desc/>
        </draw:frame>
        <draw:frame draw:id="id17" presentation:style-name="a71" draw:name="Slide Number Placeholder 6" svg:x="4.24826in" svg:y="9.49826in" svg:width="3.25in" svg:height="0.50174in" presentation:class="page-number" presentation:placeholder="false">
          <draw:text-box>
            <text:p text:style-name="a70" text:class-names="" text:cond-style-name=""><text:span text:style-name="a68" text:class-names=""><text:page-number style:num-format="1" text:fixed="false">‹N›</text:page-number></text:span><text:span text:style-name="a69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73">
      <draw:frame draw:id="id18" draw:layer="Master1-bg" presentation:style-name="a77" draw:name="Title 1" svg:x="1.66667in" svg:y="1.22743in" svg:width="10in" svg:height="3.30852in" presentation:class="title" presentation:placeholder="false">
        <draw:text-box>
          <text:p text:style-name="a76" text:class-names="" text:cond-style-name=""><text:span text:style-name="a74" text:class-names="">Click to edit Master title style</text:span><text:span text:style-name="a75" text:class-names=""/></text:p>
        </draw:text-box>
        <svg:title/>
        <svg:desc/>
      </draw:frame>
      <draw:frame draw:id="id19" draw:layer="Master1-bg" presentation:style-name="a81" draw:name="Subtitle 2" svg:x="1.66667in" svg:y="4.79739in" svg:width="10in" svg:height="1.24183in" presentation:class="subtitle" presentation:placeholder="false">
        <draw:text-box>
          <text:p text:style-name="a80" text:class-names="" text:cond-style-name=""><text:span text:style-name="a78" text:class-names="">Click to edit Master subtitle style</text:span><text:span text:style-name="a79" text:class-names=""/></text:p>
        </draw:text-box>
        <svg:title/>
        <svg:desc/>
      </draw:frame>
      <draw:frame draw:id="id20" draw:layer="Master1-bg" presentation:style-name="a86" draw:name="Date Placeholder 3" svg:x="8.02395in" svg:y="6.9979in" svg:width="4.58651in" svg:height="0.39931in" presentation:class="date-time" presentation:placeholder="false">
        <draw:text-box>
          <text:p text:style-name="a85" text:class-names="" text:cond-style-name=""><text:span text:style-name="a82" text:class-names=""><text:date text:fixed="false" style:data-style-name="a83">3/21/2026</text:date></text:span><text:span text:style-name="a84" text:class-names=""/></text:p>
        </draw:text-box>
        <svg:title/>
        <svg:desc/>
      </draw:frame>
      <draw:frame draw:id="id21" draw:layer="Master1-bg" presentation:style-name="a89" draw:name="Footer Placeholder 4" svg:x="0.16889in" svg:y="6.9979in" svg:width="4.91832in" svg:height="0.39931in" presentation:class="footer" presentation:placeholder="false">
        <draw:text-box>
          <text:p text:style-name="a88" text:class-names="" text:cond-style-name=""><text:span text:style-name="a87" text:class-names=""/></text:p>
        </draw:text-box>
        <svg:title/>
        <svg:desc/>
      </draw:frame>
      <draw:frame draw:id="id22" draw:layer="Master1-bg" presentation:style-name="a93" draw:name="Slide Number Placeholder 5" svg:x="12.68862in" svg:y="6.9979in" svg:width="0.51497in" svg:height="0.39931in" presentation:class="page-number" presentation:placeholder="false">
        <draw:text-box>
          <text:p text:style-name="a92" text:class-names="" text:cond-style-name=""><text:span text:style-name="a90" text:class-names=""><text:page-number style:num-format="1" text:fixed="false">‹N›</text:page-number></text:span><text:span text:style-name="a91" text:class-names=""/></text:p>
        </draw:text-box>
        <svg:title/>
        <svg:desc/>
      </draw:frame>
      <presentation:notes style:page-layout-name="pageLayout2" draw:style-name="a125">
        <draw:frame draw:id="id12" presentation:style-name="a96" draw:name="Header Placeholder 1" svg:x="0in" svg:y="0in" svg:width="3.25in" svg:height="0.50174in" presentation:class="header" presentation:placeholder="false">
          <draw:text-box>
            <text:p text:style-name="a95" text:class-names="" text:cond-style-name=""><text:span text:style-name="a94" text:class-names=""/></text:p>
          </draw:text-box>
          <svg:title/>
          <svg:desc/>
        </draw:frame>
        <draw:frame draw:id="id13" presentation:style-name="a101" draw:name="Date Placeholder 2" svg:x="4.24826in" svg:y="0in" svg:width="3.25in" svg:height="0.50174in" presentation:class="date-time" presentation:placeholder="false">
          <draw:text-box>
            <text:p text:style-name="a100" text:class-names="" text:cond-style-name=""><text:span text:style-name="a97" text:class-names=""><text:date text:fixed="false" style:data-style-name="a98">3/21/2026</text:date></text:span><text:span text:style-name="a99" text:class-names=""/></text:p>
          </draw:text-box>
          <svg:title/>
          <svg:desc/>
        </draw:frame>
        <draw:page-thumbnail svg:x="0.75in" svg:y="1.25in" svg:width="6in" svg:height="3.375in" presentation:class="page" draw:id="id14" presentation:style-name="a102" draw:name="Slide Image Placeholder 3">
          <svg:title/>
          <svg:desc/>
        </draw:page-thumbnail>
        <draw:frame draw:id="id15" presentation:style-name="a117" draw:name="Notes Placeholder 4" svg:x="0.75in" svg:y="4.8125in" svg:width="6in" svg:height="3.9375in" presentation:class="notes" presentation:placeholder="false">
          <draw:text-box>
            <text:p text:style-name="a104" text:class-names="" text:cond-style-name=""><text:span text:style-name="a103" text:class-names="">Click to edit Master text styles</text:span></text:p>
            <text:list text:style-name="a107">
              <text:list-item>
                <text:list text:style-name="a107">
                  <text:list-item>
                    <text:p text:style-name="a106" text:class-names="" text:cond-style-name=""><text:span text:style-name="a105" text:class-names="">Second level</text:span></text:p>
                  </text:list-item>
                </text:list>
              </text:list-item>
            </text:list>
            <text:list text:style-name="a110">
              <text:list-item>
                <text:list text:style-name="a110">
                  <text:list-item>
                    <text:list text:style-name="a110">
                      <text:list-item>
                        <text:p text:style-name="a109" text:class-names="" text:cond-style-name=""><text:span text:style-name="a10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3">
              <text:list-item>
                <text:list text:style-name="a113">
                  <text:list-item>
                    <text:list text:style-name="a113">
                      <text:list-item>
                        <text:list text:style-name="a113">
                          <text:list-item>
                            <text:p text:style-name="a112" text:class-names="" text:cond-style-name=""><text:span text:style-name="a11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6">
              <text:list-item>
                <text:list text:style-name="a116">
                  <text:list-item>
                    <text:list text:style-name="a116">
                      <text:list-item>
                        <text:list text:style-name="a116">
                          <text:list-item>
                            <text:list text:style-name="a116">
                              <text:list-item>
                                <text:p text:style-name="a115" text:class-names="" text:cond-style-name=""><text:span text:style-name="a11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120" draw:name="Footer Placeholder 5" svg:x="0in" svg:y="9.49826in" svg:width="3.25in" svg:height="0.50174in" presentation:class="foot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17" presentation:style-name="a124" draw:name="Slide Number Placeholder 6" svg:x="4.24826in" svg:y="9.49826in" svg:width="3.25in" svg:height="0.50174in" presentation:class="page-number" presentation:placeholder="false">
          <draw:text-box>
            <text:p text:style-name="a123" text:class-names="" text:cond-style-name=""><text:span text:style-name="a121" text:class-names=""><text:page-number style:num-format="1" text:fixed="false">‹N›</text:page-number></text:span><text:span text:style-name="a122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26">
      <draw:frame draw:id="id23" draw:layer="Master1-bg" presentation:style-name="a130" draw:name="Title 1" svg:x="1.25in" svg:y="0.58333in" svg:width="10.83333in" svg:height="1.51154in" presentation:class="title" presentation:placeholder="false">
        <draw:text-box>
          <text:p text:style-name="a129" text:class-names="" text:cond-style-name=""><text:span text:style-name="a127" text:class-names="">Click to edit Master title style</text:span><text:span text:style-name="a128" text:class-names=""/></text:p>
        </draw:text-box>
        <svg:title/>
        <svg:desc/>
      </draw:frame>
      <draw:frame draw:id="id24" draw:layer="Master1-bg" presentation:style-name="a147" draw:name="Content Placeholder 2" svg:x="1.25in" svg:y="2.19767in" svg:width="10.83333in" svg:height="4.40116in" presentation:class="object" presentation:placeholder="false">
        <draw:text-box>
          <text:list text:style-name="a133">
            <text:list-item>
              <text:p text:style-name="a132" text:class-names="" text:cond-style-name=""><text:span text:style-name="a131" text:class-names="">Click to edit Master text styles</text:span></text:p>
            </text:list-item>
          </text:list>
          <text:list text:style-name="a136">
            <text:list-item>
              <text:list text:style-name="a136">
                <text:list-item>
                  <text:p text:style-name="a135" text:class-names="" text:cond-style-name=""><text:span text:style-name="a134" text:class-names="">Second level</text:span></text:p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p text:style-name="a138" text:class-names="" text:cond-style-name=""><text:span text:style-name="a137" text:class-names="">Third level</text:span></text:p>
                    </text:list-item>
                  </text:list>
                </text:list-item>
              </text:list>
            </text:list-item>
          </text:list>
          <text:list text:style-name="a142">
            <text:list-item>
              <text:list text:style-name="a142">
                <text:list-item>
                  <text:list text:style-name="a142">
                    <text:list-item>
                      <text:list text:style-name="a142">
                        <text:list-item>
                          <text:p text:style-name="a141" text:class-names="" text:cond-style-name=""><text:span text:style-name="a1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list text:style-name="a146">
                        <text:list-item>
                          <text:list text:style-name="a146">
                            <text:list-item>
                              <text:p text:style-name="a145" text:class-names="" text:cond-style-name=""><text:span text:style-name="a143" text:class-names="">Fifth level</text:span><text:span text:style-name="a1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" draw:layer="Master1-bg" presentation:style-name="a152" draw:name="Date Placeholder 3" svg:x="8.02395in" svg:y="6.9979in" svg:width="4.58651in" svg:height="0.39931in" presentation:class="date-time" presentation:placeholder="false">
        <draw:text-box>
          <text:p text:style-name="a151" text:class-names="" text:cond-style-name=""><text:span text:style-name="a148" text:class-names=""><text:date text:fixed="false" style:data-style-name="a149">3/21/2026</text:date></text:span><text:span text:style-name="a150" text:class-names=""/></text:p>
        </draw:text-box>
        <svg:title/>
        <svg:desc/>
      </draw:frame>
      <draw:frame draw:id="id26" draw:layer="Master1-bg" presentation:style-name="a155" draw:name="Footer Placeholder 4" svg:x="0.16889in" svg:y="6.9979in" svg:width="4.91832in" svg:height="0.39931in" presentation:class="footer" presentation:placeholder="false">
        <draw:text-box>
          <text:p text:style-name="a154" text:class-names="" text:cond-style-name=""><text:span text:style-name="a153" text:class-names=""/></text:p>
        </draw:text-box>
        <svg:title/>
        <svg:desc/>
      </draw:frame>
      <draw:frame draw:id="id27" draw:layer="Master1-bg" presentation:style-name="a159" draw:name="Slide Number Placeholder 5" svg:x="12.68862in" svg:y="6.9979in" svg:width="0.51497in" svg:height="0.39931in" presentation:class="page-number" presentation:placeholder="false">
        <draw:text-box>
          <text:p text:style-name="a158" text:class-names="" text:cond-style-name=""><text:span text:style-name="a156" text:class-names=""><text:page-number style:num-format="1" text:fixed="false">‹N›</text:page-number></text:span><text:span text:style-name="a157" text:class-names=""/></text:p>
        </draw:text-box>
        <svg:title/>
        <svg:desc/>
      </draw:frame>
      <presentation:notes style:page-layout-name="pageLayout2" draw:style-name="a191">
        <draw:frame draw:id="id12" presentation:style-name="a162" draw:name="Header Placeholder 1" svg:x="0in" svg:y="0in" svg:width="3.25in" svg:height="0.50174in" presentation:class="head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3" presentation:style-name="a167" draw:name="Date Placeholder 2" svg:x="4.24826in" svg:y="0in" svg:width="3.25in" svg:height="0.50174in" presentation:class="date-time" presentation:placeholder="false">
          <draw:text-box>
            <text:p text:style-name="a166" text:class-names="" text:cond-style-name=""><text:span text:style-name="a163" text:class-names=""><text:date text:fixed="false" style:data-style-name="a164">3/21/2026</text:date></text:span><text:span text:style-name="a165" text:class-names=""/></text:p>
          </draw:text-box>
          <svg:title/>
          <svg:desc/>
        </draw:frame>
        <draw:page-thumbnail svg:x="0.75in" svg:y="1.25in" svg:width="6in" svg:height="3.375in" presentation:class="page" draw:id="id14" presentation:style-name="a168" draw:name="Slide Image Placeholder 3">
          <svg:title/>
          <svg:desc/>
        </draw:page-thumbnail>
        <draw:frame draw:id="id15" presentation:style-name="a183" draw:name="Notes Placeholder 4" svg:x="0.75in" svg:y="4.8125in" svg:width="6in" svg:height="3.9375in" presentation:class="notes" presentation:placeholder="false">
          <draw:text-box>
            <text:p text:style-name="a170" text:class-names="" text:cond-style-name=""><text:span text:style-name="a169" text:class-names="">Click to edit Master text styles</text:span></text:p>
            <text:list text:style-name="a173">
              <text:list-item>
                <text:list text:style-name="a173">
                  <text:list-item>
                    <text:p text:style-name="a172" text:class-names="" text:cond-style-name=""><text:span text:style-name="a171" text:class-names="">Second level</text:span></text:p>
                  </text:list-item>
                </text:list>
              </text:list-item>
            </text:list>
            <text:list text:style-name="a176">
              <text:list-item>
                <text:list text:style-name="a176">
                  <text:list-item>
                    <text:list text:style-name="a176">
                      <text:list-item>
                        <text:p text:style-name="a175" text:class-names="" text:cond-style-name=""><text:span text:style-name="a17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9">
              <text:list-item>
                <text:list text:style-name="a179">
                  <text:list-item>
                    <text:list text:style-name="a179">
                      <text:list-item>
                        <text:list text:style-name="a179">
                          <text:list-item>
                            <text:p text:style-name="a178" text:class-names="" text:cond-style-name=""><text:span text:style-name="a17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2">
              <text:list-item>
                <text:list text:style-name="a182">
                  <text:list-item>
                    <text:list text:style-name="a182">
                      <text:list-item>
                        <text:list text:style-name="a182">
                          <text:list-item>
                            <text:list text:style-name="a182">
                              <text:list-item>
                                <text:p text:style-name="a181" text:class-names="" text:cond-style-name=""><text:span text:style-name="a18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186" draw:name="Footer Placeholder 5" svg:x="0in" svg:y="9.49826in" svg:width="3.25in" svg:height="0.50174in" presentation:class="footer" presentation:placeholder="false">
          <draw:text-box>
            <text:p text:style-name="a185" text:class-names="" text:cond-style-name=""><text:span text:style-name="a184" text:class-names=""/></text:p>
          </draw:text-box>
          <svg:title/>
          <svg:desc/>
        </draw:frame>
        <draw:frame draw:id="id17" presentation:style-name="a190" draw:name="Slide Number Placeholder 6" svg:x="4.24826in" svg:y="9.49826in" svg:width="3.25in" svg:height="0.50174in" presentation:class="page-number" presentation:placeholder="false">
          <draw:text-box>
            <text:p text:style-name="a189" text:class-names="" text:cond-style-name=""><text:span text:style-name="a187" text:class-names=""><text:page-number style:num-format="1" text:fixed="false">‹N›</text:page-number></text:span><text:span text:style-name="a188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92">
      <draw:frame draw:id="id28" draw:layer="Master1-bg" presentation:style-name="a195" draw:name="Title 1" svg:x="0.90972in" svg:y="1.86979in" svg:width="11.5in" svg:height="3.11979in" presentation:class="title" presentation:placeholder="false">
        <draw:text-box>
          <text:p text:style-name="a194" text:class-names="" text:cond-style-name=""><text:span text:style-name="a193" text:class-names="">Click to edit Master title style</text:span></text:p>
        </draw:text-box>
        <svg:title/>
        <svg:desc/>
      </draw:frame>
      <draw:frame draw:id="id29" draw:layer="Master1-bg" presentation:style-name="a199" draw:name="Text Placeholder 2" svg:x="0.90972in" svg:y="5.0191in" svg:width="11.5in" svg:height="1.64062in" presentation:class="outline" presentation:placeholder="false">
        <draw:text-box>
          <text:list text:style-name="a198">
            <text:list-item>
              <text:p text:style-name="a197" text:class-names="" text:cond-style-name=""><text:span text:style-name="a196" text:class-names="">Click to edit Master text styles</text:span></text:p>
            </text:list-item>
          </text:list>
        </draw:text-box>
        <svg:title/>
        <svg:desc/>
      </draw:frame>
      <draw:frame draw:id="id30" draw:layer="Master1-bg" presentation:style-name="a204" draw:name="Date Placeholder 3" svg:x="8.02395in" svg:y="6.9979in" svg:width="4.58651in" svg:height="0.39931in" presentation:class="date-time" presentation:placeholder="false">
        <draw:text-box>
          <text:p text:style-name="a203" text:class-names="" text:cond-style-name=""><text:span text:style-name="a200" text:class-names=""><text:date text:fixed="false" style:data-style-name="a201">3/21/2026</text:date></text:span><text:span text:style-name="a202" text:class-names=""/></text:p>
        </draw:text-box>
        <svg:title/>
        <svg:desc/>
      </draw:frame>
      <draw:frame draw:id="id31" draw:layer="Master1-bg" presentation:style-name="a207" draw:name="Footer Placeholder 4" svg:x="0.16889in" svg:y="6.9979in" svg:width="4.91832in" svg:height="0.39931in" presentation:class="footer" presentation:placeholder="false">
        <draw:text-box>
          <text:p text:style-name="a206" text:class-names="" text:cond-style-name=""><text:span text:style-name="a205" text:class-names=""/></text:p>
        </draw:text-box>
        <svg:title/>
        <svg:desc/>
      </draw:frame>
      <draw:frame draw:id="id32" draw:layer="Master1-bg" presentation:style-name="a211" draw:name="Slide Number Placeholder 5" svg:x="12.68862in" svg:y="6.9979in" svg:width="0.51497in" svg:height="0.39931in" presentation:class="page-number" presentation:placeholder="false">
        <draw:text-box>
          <text:p text:style-name="a210" text:class-names="" text:cond-style-name=""><text:span text:style-name="a208" text:class-names=""><text:page-number style:num-format="1" text:fixed="false">‹N›</text:page-number></text:span><text:span text:style-name="a209" text:class-names=""/></text:p>
        </draw:text-box>
        <svg:title/>
        <svg:desc/>
      </draw:frame>
      <presentation:notes style:page-layout-name="pageLayout2" draw:style-name="a243">
        <draw:frame draw:id="id12" presentation:style-name="a214" draw:name="Header Placeholder 1" svg:x="0in" svg:y="0in" svg:width="3.25in" svg:height="0.50174in" presentation:class="header" presentation:placeholder="false">
          <draw:text-box>
            <text:p text:style-name="a213" text:class-names="" text:cond-style-name=""><text:span text:style-name="a212" text:class-names=""/></text:p>
          </draw:text-box>
          <svg:title/>
          <svg:desc/>
        </draw:frame>
        <draw:frame draw:id="id13" presentation:style-name="a219" draw:name="Date Placeholder 2" svg:x="4.24826in" svg:y="0in" svg:width="3.25in" svg:height="0.50174in" presentation:class="date-time" presentation:placeholder="false">
          <draw:text-box>
            <text:p text:style-name="a218" text:class-names="" text:cond-style-name=""><text:span text:style-name="a215" text:class-names=""><text:date text:fixed="false" style:data-style-name="a216">3/21/2026</text:date></text:span><text:span text:style-name="a217" text:class-names=""/></text:p>
          </draw:text-box>
          <svg:title/>
          <svg:desc/>
        </draw:frame>
        <draw:page-thumbnail svg:x="0.75in" svg:y="1.25in" svg:width="6in" svg:height="3.375in" presentation:class="page" draw:id="id14" presentation:style-name="a220" draw:name="Slide Image Placeholder 3">
          <svg:title/>
          <svg:desc/>
        </draw:page-thumbnail>
        <draw:frame draw:id="id15" presentation:style-name="a235" draw:name="Notes Placeholder 4" svg:x="0.75in" svg:y="4.8125in" svg:width="6in" svg:height="3.9375in" presentation:class="notes" presentation:placeholder="false">
          <draw:text-box>
            <text:p text:style-name="a222" text:class-names="" text:cond-style-name=""><text:span text:style-name="a221" text:class-names="">Click to edit Master text styles</text:span></text:p>
            <text:list text:style-name="a225">
              <text:list-item>
                <text:list text:style-name="a225">
                  <text:list-item>
                    <text:p text:style-name="a224" text:class-names="" text:cond-style-name=""><text:span text:style-name="a223" text:class-names="">Second level</text:span></text:p>
                  </text:list-item>
                </text:list>
              </text:list-item>
            </text:list>
            <text:list text:style-name="a228">
              <text:list-item>
                <text:list text:style-name="a228">
                  <text:list-item>
                    <text:list text:style-name="a228">
                      <text:list-item>
                        <text:p text:style-name="a227" text:class-names="" text:cond-style-name=""><text:span text:style-name="a22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31">
              <text:list-item>
                <text:list text:style-name="a231">
                  <text:list-item>
                    <text:list text:style-name="a231">
                      <text:list-item>
                        <text:list text:style-name="a231">
                          <text:list-item>
                            <text:p text:style-name="a230" text:class-names="" text:cond-style-name=""><text:span text:style-name="a22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4">
              <text:list-item>
                <text:list text:style-name="a234">
                  <text:list-item>
                    <text:list text:style-name="a234">
                      <text:list-item>
                        <text:list text:style-name="a234">
                          <text:list-item>
                            <text:list text:style-name="a234">
                              <text:list-item>
                                <text:p text:style-name="a233" text:class-names="" text:cond-style-name=""><text:span text:style-name="a23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238" draw:name="Footer Placeholder 5" svg:x="0in" svg:y="9.49826in" svg:width="3.25in" svg:height="0.50174in" presentation:class="footer" presentation:placeholder="false">
          <draw:text-box>
            <text:p text:style-name="a237" text:class-names="" text:cond-style-name=""><text:span text:style-name="a236" text:class-names=""/></text:p>
          </draw:text-box>
          <svg:title/>
          <svg:desc/>
        </draw:frame>
        <draw:frame draw:id="id17" presentation:style-name="a242" draw:name="Slide Number Placeholder 6" svg:x="4.24826in" svg:y="9.49826in" svg:width="3.25in" svg:height="0.50174in" presentation:class="page-number" presentation:placeholder="false">
          <draw:text-box>
            <text:p text:style-name="a241" text:class-names="" text:cond-style-name=""><text:span text:style-name="a239" text:class-names=""><text:page-number style:num-format="1" text:fixed="false">‹N›</text:page-number></text:span><text:span text:style-name="a240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44">
      <draw:frame draw:id="id33" draw:layer="Master1-bg" presentation:style-name="a247" draw:name="Title 1" svg:x="1.25in" svg:y="0.58333in" svg:width="10.83333in" svg:height="1.51154in" presentation:class="title" presentation:placeholder="false">
        <draw:text-box>
          <text:p text:style-name="a246" text:class-names="" text:cond-style-name=""><text:span text:style-name="a245" text:class-names="">Click to edit Master title style</text:span></text:p>
        </draw:text-box>
        <svg:title/>
        <svg:desc/>
      </draw:frame>
      <draw:frame draw:id="id34" draw:layer="Master1-bg" presentation:style-name="a264" draw:name="Content Placeholder 2" svg:x="0.91667in" svg:y="2.10465in" svg:width="5.66667in" svg:height="4.65056in" presentation:class="object" presentation:placeholder="false">
        <draw:text-box>
          <text:list text:style-name="a250">
            <text:list-item>
              <text:p text:style-name="a249" text:class-names="" text:cond-style-name=""><text:span text:style-name="a248" text:class-names="">Click to edit Master text styles</text:span></text:p>
            </text:list-item>
          </text:list>
          <text:list text:style-name="a253">
            <text:list-item>
              <text:list text:style-name="a253">
                <text:list-item>
                  <text:p text:style-name="a252" text:class-names="" text:cond-style-name=""><text:span text:style-name="a251" text:class-names="">Second level</text:span></text:p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p text:style-name="a255" text:class-names="" text:cond-style-name=""><text:span text:style-name="a254" text:class-names="">Third level</text:span></text:p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p text:style-name="a258" text:class-names="" text:cond-style-name=""><text:span text:style-name="a2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list text:style-name="a263">
                            <text:list-item>
                              <text:p text:style-name="a262" text:class-names="" text:cond-style-name=""><text:span text:style-name="a260" text:class-names="">Fifth level</text:span><text:span text:style-name="a2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draw:layer="Master1-bg" presentation:style-name="a280" draw:name="Content Placeholder 3" svg:x="6.75in" svg:y="2.10465in" svg:width="5.66667in" svg:height="4.6505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Click to 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draw:layer="Master1-bg" presentation:style-name="a285" draw:name="Date Placeholder 4" svg:x="8.02395in" svg:y="6.9979in" svg:width="4.58651in" svg:height="0.39931in" presentation:class="date-time" presentation:placeholder="false">
        <draw:text-box>
          <text:p text:style-name="a284" text:class-names="" text:cond-style-name=""><text:span text:style-name="a281" text:class-names=""><text:date text:fixed="false" style:data-style-name="a282">3/21/2026</text:date></text:span><text:span text:style-name="a283" text:class-names=""/></text:p>
        </draw:text-box>
        <svg:title/>
        <svg:desc/>
      </draw:frame>
      <draw:frame draw:id="id37" draw:layer="Master1-bg" presentation:style-name="a288" draw:name="Footer Placeholder 5" svg:x="0.16889in" svg:y="6.9979in" svg:width="4.91832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38" draw:layer="Master1-bg" presentation:style-name="a292" draw:name="Slide Number Placeholder 6" svg:x="12.68862in" svg:y="6.9979in" svg:width="0.51497in" svg:height="0.39931in" presentation:class="page-number" presentation:placeholder="false">
        <draw:text-box>
          <text:p text:style-name="a291" text:class-names="" text:cond-style-name=""><text:span text:style-name="a289" text:class-names=""><text:page-number style:num-format="1" text:fixed="false">‹N›</text:page-number></text:span><text:span text:style-name="a290" text:class-names=""/></text:p>
        </draw:text-box>
        <svg:title/>
        <svg:desc/>
      </draw:frame>
      <presentation:notes style:page-layout-name="pageLayout2" draw:style-name="a324">
        <draw:frame draw:id="id12" presentation:style-name="a295" draw:name="Header Placeholder 1" svg:x="0in" svg:y="0in" svg:width="3.25in" svg:height="0.50174in" presentation:class="header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13" presentation:style-name="a300" draw:name="Date Placeholder 2" svg:x="4.24826in" svg:y="0in" svg:width="3.25in" svg:height="0.50174in" presentation:class="date-time" presentation:placeholder="false">
          <draw:text-box>
            <text:p text:style-name="a299" text:class-names="" text:cond-style-name=""><text:span text:style-name="a296" text:class-names=""><text:date text:fixed="false" style:data-style-name="a297">3/21/2026</text:date></text:span><text:span text:style-name="a298" text:class-names=""/></text:p>
          </draw:text-box>
          <svg:title/>
          <svg:desc/>
        </draw:frame>
        <draw:page-thumbnail svg:x="0.75in" svg:y="1.25in" svg:width="6in" svg:height="3.375in" presentation:class="page" draw:id="id14" presentation:style-name="a301" draw:name="Slide Image Placeholder 3">
          <svg:title/>
          <svg:desc/>
        </draw:page-thumbnail>
        <draw:frame draw:id="id15" presentation:style-name="a316" draw:name="Notes Placeholder 4" svg:x="0.75in" svg:y="4.8125in" svg:width="6in" svg:height="3.9375in" presentation:class="notes" presentation:placeholder="false">
          <draw:text-box>
            <text:p text:style-name="a303" text:class-names="" text:cond-style-name=""><text:span text:style-name="a302" text:class-names="">Click to edit Master text styles</text:span></text:p>
            <text:list text:style-name="a306">
              <text:list-item>
                <text:list text:style-name="a306">
                  <text:list-item>
                    <text:p text:style-name="a305" text:class-names="" text:cond-style-name=""><text:span text:style-name="a304" text:class-names="">Second level</text:span></text:p>
                  </text:list-item>
                </text:list>
              </text:list-item>
            </text:list>
            <text:list text:style-name="a309">
              <text:list-item>
                <text:list text:style-name="a309">
                  <text:list-item>
                    <text:list text:style-name="a309">
                      <text:list-item>
                        <text:p text:style-name="a308" text:class-names="" text:cond-style-name=""><text:span text:style-name="a30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12">
              <text:list-item>
                <text:list text:style-name="a312">
                  <text:list-item>
                    <text:list text:style-name="a312">
                      <text:list-item>
                        <text:list text:style-name="a312">
                          <text:list-item>
                            <text:p text:style-name="a311" text:class-names="" text:cond-style-name=""><text:span text:style-name="a31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5">
              <text:list-item>
                <text:list text:style-name="a315">
                  <text:list-item>
                    <text:list text:style-name="a315">
                      <text:list-item>
                        <text:list text:style-name="a315">
                          <text:list-item>
                            <text:list text:style-name="a315">
                              <text:list-item>
                                <text:p text:style-name="a314" text:class-names="" text:cond-style-name=""><text:span text:style-name="a31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319" draw:name="Footer Placeholder 5" svg:x="0in" svg:y="9.49826in" svg:width="3.25in" svg:height="0.50174in" presentation:class="footer" presentation:placeholder="false">
          <draw:text-box>
            <text:p text:style-name="a318" text:class-names="" text:cond-style-name=""><text:span text:style-name="a317" text:class-names=""/></text:p>
          </draw:text-box>
          <svg:title/>
          <svg:desc/>
        </draw:frame>
        <draw:frame draw:id="id17" presentation:style-name="a323" draw:name="Slide Number Placeholder 6" svg:x="4.24826in" svg:y="9.49826in" svg:width="3.25in" svg:height="0.50174in" presentation:class="page-number" presentation:placeholder="false">
          <draw:text-box>
            <text:p text:style-name="a322" text:class-names="" text:cond-style-name=""><text:span text:style-name="a320" text:class-names=""><text:page-number style:num-format="1" text:fixed="false">‹N›</text:page-number></text:span><text:span text:style-name="a321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25">
      <draw:frame draw:id="id39" draw:layer="Master1-bg" presentation:style-name="a328" draw:name="Title 1" svg:x="0.9184in" svg:y="0.39931in" svg:width="11.5in" svg:height="1.44965in" presentation:class="title" presentation:placeholder="false">
        <draw:text-box>
          <text:p text:style-name="a327" text:class-names="" text:cond-style-name=""><text:span text:style-name="a326" text:class-names="">Click to edit Master title style</text:span></text:p>
        </draw:text-box>
        <svg:title/>
        <svg:desc/>
      </draw:frame>
      <draw:frame draw:id="id40" draw:layer="Master1-bg" presentation:style-name="a332" draw:name="Text Placeholder 2" svg:x="0.9184in" svg:y="1.89668in" svg:width="5.64062in" svg:height="0.90104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</draw:text-box>
        <svg:title/>
        <svg:desc/>
      </draw:frame>
      <draw:frame draw:id="id41" draw:layer="Master1-bg" presentation:style-name="a349" draw:name="Content Placeholder 3" svg:x="0.9184in" svg:y="2.79772in" svg:width="5.64062in" svg:height="4.02951in" presentation:class="object" presentation:placeholder="false">
        <draw:text-box>
          <text:list text:style-name="a335">
            <text:list-item>
              <text:p text:style-name="a334" text:class-names="" text:cond-style-name=""><text:span text:style-name="a333" text:class-names="">Click to edit Master text styles</text:span></text:p>
            </text:list-item>
          </text:list>
          <text:list text:style-name="a338">
            <text:list-item>
              <text:list text:style-name="a338">
                <text:list-item>
                  <text:p text:style-name="a337" text:class-names="" text:cond-style-name=""><text:span text:style-name="a336" text:class-names="">Second level</text:span></text:p>
                </text:list-item>
              </text:list>
            </text:list-item>
          </text:list>
          <text:list text:style-name="a341">
            <text:list-item>
              <text:list text:style-name="a341">
                <text:list-item>
                  <text:list text:style-name="a341">
                    <text:list-item>
                      <text:p text:style-name="a340" text:class-names="" text:cond-style-name=""><text:span text:style-name="a339" text:class-names="">Third level</text:span></text:p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p text:style-name="a343" text:class-names="" text:cond-style-name=""><text:span text:style-name="a34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8">
            <text:list-item>
              <text:list text:style-name="a348">
                <text:list-item>
                  <text:list text:style-name="a348">
                    <text:list-item>
                      <text:list text:style-name="a348">
                        <text:list-item>
                          <text:list text:style-name="a348">
                            <text:list-item>
                              <text:p text:style-name="a347" text:class-names="" text:cond-style-name=""><text:span text:style-name="a345" text:class-names="">Fifth level</text:span><text:span text:style-name="a34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2" draw:layer="Master1-bg" presentation:style-name="a353" draw:name="Text Placeholder 4" svg:x="6.75in" svg:y="1.89668in" svg:width="5.6684in" svg:height="0.90104in" presentation:class="outline" presentation:placeholder="false">
        <draw:text-box>
          <text:list text:style-name="a352">
            <text:list-item>
              <text:p text:style-name="a351" text:class-names="" text:cond-style-name=""><text:span text:style-name="a350" text:class-names="">Click to edit Master text styles</text:span></text:p>
            </text:list-item>
          </text:list>
        </draw:text-box>
        <svg:title/>
        <svg:desc/>
      </draw:frame>
      <draw:frame draw:id="id43" draw:layer="Master1-bg" presentation:style-name="a369" draw:name="Content Placeholder 5" svg:x="6.75in" svg:y="2.79772in" svg:width="5.6684in" svg:height="4.02951in" presentation:class="object" presentation:placeholder="false">
        <draw:text-box>
          <text:list text:style-name="a356">
            <text:list-item>
              <text:p text:style-name="a355" text:class-names="" text:cond-style-name=""><text:span text:style-name="a354" text:class-names="">Click to edit Master text styles</text:span></text:p>
            </text:list-item>
          </text:list>
          <text:list text:style-name="a359">
            <text:list-item>
              <text:list text:style-name="a359">
                <text:list-item>
                  <text:p text:style-name="a358" text:class-names="" text:cond-style-name=""><text:span text:style-name="a357" text:class-names="">Second level</text:span></text:p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p text:style-name="a361" text:class-names="" text:cond-style-name=""><text:span text:style-name="a360" text:class-names="">Third level</text:span></text:p>
                    </text:list-item>
                  </text:list>
                </text:list-item>
              </text:list>
            </text:list-item>
          </text:list>
          <text:list text:style-name="a365">
            <text:list-item>
              <text:list text:style-name="a365">
                <text:list-item>
                  <text:list text:style-name="a365">
                    <text:list-item>
                      <text:list text:style-name="a365">
                        <text:list-item>
                          <text:p text:style-name="a364" text:class-names="" text:cond-style-name=""><text:span text:style-name="a36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8">
            <text:list-item>
              <text:list text:style-name="a368">
                <text:list-item>
                  <text:list text:style-name="a368">
                    <text:list-item>
                      <text:list text:style-name="a368">
                        <text:list-item>
                          <text:list text:style-name="a368">
                            <text:list-item>
                              <text:p text:style-name="a367" text:class-names="" text:cond-style-name=""><text:span text:style-name="a36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draw:layer="Master1-bg" presentation:style-name="a374" draw:name="Date Placeholder 6" svg:x="8.02395in" svg:y="6.9979in" svg:width="4.58651in" svg:height="0.39931in" presentation:class="date-time" presentation:placeholder="false">
        <draw:text-box>
          <text:p text:style-name="a373" text:class-names="" text:cond-style-name=""><text:span text:style-name="a370" text:class-names=""><text:date text:fixed="false" style:data-style-name="a371">3/21/2026</text:date></text:span><text:span text:style-name="a372" text:class-names=""/></text:p>
        </draw:text-box>
        <svg:title/>
        <svg:desc/>
      </draw:frame>
      <draw:frame draw:id="id45" draw:layer="Master1-bg" presentation:style-name="a377" draw:name="Footer Placeholder 7" svg:x="0.16889in" svg:y="6.9979in" svg:width="4.91832in" svg:height="0.39931in" presentation:class="footer" presentation:placeholder="false">
        <draw:text-box>
          <text:p text:style-name="a376" text:class-names="" text:cond-style-name=""><text:span text:style-name="a375" text:class-names=""/></text:p>
        </draw:text-box>
        <svg:title/>
        <svg:desc/>
      </draw:frame>
      <draw:frame draw:id="id46" presentation:style-name="a381" draw:name="Slide Number Placeholder 8" svg:x="12.68862in" svg:y="6.9979in" svg:width="0.51497in" svg:height="0.39931in" presentation:class="page-number" presentation:placeholder="false">
        <draw:text-box>
          <text:p text:style-name="a380" text:class-names="" text:cond-style-name=""><text:span text:style-name="a378" text:class-names=""><text:page-number style:num-format="1" text:fixed="false">‹N›</text:page-number></text:span><text:span text:style-name="a379" text:class-names=""/></text:p>
        </draw:text-box>
        <svg:title/>
        <svg:desc/>
      </draw:frame>
      <presentation:notes style:page-layout-name="pageLayout2" draw:style-name="a413">
        <draw:frame draw:id="id12" presentation:style-name="a384" draw:name="Header Placeholder 1" svg:x="0in" svg:y="0in" svg:width="3.25in" svg:height="0.50174in" presentation:class="header" presentation:placeholder="false">
          <draw:text-box>
            <text:p text:style-name="a383" text:class-names="" text:cond-style-name=""><text:span text:style-name="a382" text:class-names=""/></text:p>
          </draw:text-box>
          <svg:title/>
          <svg:desc/>
        </draw:frame>
        <draw:frame draw:id="id13" presentation:style-name="a389" draw:name="Date Placeholder 2" svg:x="4.24826in" svg:y="0in" svg:width="3.25in" svg:height="0.50174in" presentation:class="date-time" presentation:placeholder="false">
          <draw:text-box>
            <text:p text:style-name="a388" text:class-names="" text:cond-style-name=""><text:span text:style-name="a385" text:class-names=""><text:date text:fixed="false" style:data-style-name="a386">3/21/2026</text:date></text:span><text:span text:style-name="a387" text:class-names=""/></text:p>
          </draw:text-box>
          <svg:title/>
          <svg:desc/>
        </draw:frame>
        <draw:page-thumbnail svg:x="0.75in" svg:y="1.25in" svg:width="6in" svg:height="3.375in" presentation:class="page" draw:id="id14" presentation:style-name="a390" draw:name="Slide Image Placeholder 3">
          <svg:title/>
          <svg:desc/>
        </draw:page-thumbnail>
        <draw:frame draw:id="id15" presentation:style-name="a405" draw:name="Notes Placeholder 4" svg:x="0.75in" svg:y="4.8125in" svg:width="6in" svg:height="3.9375in" presentation:class="notes" presentation:placeholder="false">
          <draw:text-box>
            <text:p text:style-name="a392" text:class-names="" text:cond-style-name=""><text:span text:style-name="a391" text:class-names="">Click to edit Master text styles</text:span></text:p>
            <text:list text:style-name="a395">
              <text:list-item>
                <text:list text:style-name="a395">
                  <text:list-item>
                    <text:p text:style-name="a394" text:class-names="" text:cond-style-name=""><text:span text:style-name="a393" text:class-names="">Second level</text:span></text:p>
                  </text:list-item>
                </text:list>
              </text:list-item>
            </text:list>
            <text:list text:style-name="a398">
              <text:list-item>
                <text:list text:style-name="a398">
                  <text:list-item>
                    <text:list text:style-name="a398">
                      <text:list-item>
                        <text:p text:style-name="a397" text:class-names="" text:cond-style-name=""><text:span text:style-name="a39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01">
              <text:list-item>
                <text:list text:style-name="a401">
                  <text:list-item>
                    <text:list text:style-name="a401">
                      <text:list-item>
                        <text:list text:style-name="a401">
                          <text:list-item>
                            <text:p text:style-name="a400" text:class-names="" text:cond-style-name=""><text:span text:style-name="a39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list text:style-name="a404">
                          <text:list-item>
                            <text:list text:style-name="a404">
                              <text:list-item>
                                <text:p text:style-name="a403" text:class-names="" text:cond-style-name=""><text:span text:style-name="a40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408" draw:name="Footer Placeholder 5" svg:x="0in" svg:y="9.49826in" svg:width="3.25in" svg:height="0.50174in" presentation:class="footer" presentation:placeholder="false">
          <draw:text-box>
            <text:p text:style-name="a407" text:class-names="" text:cond-style-name=""><text:span text:style-name="a406" text:class-names=""/></text:p>
          </draw:text-box>
          <svg:title/>
          <svg:desc/>
        </draw:frame>
        <draw:frame draw:id="id17" presentation:style-name="a412" draw:name="Slide Number Placeholder 6" svg:x="4.24826in" svg:y="9.49826in" svg:width="3.25in" svg:height="0.50174in" presentation:class="page-number" presentation:placeholder="false">
          <draw:text-box>
            <text:p text:style-name="a411" text:class-names="" text:cond-style-name=""><text:span text:style-name="a409" text:class-names=""><text:page-number style:num-format="1" text:fixed="false">‹N›</text:page-number></text:span><text:span text:style-name="a410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14">
      <draw:frame draw:id="id47" draw:layer="Master1-bg" presentation:style-name="a417" draw:name="Title 1" svg:x="1.25in" svg:y="0.58333in" svg:width="10.83333in" svg:height="1.51154in" presentation:class="title" presentation:placeholder="false">
        <draw:text-box>
          <text:p text:style-name="a416" text:class-names="" text:cond-style-name=""><text:span text:style-name="a415" text:class-names="">Click to edit Master title style</text:span></text:p>
        </draw:text-box>
        <svg:title/>
        <svg:desc/>
      </draw:frame>
      <draw:frame draw:id="id48" draw:layer="Master1-bg" presentation:style-name="a422" draw:name="Date Placeholder 2" svg:x="8.02395in" svg:y="6.9979in" svg:width="4.58651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>3/21/2026</text:date></text:span><text:span text:style-name="a420" text:class-names=""/></text:p>
        </draw:text-box>
        <svg:title/>
        <svg:desc/>
      </draw:frame>
      <draw:frame draw:id="id49" draw:layer="Master1-bg" presentation:style-name="a425" draw:name="Footer Placeholder 3" svg:x="0.16889in" svg:y="6.9979in" svg:width="4.91832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50" draw:layer="Master1-bg" presentation:style-name="a429" draw:name="Slide Number Placeholder 4" svg:x="12.68862in" svg:y="6.9979in" svg:width="0.51497in" svg:height="0.39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>‹N›</text:page-number></text:span><text:span text:style-name="a427" text:class-names=""/></text:p>
        </draw:text-box>
        <svg:title/>
        <svg:desc/>
      </draw:frame>
      <presentation:notes style:page-layout-name="pageLayout2" draw:style-name="a461">
        <draw:frame draw:id="id12" presentation:style-name="a432" draw:name="Header Placeholder 1" svg:x="0in" svg:y="0in" svg:width="3.25in" svg:height="0.50174in" presentation:class="header" presentation:placeholder="false">
          <draw:text-box>
            <text:p text:style-name="a431" text:class-names="" text:cond-style-name=""><text:span text:style-name="a430" text:class-names=""/></text:p>
          </draw:text-box>
          <svg:title/>
          <svg:desc/>
        </draw:frame>
        <draw:frame draw:id="id13" presentation:style-name="a437" draw:name="Date Placeholder 2" svg:x="4.24826in" svg:y="0in" svg:width="3.25in" svg:height="0.50174in" presentation:class="date-time" presentation:placeholder="false">
          <draw:text-box>
            <text:p text:style-name="a436" text:class-names="" text:cond-style-name=""><text:span text:style-name="a433" text:class-names=""><text:date text:fixed="false" style:data-style-name="a434">3/21/2026</text:date></text:span><text:span text:style-name="a435" text:class-names=""/></text:p>
          </draw:text-box>
          <svg:title/>
          <svg:desc/>
        </draw:frame>
        <draw:page-thumbnail svg:x="0.75in" svg:y="1.25in" svg:width="6in" svg:height="3.375in" presentation:class="page" draw:id="id14" presentation:style-name="a438" draw:name="Slide Image Placeholder 3">
          <svg:title/>
          <svg:desc/>
        </draw:page-thumbnail>
        <draw:frame draw:id="id15" presentation:style-name="a453" draw:name="Notes Placeholder 4" svg:x="0.75in" svg:y="4.8125in" svg:width="6in" svg:height="3.9375in" presentation:class="notes" presentation:placeholder="false">
          <draw:text-box>
            <text:p text:style-name="a440" text:class-names="" text:cond-style-name=""><text:span text:style-name="a439" text:class-names="">Click to edit Master text styles</text:span></text:p>
            <text:list text:style-name="a443">
              <text:list-item>
                <text:list text:style-name="a443">
                  <text:list-item>
                    <text:p text:style-name="a442" text:class-names="" text:cond-style-name=""><text:span text:style-name="a441" text:class-names="">Second level</text:span></text:p>
                  </text:list-item>
                </text:list>
              </text:list-item>
            </text:list>
            <text:list text:style-name="a446">
              <text:list-item>
                <text:list text:style-name="a446">
                  <text:list-item>
                    <text:list text:style-name="a446">
                      <text:list-item>
                        <text:p text:style-name="a445" text:class-names="" text:cond-style-name=""><text:span text:style-name="a44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49">
              <text:list-item>
                <text:list text:style-name="a449">
                  <text:list-item>
                    <text:list text:style-name="a449">
                      <text:list-item>
                        <text:list text:style-name="a449">
                          <text:list-item>
                            <text:p text:style-name="a448" text:class-names="" text:cond-style-name=""><text:span text:style-name="a44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2">
              <text:list-item>
                <text:list text:style-name="a452">
                  <text:list-item>
                    <text:list text:style-name="a452">
                      <text:list-item>
                        <text:list text:style-name="a452">
                          <text:list-item>
                            <text:list text:style-name="a452">
                              <text:list-item>
                                <text:p text:style-name="a451" text:class-names="" text:cond-style-name=""><text:span text:style-name="a45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456" draw:name="Footer Placeholder 5" svg:x="0in" svg:y="9.49826in" svg:width="3.25in" svg:height="0.50174in" presentation:class="footer" presentation:placeholder="false">
          <draw:text-box>
            <text:p text:style-name="a455" text:class-names="" text:cond-style-name=""><text:span text:style-name="a454" text:class-names=""/></text:p>
          </draw:text-box>
          <svg:title/>
          <svg:desc/>
        </draw:frame>
        <draw:frame draw:id="id17" presentation:style-name="a460" draw:name="Slide Number Placeholder 6" svg:x="4.24826in" svg:y="9.49826in" svg:width="3.25in" svg:height="0.50174in" presentation:class="page-number" presentation:placeholder="false">
          <draw:text-box>
            <text:p text:style-name="a459" text:class-names="" text:cond-style-name=""><text:span text:style-name="a457" text:class-names=""><text:page-number style:num-format="1" text:fixed="false">‹N›</text:page-number></text:span><text:span text:style-name="a458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462">
      <draw:frame draw:id="id51" draw:layer="Master1-bg" presentation:style-name="a467" draw:name="Date Placeholder 1" svg:x="8.02395in" svg:y="6.9979in" svg:width="4.58651in" svg:height="0.39931in" presentation:class="date-time" presentation:placeholder="false">
        <draw:text-box>
          <text:p text:style-name="a466" text:class-names="" text:cond-style-name=""><text:span text:style-name="a463" text:class-names=""><text:date text:fixed="false" style:data-style-name="a464">3/21/2026</text:date></text:span><text:span text:style-name="a465" text:class-names=""/></text:p>
        </draw:text-box>
        <svg:title/>
        <svg:desc/>
      </draw:frame>
      <draw:frame draw:id="id52" draw:layer="Master1-bg" presentation:style-name="a470" draw:name="Footer Placeholder 2" svg:x="0.16889in" svg:y="6.9979in" svg:width="4.91832in" svg:height="0.39931in" presentation:class="footer" presentation:placeholder="false">
        <draw:text-box>
          <text:p text:style-name="a469" text:class-names="" text:cond-style-name=""><text:span text:style-name="a468" text:class-names=""/></text:p>
        </draw:text-box>
        <svg:title/>
        <svg:desc/>
      </draw:frame>
      <draw:frame draw:id="id53" draw:layer="Master1-bg" presentation:style-name="a474" draw:name="Slide Number Placeholder 3" svg:x="12.68862in" svg:y="6.9979in" svg:width="0.51497in" svg:height="0.39931in" presentation:class="page-number" presentation:placeholder="false">
        <draw:text-box>
          <text:p text:style-name="a473" text:class-names="" text:cond-style-name=""><text:span text:style-name="a471" text:class-names=""><text:page-number style:num-format="1" text:fixed="false">‹N›</text:page-number></text:span><text:span text:style-name="a472" text:class-names=""/></text:p>
        </draw:text-box>
        <svg:title/>
        <svg:desc/>
      </draw:frame>
      <presentation:notes style:page-layout-name="pageLayout2" draw:style-name="a506">
        <draw:frame draw:id="id12" presentation:style-name="a477" draw:name="Header Placeholder 1" svg:x="0in" svg:y="0in" svg:width="3.25in" svg:height="0.50174in" presentation:class="header" presentation:placeholder="false">
          <draw:text-box>
            <text:p text:style-name="a476" text:class-names="" text:cond-style-name=""><text:span text:style-name="a475" text:class-names=""/></text:p>
          </draw:text-box>
          <svg:title/>
          <svg:desc/>
        </draw:frame>
        <draw:frame draw:id="id13" presentation:style-name="a482" draw:name="Date Placeholder 2" svg:x="4.24826in" svg:y="0in" svg:width="3.25in" svg:height="0.50174in" presentation:class="date-time" presentation:placeholder="false">
          <draw:text-box>
            <text:p text:style-name="a481" text:class-names="" text:cond-style-name=""><text:span text:style-name="a478" text:class-names=""><text:date text:fixed="false" style:data-style-name="a479">3/21/2026</text:date></text:span><text:span text:style-name="a480" text:class-names=""/></text:p>
          </draw:text-box>
          <svg:title/>
          <svg:desc/>
        </draw:frame>
        <draw:page-thumbnail svg:x="0.75in" svg:y="1.25in" svg:width="6in" svg:height="3.375in" presentation:class="page" draw:id="id14" presentation:style-name="a483" draw:name="Slide Image Placeholder 3">
          <svg:title/>
          <svg:desc/>
        </draw:page-thumbnail>
        <draw:frame draw:id="id15" presentation:style-name="a498" draw:name="Notes Placeholder 4" svg:x="0.75in" svg:y="4.8125in" svg:width="6in" svg:height="3.9375in" presentation:class="notes" presentation:placeholder="false">
          <draw:text-box>
            <text:p text:style-name="a485" text:class-names="" text:cond-style-name=""><text:span text:style-name="a484" text:class-names="">Click to edit Master text styles</text:span></text:p>
            <text:list text:style-name="a488">
              <text:list-item>
                <text:list text:style-name="a488">
                  <text:list-item>
                    <text:p text:style-name="a487" text:class-names="" text:cond-style-name=""><text:span text:style-name="a486" text:class-names="">Second level</text:span></text:p>
                  </text:list-item>
                </text:list>
              </text:list-item>
            </text:list>
            <text:list text:style-name="a491">
              <text:list-item>
                <text:list text:style-name="a491">
                  <text:list-item>
                    <text:list text:style-name="a491">
                      <text:list-item>
                        <text:p text:style-name="a490" text:class-names="" text:cond-style-name=""><text:span text:style-name="a48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94">
              <text:list-item>
                <text:list text:style-name="a494">
                  <text:list-item>
                    <text:list text:style-name="a494">
                      <text:list-item>
                        <text:list text:style-name="a494">
                          <text:list-item>
                            <text:p text:style-name="a493" text:class-names="" text:cond-style-name=""><text:span text:style-name="a49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97">
              <text:list-item>
                <text:list text:style-name="a497">
                  <text:list-item>
                    <text:list text:style-name="a497">
                      <text:list-item>
                        <text:list text:style-name="a497">
                          <text:list-item>
                            <text:list text:style-name="a497">
                              <text:list-item>
                                <text:p text:style-name="a496" text:class-names="" text:cond-style-name=""><text:span text:style-name="a49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501" draw:name="Footer Placeholder 5" svg:x="0in" svg:y="9.49826in" svg:width="3.25in" svg:height="0.50174in" presentation:class="footer" presentation:placeholder="false">
          <draw:text-box>
            <text:p text:style-name="a500" text:class-names="" text:cond-style-name=""><text:span text:style-name="a499" text:class-names=""/></text:p>
          </draw:text-box>
          <svg:title/>
          <svg:desc/>
        </draw:frame>
        <draw:frame draw:id="id17" presentation:style-name="a505" draw:name="Slide Number Placeholder 6" svg:x="4.24826in" svg:y="9.49826in" svg:width="3.25in" svg:height="0.50174in" presentation:class="page-number" presentation:placeholder="false">
          <draw:text-box>
            <text:p text:style-name="a504" text:class-names="" text:cond-style-name=""><text:span text:style-name="a502" text:class-names=""><text:page-number style:num-format="1" text:fixed="false">‹N›</text:page-number></text:span><text:span text:style-name="a503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07">
      <draw:frame draw:id="id54" draw:layer="Master1-bg" presentation:style-name="a510" draw:name="Title 1" svg:x="0.9184in" svg:y="0.5in" svg:width="4.30035in" svg:height="1.75in" presentation:class="title" presentation:placeholder="false">
        <draw:text-box>
          <text:p text:style-name="a509" text:class-names="" text:cond-style-name=""><text:span text:style-name="a508" text:class-names="">Click to edit Master title style</text:span></text:p>
        </draw:text-box>
        <svg:title/>
        <svg:desc/>
      </draw:frame>
      <draw:frame draw:id="id55" draw:layer="Master1-bg" presentation:style-name="a526" draw:name="Content Placeholder 2" svg:x="5.6684in" svg:y="1.07986in" svg:width="6.75in" svg:height="5.32986in" presentation:class="object" presentation:placeholder="false">
        <draw:text-box>
          <text:list text:style-name="a513">
            <text:list-item>
              <text:p text:style-name="a512" text:class-names="" text:cond-style-name=""><text:span text:style-name="a511" text:class-names="">Click to edit Master text styles</text:span></text:p>
            </text:list-item>
          </text:list>
          <text:list text:style-name="a516">
            <text:list-item>
              <text:list text:style-name="a516">
                <text:list-item>
                  <text:p text:style-name="a515" text:class-names="" text:cond-style-name=""><text:span text:style-name="a514" text:class-names="">Second level</text:span></text:p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p text:style-name="a518" text:class-names="" text:cond-style-name=""><text:span text:style-name="a517" text:class-names="">Third level</text:span></text:p>
                    </text:list-item>
                  </text:list>
                </text:list-item>
              </text:list>
            </text:list-item>
          </text:list>
          <text:list text:style-name="a522">
            <text:list-item>
              <text:list text:style-name="a522">
                <text:list-item>
                  <text:list text:style-name="a522">
                    <text:list-item>
                      <text:list text:style-name="a522">
                        <text:list-item>
                          <text:p text:style-name="a521" text:class-names="" text:cond-style-name=""><text:span text:style-name="a5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5">
            <text:list-item>
              <text:list text:style-name="a525">
                <text:list-item>
                  <text:list text:style-name="a525">
                    <text:list-item>
                      <text:list text:style-name="a525">
                        <text:list-item>
                          <text:list text:style-name="a525">
                            <text:list-item>
                              <text:p text:style-name="a524" text:class-names="" text:cond-style-name=""><text:span text:style-name="a52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6" draw:layer="Master1-bg" presentation:style-name="a530" draw:name="Text Placeholder 3" svg:x="0.9184in" svg:y="2.25in" svg:width="4.30035in" svg:height="4.1684in" presentation:class="outline" presentation:placeholder="false">
        <draw:text-box>
          <text:list text:style-name="a529">
            <text:list-item>
              <text:p text:style-name="a528" text:class-names="" text:cond-style-name=""><text:span text:style-name="a527" text:class-names="">Click to edit Master text styles</text:span></text:p>
            </text:list-item>
          </text:list>
        </draw:text-box>
        <svg:title/>
        <svg:desc/>
      </draw:frame>
      <draw:frame draw:id="id57" draw:layer="Master1-bg" presentation:style-name="a535" draw:name="Date Placeholder 4" svg:x="8.02395in" svg:y="6.9979in" svg:width="4.58651in" svg:height="0.39931in" presentation:class="date-time" presentation:placeholder="false">
        <draw:text-box>
          <text:p text:style-name="a534" text:class-names="" text:cond-style-name=""><text:span text:style-name="a531" text:class-names=""><text:date text:fixed="false" style:data-style-name="a532">3/21/2026</text:date></text:span><text:span text:style-name="a533" text:class-names=""/></text:p>
        </draw:text-box>
        <svg:title/>
        <svg:desc/>
      </draw:frame>
      <draw:frame draw:id="id58" draw:layer="Master1-bg" presentation:style-name="a538" draw:name="Footer Placeholder 5" svg:x="0.16889in" svg:y="6.9979in" svg:width="4.91832in" svg:height="0.39931in" presentation:class="footer" presentation:placeholder="false">
        <draw:text-box>
          <text:p text:style-name="a537" text:class-names="" text:cond-style-name=""><text:span text:style-name="a536" text:class-names=""/></text:p>
        </draw:text-box>
        <svg:title/>
        <svg:desc/>
      </draw:frame>
      <draw:frame draw:id="id59" draw:layer="Master1-bg" presentation:style-name="a542" draw:name="Slide Number Placeholder 6" svg:x="12.68862in" svg:y="6.9979in" svg:width="0.51497in" svg:height="0.39931in" presentation:class="page-number" presentation:placeholder="false">
        <draw:text-box>
          <text:p text:style-name="a541" text:class-names="" text:cond-style-name=""><text:span text:style-name="a539" text:class-names=""><text:page-number style:num-format="1" text:fixed="false">‹N›</text:page-number></text:span><text:span text:style-name="a540" text:class-names=""/></text:p>
        </draw:text-box>
        <svg:title/>
        <svg:desc/>
      </draw:frame>
      <presentation:notes style:page-layout-name="pageLayout2" draw:style-name="a574">
        <draw:frame draw:id="id12" presentation:style-name="a545" draw:name="Header Placeholder 1" svg:x="0in" svg:y="0in" svg:width="3.25in" svg:height="0.50174in" presentation:class="header" presentation:placeholder="false">
          <draw:text-box>
            <text:p text:style-name="a544" text:class-names="" text:cond-style-name=""><text:span text:style-name="a543" text:class-names=""/></text:p>
          </draw:text-box>
          <svg:title/>
          <svg:desc/>
        </draw:frame>
        <draw:frame draw:id="id13" presentation:style-name="a550" draw:name="Date Placeholder 2" svg:x="4.24826in" svg:y="0in" svg:width="3.25in" svg:height="0.50174in" presentation:class="date-time" presentation:placeholder="false">
          <draw:text-box>
            <text:p text:style-name="a549" text:class-names="" text:cond-style-name=""><text:span text:style-name="a546" text:class-names=""><text:date text:fixed="false" style:data-style-name="a547">3/21/2026</text:date></text:span><text:span text:style-name="a548" text:class-names=""/></text:p>
          </draw:text-box>
          <svg:title/>
          <svg:desc/>
        </draw:frame>
        <draw:page-thumbnail svg:x="0.75in" svg:y="1.25in" svg:width="6in" svg:height="3.375in" presentation:class="page" draw:id="id14" presentation:style-name="a551" draw:name="Slide Image Placeholder 3">
          <svg:title/>
          <svg:desc/>
        </draw:page-thumbnail>
        <draw:frame draw:id="id15" presentation:style-name="a566" draw:name="Notes Placeholder 4" svg:x="0.75in" svg:y="4.8125in" svg:width="6in" svg:height="3.9375in" presentation:class="notes" presentation:placeholder="false">
          <draw:text-box>
            <text:p text:style-name="a553" text:class-names="" text:cond-style-name=""><text:span text:style-name="a552" text:class-names="">Click to edit Master text styles</text:span></text:p>
            <text:list text:style-name="a556">
              <text:list-item>
                <text:list text:style-name="a556">
                  <text:list-item>
                    <text:p text:style-name="a555" text:class-names="" text:cond-style-name=""><text:span text:style-name="a554" text:class-names="">Second level</text:span></text:p>
                  </text:list-item>
                </text:list>
              </text:list-item>
            </text:list>
            <text:list text:style-name="a559">
              <text:list-item>
                <text:list text:style-name="a559">
                  <text:list-item>
                    <text:list text:style-name="a559">
                      <text:list-item>
                        <text:p text:style-name="a558" text:class-names="" text:cond-style-name=""><text:span text:style-name="a55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62">
              <text:list-item>
                <text:list text:style-name="a562">
                  <text:list-item>
                    <text:list text:style-name="a562">
                      <text:list-item>
                        <text:list text:style-name="a562">
                          <text:list-item>
                            <text:p text:style-name="a561" text:class-names="" text:cond-style-name=""><text:span text:style-name="a56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5">
              <text:list-item>
                <text:list text:style-name="a565">
                  <text:list-item>
                    <text:list text:style-name="a565">
                      <text:list-item>
                        <text:list text:style-name="a565">
                          <text:list-item>
                            <text:list text:style-name="a565">
                              <text:list-item>
                                <text:p text:style-name="a564" text:class-names="" text:cond-style-name=""><text:span text:style-name="a56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569" draw:name="Footer Placeholder 5" svg:x="0in" svg:y="9.49826in" svg:width="3.25in" svg:height="0.50174in" presentation:class="footer" presentation:placeholder="false">
          <draw:text-box>
            <text:p text:style-name="a568" text:class-names="" text:cond-style-name=""><text:span text:style-name="a567" text:class-names=""/></text:p>
          </draw:text-box>
          <svg:title/>
          <svg:desc/>
        </draw:frame>
        <draw:frame draw:id="id17" presentation:style-name="a573" draw:name="Slide Number Placeholder 6" svg:x="4.24826in" svg:y="9.49826in" svg:width="3.25in" svg:height="0.50174in" presentation:class="page-number" presentation:placeholder="false">
          <draw:text-box>
            <text:p text:style-name="a572" text:class-names="" text:cond-style-name=""><text:span text:style-name="a570" text:class-names=""><text:page-number style:num-format="1" text:fixed="false">‹N›</text:page-number></text:span><text:span text:style-name="a571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75">
      <draw:frame draw:id="id60" draw:layer="Master1-bg" presentation:style-name="a578" draw:name="Title 1" svg:x="0.9184in" svg:y="0.5in" svg:width="4.30035in" svg:height="1.75in" presentation:class="title" presentation:placeholder="false">
        <draw:text-box>
          <text:p text:style-name="a577" text:class-names="" text:cond-style-name=""><text:span text:style-name="a576" text:class-names="">Click to edit Master title style</text:span></text:p>
        </draw:text-box>
        <svg:title/>
        <svg:desc/>
      </draw:frame>
      <draw:frame draw:id="id61" draw:layer="Master1-bg" presentation:style-name="a581" draw:name="Picture Placeholder 2" svg:x="5.6684in" svg:y="1.07986in" svg:width="6.75in" svg:height="5.32986in" presentation:class="graphic" presentation:placeholder="false">
        <draw:text-box>
          <text:p text:style-name="a580" text:class-names="" text:cond-style-name=""><text:span text:style-name="a579" text:class-names="">Click icon to add picture</text:span></text:p>
        </draw:text-box>
        <svg:title/>
        <svg:desc/>
      </draw:frame>
      <draw:frame draw:id="id62" draw:layer="Master1-bg" presentation:style-name="a585" draw:name="Text Placeholder 3" svg:x="0.9184in" svg:y="2.25in" svg:width="4.30035in" svg:height="4.1684in" presentation:class="outline" presentation:placeholder="false">
        <draw:text-box>
          <text:list text:style-name="a584">
            <text:list-item>
              <text:p text:style-name="a583" text:class-names="" text:cond-style-name=""><text:span text:style-name="a582" text:class-names="">Click to edit Master text styles</text:span></text:p>
            </text:list-item>
          </text:list>
        </draw:text-box>
        <svg:title/>
        <svg:desc/>
      </draw:frame>
      <draw:frame draw:id="id63" draw:layer="Master1-bg" presentation:style-name="a590" draw:name="Date Placeholder 4" svg:x="8.02395in" svg:y="6.9979in" svg:width="4.58651in" svg:height="0.39931in" presentation:class="date-time" presentation:placeholder="false">
        <draw:text-box>
          <text:p text:style-name="a589" text:class-names="" text:cond-style-name=""><text:span text:style-name="a586" text:class-names=""><text:date text:fixed="false" style:data-style-name="a587">3/21/2026</text:date></text:span><text:span text:style-name="a588" text:class-names=""/></text:p>
        </draw:text-box>
        <svg:title/>
        <svg:desc/>
      </draw:frame>
      <draw:frame draw:id="id64" draw:layer="Master1-bg" presentation:style-name="a593" draw:name="Footer Placeholder 5" svg:x="0.16889in" svg:y="6.9979in" svg:width="4.91832in" svg:height="0.39931in" presentation:class="footer" presentation:placeholder="false">
        <draw:text-box>
          <text:p text:style-name="a592" text:class-names="" text:cond-style-name=""><text:span text:style-name="a591" text:class-names=""/></text:p>
        </draw:text-box>
        <svg:title/>
        <svg:desc/>
      </draw:frame>
      <draw:frame draw:id="id65" draw:layer="Master1-bg" presentation:style-name="a597" draw:name="Slide Number Placeholder 6" svg:x="12.68862in" svg:y="6.9979in" svg:width="0.51497in" svg:height="0.39931in" presentation:class="page-number" presentation:placeholder="false">
        <draw:text-box>
          <text:p text:style-name="a596" text:class-names="" text:cond-style-name=""><text:span text:style-name="a594" text:class-names=""><text:page-number style:num-format="1" text:fixed="false">‹N›</text:page-number></text:span><text:span text:style-name="a595" text:class-names=""/></text:p>
        </draw:text-box>
        <svg:title/>
        <svg:desc/>
      </draw:frame>
      <presentation:notes style:page-layout-name="pageLayout2" draw:style-name="a629">
        <draw:frame draw:id="id12" presentation:style-name="a600" draw:name="Header Placeholder 1" svg:x="0in" svg:y="0in" svg:width="3.25in" svg:height="0.50174in" presentation:class="header" presentation:placeholder="false">
          <draw:text-box>
            <text:p text:style-name="a599" text:class-names="" text:cond-style-name=""><text:span text:style-name="a598" text:class-names=""/></text:p>
          </draw:text-box>
          <svg:title/>
          <svg:desc/>
        </draw:frame>
        <draw:frame draw:id="id13" presentation:style-name="a605" draw:name="Date Placeholder 2" svg:x="4.24826in" svg:y="0in" svg:width="3.25in" svg:height="0.50174in" presentation:class="date-time" presentation:placeholder="false">
          <draw:text-box>
            <text:p text:style-name="a604" text:class-names="" text:cond-style-name=""><text:span text:style-name="a601" text:class-names=""><text:date text:fixed="false" style:data-style-name="a602">3/21/2026</text:date></text:span><text:span text:style-name="a603" text:class-names=""/></text:p>
          </draw:text-box>
          <svg:title/>
          <svg:desc/>
        </draw:frame>
        <draw:page-thumbnail svg:x="0.75in" svg:y="1.25in" svg:width="6in" svg:height="3.375in" presentation:class="page" draw:id="id14" presentation:style-name="a606" draw:name="Slide Image Placeholder 3">
          <svg:title/>
          <svg:desc/>
        </draw:page-thumbnail>
        <draw:frame draw:id="id15" presentation:style-name="a621" draw:name="Notes Placeholder 4" svg:x="0.75in" svg:y="4.8125in" svg:width="6in" svg:height="3.9375in" presentation:class="notes" presentation:placeholder="false">
          <draw:text-box>
            <text:p text:style-name="a608" text:class-names="" text:cond-style-name=""><text:span text:style-name="a607" text:class-names="">Click to edit Master text styles</text:span></text:p>
            <text:list text:style-name="a611">
              <text:list-item>
                <text:list text:style-name="a611">
                  <text:list-item>
                    <text:p text:style-name="a610" text:class-names="" text:cond-style-name=""><text:span text:style-name="a609" text:class-names="">Second level</text:span></text:p>
                  </text:list-item>
                </text:list>
              </text:list-item>
            </text:list>
            <text:list text:style-name="a614">
              <text:list-item>
                <text:list text:style-name="a614">
                  <text:list-item>
                    <text:list text:style-name="a614">
                      <text:list-item>
                        <text:p text:style-name="a613" text:class-names="" text:cond-style-name=""><text:span text:style-name="a61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17">
              <text:list-item>
                <text:list text:style-name="a617">
                  <text:list-item>
                    <text:list text:style-name="a617">
                      <text:list-item>
                        <text:list text:style-name="a617">
                          <text:list-item>
                            <text:p text:style-name="a616" text:class-names="" text:cond-style-name=""><text:span text:style-name="a61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0">
              <text:list-item>
                <text:list text:style-name="a620">
                  <text:list-item>
                    <text:list text:style-name="a620">
                      <text:list-item>
                        <text:list text:style-name="a620">
                          <text:list-item>
                            <text:list text:style-name="a620">
                              <text:list-item>
                                <text:p text:style-name="a619" text:class-names="" text:cond-style-name=""><text:span text:style-name="a61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624" draw:name="Footer Placeholder 5" svg:x="0in" svg:y="9.49826in" svg:width="3.25in" svg:height="0.50174in" presentation:class="footer" presentation:placeholder="false">
          <draw:text-box>
            <text:p text:style-name="a623" text:class-names="" text:cond-style-name=""><text:span text:style-name="a622" text:class-names=""/></text:p>
          </draw:text-box>
          <svg:title/>
          <svg:desc/>
        </draw:frame>
        <draw:frame draw:id="id17" presentation:style-name="a628" draw:name="Slide Number Placeholder 6" svg:x="4.24826in" svg:y="9.49826in" svg:width="3.25in" svg:height="0.50174in" presentation:class="page-number" presentation:placeholder="false">
          <draw:text-box>
            <text:p text:style-name="a627" text:class-names="" text:cond-style-name=""><text:span text:style-name="a625" text:class-names=""><text:page-number style:num-format="1" text:fixed="false">‹N›</text:page-number></text:span><text:span text:style-name="a626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30">
      <draw:frame draw:id="id66" draw:layer="Master1-bg" presentation:style-name="a633" draw:name="Title 1" svg:x="1.25in" svg:y="0.58333in" svg:width="10.83333in" svg:height="1.51154in" presentation:class="title" presentation:placeholder="false">
        <draw:text-box>
          <text:p text:style-name="a632" text:class-names="" text:cond-style-name=""><text:span text:style-name="a631" text:class-names="">Click to edit Master title style</text:span></text:p>
        </draw:text-box>
        <svg:title/>
        <svg:desc/>
      </draw:frame>
      <draw:frame draw:id="id67" draw:layer="Master1-bg" presentation:style-name="a649" draw:name="Vertical Text Placeholder 2" svg:x="1.25in" svg:y="2.19767in" svg:width="10.83333in" svg:height="4.40116in" presentation:class="outline" presentation:placeholder="false">
        <draw:text-box>
          <text:list text:style-name="a636">
            <text:list-item>
              <text:p text:style-name="a635" text:class-names="" text:cond-style-name=""><text:span text:style-name="a634" text:class-names="">Click to edit Master text styles</text:span></text:p>
            </text:list-item>
          </text:list>
          <text:list text:style-name="a639">
            <text:list-item>
              <text:list text:style-name="a639">
                <text:list-item>
                  <text:p text:style-name="a638" text:class-names="" text:cond-style-name=""><text:span text:style-name="a637" text:class-names="">Second level</text:span></text:p>
                </text:list-item>
              </text:list>
            </text:list-item>
          </text:list>
          <text:list text:style-name="a642">
            <text:list-item>
              <text:list text:style-name="a642">
                <text:list-item>
                  <text:list text:style-name="a642">
                    <text:list-item>
                      <text:p text:style-name="a641" text:class-names="" text:cond-style-name=""><text:span text:style-name="a640" text:class-names="">Third level</text:span></text:p>
                    </text:list-item>
                  </text:list>
                </text:list-item>
              </text:list>
            </text:list-item>
          </text:list>
          <text:list text:style-name="a645">
            <text:list-item>
              <text:list text:style-name="a645">
                <text:list-item>
                  <text:list text:style-name="a645">
                    <text:list-item>
                      <text:list text:style-name="a645">
                        <text:list-item>
                          <text:p text:style-name="a644" text:class-names="" text:cond-style-name=""><text:span text:style-name="a64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48">
            <text:list-item>
              <text:list text:style-name="a648">
                <text:list-item>
                  <text:list text:style-name="a648">
                    <text:list-item>
                      <text:list text:style-name="a648">
                        <text:list-item>
                          <text:list text:style-name="a648">
                            <text:list-item>
                              <text:p text:style-name="a647" text:class-names="" text:cond-style-name=""><text:span text:style-name="a64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draw:layer="Master1-bg" presentation:style-name="a654" draw:name="Date Placeholder 3" svg:x="8.02395in" svg:y="6.9979in" svg:width="4.58651in" svg:height="0.39931in" presentation:class="date-time" presentation:placeholder="false">
        <draw:text-box>
          <text:p text:style-name="a653" text:class-names="" text:cond-style-name=""><text:span text:style-name="a650" text:class-names=""><text:date text:fixed="false" style:data-style-name="a651">3/21/2026</text:date></text:span><text:span text:style-name="a652" text:class-names=""/></text:p>
        </draw:text-box>
        <svg:title/>
        <svg:desc/>
      </draw:frame>
      <draw:frame draw:id="id69" draw:layer="Master1-bg" presentation:style-name="a657" draw:name="Footer Placeholder 4" svg:x="0.16889in" svg:y="6.9979in" svg:width="4.91832in" svg:height="0.39931in" presentation:class="footer" presentation:placeholder="false">
        <draw:text-box>
          <text:p text:style-name="a656" text:class-names="" text:cond-style-name=""><text:span text:style-name="a655" text:class-names=""/></text:p>
        </draw:text-box>
        <svg:title/>
        <svg:desc/>
      </draw:frame>
      <draw:frame draw:id="id70" draw:layer="Master1-bg" presentation:style-name="a661" draw:name="Slide Number Placeholder 5" svg:x="12.68862in" svg:y="6.9979in" svg:width="0.51497in" svg:height="0.39931in" presentation:class="page-number" presentation:placeholder="false">
        <draw:text-box>
          <text:p text:style-name="a660" text:class-names="" text:cond-style-name=""><text:span text:style-name="a658" text:class-names=""><text:page-number style:num-format="1" text:fixed="false">‹N›</text:page-number></text:span><text:span text:style-name="a659" text:class-names=""/></text:p>
        </draw:text-box>
        <svg:title/>
        <svg:desc/>
      </draw:frame>
      <presentation:notes style:page-layout-name="pageLayout2" draw:style-name="a693">
        <draw:frame draw:id="id12" presentation:style-name="a664" draw:name="Header Placeholder 1" svg:x="0in" svg:y="0in" svg:width="3.25in" svg:height="0.50174in" presentation:class="header" presentation:placeholder="false">
          <draw:text-box>
            <text:p text:style-name="a663" text:class-names="" text:cond-style-name=""><text:span text:style-name="a662" text:class-names=""/></text:p>
          </draw:text-box>
          <svg:title/>
          <svg:desc/>
        </draw:frame>
        <draw:frame draw:id="id13" presentation:style-name="a669" draw:name="Date Placeholder 2" svg:x="4.24826in" svg:y="0in" svg:width="3.25in" svg:height="0.50174in" presentation:class="date-time" presentation:placeholder="false">
          <draw:text-box>
            <text:p text:style-name="a668" text:class-names="" text:cond-style-name=""><text:span text:style-name="a665" text:class-names=""><text:date text:fixed="false" style:data-style-name="a666">3/21/2026</text:date></text:span><text:span text:style-name="a667" text:class-names=""/></text:p>
          </draw:text-box>
          <svg:title/>
          <svg:desc/>
        </draw:frame>
        <draw:page-thumbnail svg:x="0.75in" svg:y="1.25in" svg:width="6in" svg:height="3.375in" presentation:class="page" draw:id="id14" presentation:style-name="a670" draw:name="Slide Image Placeholder 3">
          <svg:title/>
          <svg:desc/>
        </draw:page-thumbnail>
        <draw:frame draw:id="id15" presentation:style-name="a685" draw:name="Notes Placeholder 4" svg:x="0.75in" svg:y="4.8125in" svg:width="6in" svg:height="3.9375in" presentation:class="notes" presentation:placeholder="false">
          <draw:text-box>
            <text:p text:style-name="a672" text:class-names="" text:cond-style-name=""><text:span text:style-name="a671" text:class-names="">Click to edit Master text styles</text:span></text:p>
            <text:list text:style-name="a675">
              <text:list-item>
                <text:list text:style-name="a675">
                  <text:list-item>
                    <text:p text:style-name="a674" text:class-names="" text:cond-style-name=""><text:span text:style-name="a673" text:class-names="">Second level</text:span></text:p>
                  </text:list-item>
                </text:list>
              </text:list-item>
            </text:list>
            <text:list text:style-name="a678">
              <text:list-item>
                <text:list text:style-name="a678">
                  <text:list-item>
                    <text:list text:style-name="a678">
                      <text:list-item>
                        <text:p text:style-name="a677" text:class-names="" text:cond-style-name=""><text:span text:style-name="a67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81">
              <text:list-item>
                <text:list text:style-name="a681">
                  <text:list-item>
                    <text:list text:style-name="a681">
                      <text:list-item>
                        <text:list text:style-name="a681">
                          <text:list-item>
                            <text:p text:style-name="a680" text:class-names="" text:cond-style-name=""><text:span text:style-name="a67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4">
              <text:list-item>
                <text:list text:style-name="a684">
                  <text:list-item>
                    <text:list text:style-name="a684">
                      <text:list-item>
                        <text:list text:style-name="a684">
                          <text:list-item>
                            <text:list text:style-name="a684">
                              <text:list-item>
                                <text:p text:style-name="a683" text:class-names="" text:cond-style-name=""><text:span text:style-name="a68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688" draw:name="Footer Placeholder 5" svg:x="0in" svg:y="9.49826in" svg:width="3.25in" svg:height="0.50174in" presentation:class="footer" presentation:placeholder="false">
          <draw:text-box>
            <text:p text:style-name="a687" text:class-names="" text:cond-style-name=""><text:span text:style-name="a686" text:class-names=""/></text:p>
          </draw:text-box>
          <svg:title/>
          <svg:desc/>
        </draw:frame>
        <draw:frame draw:id="id17" presentation:style-name="a692" draw:name="Slide Number Placeholder 6" svg:x="4.24826in" svg:y="9.49826in" svg:width="3.25in" svg:height="0.50174in" presentation:class="page-number" presentation:placeholder="false">
          <draw:text-box>
            <text:p text:style-name="a691" text:class-names="" text:cond-style-name=""><text:span text:style-name="a689" text:class-names=""><text:page-number style:num-format="1" text:fixed="false">‹N›</text:page-number></text:span><text:span text:style-name="a690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94">
      <draw:frame draw:id="id71" draw:layer="Master1-bg" presentation:style-name="a697" draw:name="Vertical Title 1" svg:x="9.54167in" svg:y="0.39931in" svg:width="2.875in" svg:height="6.3559in" presentation:class="title" presentation:placeholder="false">
        <draw:text-box>
          <text:p text:style-name="a696" text:class-names="" text:cond-style-name=""><text:span text:style-name="a695" text:class-names="">Click to edit Master title style</text:span></text:p>
        </draw:text-box>
        <svg:title/>
        <svg:desc/>
      </draw:frame>
      <draw:frame draw:id="id72" draw:layer="Master1-bg" presentation:style-name="a713" draw:name="Vertical Text Placeholder 2" svg:x="0.91667in" svg:y="0.39931in" svg:width="8.45833in" svg:height="6.3559in" presentation:class="outline" presentation:placeholder="false">
        <draw:text-box>
          <text:list text:style-name="a700">
            <text:list-item>
              <text:p text:style-name="a699" text:class-names="" text:cond-style-name=""><text:span text:style-name="a698" text:class-names="">Click to edit Master text styles</text:span></text:p>
            </text:list-item>
          </text:list>
          <text:list text:style-name="a703">
            <text:list-item>
              <text:list text:style-name="a703">
                <text:list-item>
                  <text:p text:style-name="a702" text:class-names="" text:cond-style-name=""><text:span text:style-name="a701" text:class-names="">Second level</text:span></text:p>
                </text:list-item>
              </text:list>
            </text:list-item>
          </text:list>
          <text:list text:style-name="a706">
            <text:list-item>
              <text:list text:style-name="a706">
                <text:list-item>
                  <text:list text:style-name="a706">
                    <text:list-item>
                      <text:p text:style-name="a705" text:class-names="" text:cond-style-name=""><text:span text:style-name="a704" text:class-names="">Third level</text:span></text:p>
                    </text:list-item>
                  </text:list>
                </text:list-item>
              </text:list>
            </text:list-item>
          </text:list>
          <text:list text:style-name="a709">
            <text:list-item>
              <text:list text:style-name="a709">
                <text:list-item>
                  <text:list text:style-name="a709">
                    <text:list-item>
                      <text:list text:style-name="a709">
                        <text:list-item>
                          <text:p text:style-name="a708" text:class-names="" text:cond-style-name=""><text:span text:style-name="a7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2">
            <text:list-item>
              <text:list text:style-name="a712">
                <text:list-item>
                  <text:list text:style-name="a712">
                    <text:list-item>
                      <text:list text:style-name="a712">
                        <text:list-item>
                          <text:list text:style-name="a712">
                            <text:list-item>
                              <text:p text:style-name="a711" text:class-names="" text:cond-style-name=""><text:span text:style-name="a71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3" draw:layer="Master1-bg" presentation:style-name="a718" draw:name="Date Placeholder 3" svg:x="8.02395in" svg:y="6.9979in" svg:width="4.58651in" svg:height="0.39931in" presentation:class="date-time" presentation:placeholder="false">
        <draw:text-box>
          <text:p text:style-name="a717" text:class-names="" text:cond-style-name=""><text:span text:style-name="a714" text:class-names=""><text:date text:fixed="false" style:data-style-name="a715">3/21/2026</text:date></text:span><text:span text:style-name="a716" text:class-names=""/></text:p>
        </draw:text-box>
        <svg:title/>
        <svg:desc/>
      </draw:frame>
      <draw:frame draw:id="id74" draw:layer="Master1-bg" presentation:style-name="a721" draw:name="Footer Placeholder 4" svg:x="0.16889in" svg:y="6.9979in" svg:width="4.91832in" svg:height="0.39931in" presentation:class="footer" presentation:placeholder="false">
        <draw:text-box>
          <text:p text:style-name="a720" text:class-names="" text:cond-style-name=""><text:span text:style-name="a719" text:class-names=""/></text:p>
        </draw:text-box>
        <svg:title/>
        <svg:desc/>
      </draw:frame>
      <draw:frame draw:id="id75" draw:layer="Master1-bg" presentation:style-name="a725" draw:name="Slide Number Placeholder 5" svg:x="12.68862in" svg:y="6.9979in" svg:width="0.51497in" svg:height="0.39931in" presentation:class="page-number" presentation:placeholder="false">
        <draw:text-box>
          <text:p text:style-name="a724" text:class-names="" text:cond-style-name=""><text:span text:style-name="a722" text:class-names=""><text:page-number style:num-format="1" text:fixed="false">‹N›</text:page-number></text:span><text:span text:style-name="a723" text:class-names=""/></text:p>
        </draw:text-box>
        <svg:title/>
        <svg:desc/>
      </draw:frame>
      <presentation:notes style:page-layout-name="pageLayout2" draw:style-name="a757">
        <draw:frame draw:id="id12" presentation:style-name="a728" draw:name="Header Placeholder 1" svg:x="0in" svg:y="0in" svg:width="3.25in" svg:height="0.50174in" presentation:class="header" presentation:placeholder="false">
          <draw:text-box>
            <text:p text:style-name="a727" text:class-names="" text:cond-style-name=""><text:span text:style-name="a726" text:class-names=""/></text:p>
          </draw:text-box>
          <svg:title/>
          <svg:desc/>
        </draw:frame>
        <draw:frame draw:id="id13" presentation:style-name="a733" draw:name="Date Placeholder 2" svg:x="4.24826in" svg:y="0in" svg:width="3.25in" svg:height="0.50174in" presentation:class="date-time" presentation:placeholder="false">
          <draw:text-box>
            <text:p text:style-name="a732" text:class-names="" text:cond-style-name=""><text:span text:style-name="a729" text:class-names=""><text:date text:fixed="false" style:data-style-name="a730">3/21/2026</text:date></text:span><text:span text:style-name="a731" text:class-names=""/></text:p>
          </draw:text-box>
          <svg:title/>
          <svg:desc/>
        </draw:frame>
        <draw:page-thumbnail svg:x="0.75in" svg:y="1.25in" svg:width="6in" svg:height="3.375in" presentation:class="page" draw:id="id14" presentation:style-name="a734" draw:name="Slide Image Placeholder 3">
          <svg:title/>
          <svg:desc/>
        </draw:page-thumbnail>
        <draw:frame draw:id="id15" presentation:style-name="a749" draw:name="Notes Placeholder 4" svg:x="0.75in" svg:y="4.8125in" svg:width="6in" svg:height="3.9375in" presentation:class="notes" presentation:placeholder="false">
          <draw:text-box>
            <text:p text:style-name="a736" text:class-names="" text:cond-style-name=""><text:span text:style-name="a735" text:class-names="">Click to edit Master text styles</text:span></text:p>
            <text:list text:style-name="a739">
              <text:list-item>
                <text:list text:style-name="a739">
                  <text:list-item>
                    <text:p text:style-name="a738" text:class-names="" text:cond-style-name=""><text:span text:style-name="a737" text:class-names="">Second level</text:span></text:p>
                  </text:list-item>
                </text:list>
              </text:list-item>
            </text:list>
            <text:list text:style-name="a742">
              <text:list-item>
                <text:list text:style-name="a742">
                  <text:list-item>
                    <text:list text:style-name="a742">
                      <text:list-item>
                        <text:p text:style-name="a741" text:class-names="" text:cond-style-name=""><text:span text:style-name="a74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45">
              <text:list-item>
                <text:list text:style-name="a745">
                  <text:list-item>
                    <text:list text:style-name="a745">
                      <text:list-item>
                        <text:list text:style-name="a745">
                          <text:list-item>
                            <text:p text:style-name="a744" text:class-names="" text:cond-style-name=""><text:span text:style-name="a74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48">
              <text:list-item>
                <text:list text:style-name="a748">
                  <text:list-item>
                    <text:list text:style-name="a748">
                      <text:list-item>
                        <text:list text:style-name="a748">
                          <text:list-item>
                            <text:list text:style-name="a748">
                              <text:list-item>
                                <text:p text:style-name="a747" text:class-names="" text:cond-style-name=""><text:span text:style-name="a74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752" draw:name="Footer Placeholder 5" svg:x="0in" svg:y="9.49826in" svg:width="3.25in" svg:height="0.50174in" presentation:class="footer" presentation:placeholder="false">
          <draw:text-box>
            <text:p text:style-name="a751" text:class-names="" text:cond-style-name=""><text:span text:style-name="a750" text:class-names=""/></text:p>
          </draw:text-box>
          <svg:title/>
          <svg:desc/>
        </draw:frame>
        <draw:frame draw:id="id17" presentation:style-name="a756" draw:name="Slide Number Placeholder 6" svg:x="4.24826in" svg:y="9.49826in" svg:width="3.25in" svg:height="0.50174in" presentation:class="page-number" presentation:placeholder="false">
          <draw:text-box>
            <text:p text:style-name="a755" text:class-names="" text:cond-style-name=""><text:span text:style-name="a753" text:class-names=""><text:page-number style:num-format="1" text:fixed="false">‹N›</text:page-number></text:span><text:span text:style-name="a754" text:class-names=""/></text:p>
          </draw:text-box>
          <svg:title/>
          <svg:desc/>
        </draw:frame>
      </presentation:notes>
    </style:master-page>
    <style:master-page style:name="Master1-Layout12-cust-1_Title-only" style:page-layout-name="pageLayout1" draw:style-name="a758">
      <draw:connector draw:type="line" svg:x1="3.41177in" svg:y1="0in" svg:x2="0in" svg:y2="0.75in" draw:id="id76" draw:layer="Master1-bg" draw:style-name="a759" draw:name="Straight Connector 6">
        <svg:title/>
        <svg:desc/>
      </draw:connector>
      <draw:connector draw:type="line" svg:x1="0.98837in" svg:y1="0in" svg:x2="0in" svg:y2="7.15625in" draw:id="id77" draw:layer="Master1-bg" draw:style-name="a760" draw:name="Straight Connector 7">
        <svg:title/>
        <svg:desc/>
      </draw:connector>
      <draw:frame draw:id="id78" draw:layer="Master1-bg" presentation:style-name="a763" draw:name="Title 1" svg:x="0.93774in" svg:y="0.53165in" svg:width="5.93568in" svg:height="3.93671in" presentation:class="title" presentation:placeholder="false">
        <draw:text-box>
          <text:p text:style-name="a762" text:class-names="" text:cond-style-name=""><text:span text:style-name="a761" text:class-names="">Click to add title</text:span></text:p>
        </draw:text-box>
        <svg:title/>
        <svg:desc/>
      </draw:frame>
      <draw:frame draw:id="id79" draw:layer="Master1-bg" presentation:style-name="a766" draw:name="Picture Placeholder 12" svg:x="6.15133in" svg:y="-0.00734in" svg:width="7.19466in" svg:height="7.54in" presentation:class="graphic" presentation:placeholder="false">
        <draw:text-box>
          <text:p text:style-name="a765" text:class-names="" text:cond-style-name=""><text:span text:style-name="a764" text:class-names="">Click icon to add picture</text:span></text:p>
        </draw:text-box>
        <svg:title/>
        <svg:desc/>
      </draw:frame>
      <presentation:notes style:page-layout-name="pageLayout2" draw:style-name="a798">
        <draw:frame draw:id="id12" presentation:style-name="a769" draw:name="Header Placeholder 1" svg:x="0in" svg:y="0in" svg:width="3.25in" svg:height="0.50174in" presentation:class="header" presentation:placeholder="false">
          <draw:text-box>
            <text:p text:style-name="a768" text:class-names="" text:cond-style-name=""><text:span text:style-name="a767" text:class-names=""/></text:p>
          </draw:text-box>
          <svg:title/>
          <svg:desc/>
        </draw:frame>
        <draw:frame draw:id="id13" presentation:style-name="a774" draw:name="Date Placeholder 2" svg:x="4.24826in" svg:y="0in" svg:width="3.25in" svg:height="0.50174in" presentation:class="date-time" presentation:placeholder="false">
          <draw:text-box>
            <text:p text:style-name="a773" text:class-names="" text:cond-style-name=""><text:span text:style-name="a770" text:class-names=""><text:date text:fixed="false" style:data-style-name="a771">3/21/2026</text:date></text:span><text:span text:style-name="a772" text:class-names=""/></text:p>
          </draw:text-box>
          <svg:title/>
          <svg:desc/>
        </draw:frame>
        <draw:page-thumbnail svg:x="0.75in" svg:y="1.25in" svg:width="6in" svg:height="3.375in" presentation:class="page" draw:id="id14" presentation:style-name="a775" draw:name="Slide Image Placeholder 3">
          <svg:title/>
          <svg:desc/>
        </draw:page-thumbnail>
        <draw:frame draw:id="id15" presentation:style-name="a790" draw:name="Notes Placeholder 4" svg:x="0.75in" svg:y="4.8125in" svg:width="6in" svg:height="3.9375in" presentation:class="notes" presentation:placeholder="false">
          <draw:text-box>
            <text:p text:style-name="a777" text:class-names="" text:cond-style-name=""><text:span text:style-name="a776" text:class-names="">Click to edit Master text styles</text:span></text:p>
            <text:list text:style-name="a780">
              <text:list-item>
                <text:list text:style-name="a780">
                  <text:list-item>
                    <text:p text:style-name="a779" text:class-names="" text:cond-style-name=""><text:span text:style-name="a778" text:class-names="">Second level</text:span></text:p>
                  </text:list-item>
                </text:list>
              </text:list-item>
            </text:list>
            <text:list text:style-name="a783">
              <text:list-item>
                <text:list text:style-name="a783">
                  <text:list-item>
                    <text:list text:style-name="a783">
                      <text:list-item>
                        <text:p text:style-name="a782" text:class-names="" text:cond-style-name=""><text:span text:style-name="a78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86">
              <text:list-item>
                <text:list text:style-name="a786">
                  <text:list-item>
                    <text:list text:style-name="a786">
                      <text:list-item>
                        <text:list text:style-name="a786">
                          <text:list-item>
                            <text:p text:style-name="a785" text:class-names="" text:cond-style-name=""><text:span text:style-name="a78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89">
              <text:list-item>
                <text:list text:style-name="a789">
                  <text:list-item>
                    <text:list text:style-name="a789">
                      <text:list-item>
                        <text:list text:style-name="a789">
                          <text:list-item>
                            <text:list text:style-name="a789">
                              <text:list-item>
                                <text:p text:style-name="a788" text:class-names="" text:cond-style-name=""><text:span text:style-name="a78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793" draw:name="Footer Placeholder 5" svg:x="0in" svg:y="9.49826in" svg:width="3.25in" svg:height="0.50174in" presentation:class="footer" presentation:placeholder="false">
          <draw:text-box>
            <text:p text:style-name="a792" text:class-names="" text:cond-style-name=""><text:span text:style-name="a791" text:class-names=""/></text:p>
          </draw:text-box>
          <svg:title/>
          <svg:desc/>
        </draw:frame>
        <draw:frame draw:id="id17" presentation:style-name="a797" draw:name="Slide Number Placeholder 6" svg:x="4.24826in" svg:y="9.49826in" svg:width="3.25in" svg:height="0.50174in" presentation:class="page-number" presentation:placeholder="false">
          <draw:text-box>
            <text:p text:style-name="a796" text:class-names="" text:cond-style-name=""><text:span text:style-name="a794" text:class-names=""><text:page-number style:num-format="1" text:fixed="false">‹N›</text:page-number></text:span><text:span text:style-name="a795" text:class-names=""/></text:p>
          </draw:text-box>
          <svg:title/>
          <svg:desc/>
        </draw:frame>
      </presentation:notes>
    </style:master-page>
    <style:master-page style:name="Master1-Layout13-cust-Content-2" style:page-layout-name="pageLayout1" draw:style-name="a799">
      <draw:custom-shape svg:x="-0.04688in" svg:y="0in" svg:width="5.09448in" svg:height="7.5in" draw:id="id80" draw:layer="Master1-bg" draw:style-name="a802" draw:name="Freeform 6">
        <svg:title/>
        <svg:desc/>
        <text:p text:style-name="a801" text:class-names="" text:cond-style-name=""><text:span text:style-name="a800" text:class-names=""/></text:p>
        <draw:enhanced-geometry xmlns:dr3d="urn:oasis:names:tc:opendocument:xmlns:dr3d:1.0" draw:type="non-primitive" svg:viewBox="0 0 4658392 6858000" draw:enhanced-path="M 0 0 L 4658392 0 2820797 6858000 0 6858000 0 0 Z N" draw:text-areas="?f18 ?f20 ?f19 ?f21" draw:glue-points="?f13 ?f14 ?f15 ?f14 ?f16 ?f17 ?f13 ?f17 ?f13 ?f14" draw:glue-point-leaving-directions="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4658392"/>
          <draw:equation draw:name="f7" draw:formula="?f4 / 6858000"/>
          <draw:equation draw:name="f8" draw:formula="0 * ?f5 / 4658392"/>
          <draw:equation draw:name="f9" draw:formula="0 * ?f4 / 6858000"/>
          <draw:equation draw:name="f10" draw:formula="4658392 * ?f5 / 4658392"/>
          <draw:equation draw:name="f11" draw:formula="2820797 * ?f5 / 4658392"/>
          <draw:equation draw:name="f12" draw:formula="6858000 * ?f4 / 6858000"/>
          <draw:equation draw:name="f13" draw:formula="?f8 / ?f6"/>
          <draw:equation draw:name="f14" draw:formula="?f9 / ?f7"/>
          <draw:equation draw:name="f15" draw:formula="?f10 / ?f6"/>
          <draw:equation draw:name="f16" draw:formula="?f11 / ?f6"/>
          <draw:equation draw:name="f17" draw:formula="?f12 / ?f7"/>
          <draw:equation draw:name="f18" draw:formula="?f0 / ?f6"/>
          <draw:equation draw:name="f19" draw:formula="?f1 / ?f6"/>
          <draw:equation draw:name="f20" draw:formula="?f2 / ?f7"/>
          <draw:equation draw:name="f21" draw:formula="?f3 / ?f7"/>
        </draw:enhanced-geometry>
      </draw:custom-shape>
      <draw:connector draw:type="line" svg:x1="6.82813in" svg:y1="7.5in" svg:x2="-0.04688in" svg:y2="6.33333in" draw:id="id81" draw:layer="Master1-bg" draw:style-name="a803" draw:name="Straight Connector 7">
        <svg:title/>
        <svg:desc/>
      </draw:connector>
      <draw:connector draw:type="line" svg:x1="3.41177in" svg:y1="0in" svg:x2="0in" svg:y2="0.75in" draw:id="id82" draw:layer="Master1-bg" draw:style-name="a804" draw:name="Straight Connector 8">
        <svg:title/>
        <svg:desc/>
      </draw:connector>
      <draw:connector draw:type="line" svg:x1="0.98837in" svg:y1="0in" svg:x2="0in" svg:y2="7.15625in" draw:id="id83" draw:layer="Master1-bg" draw:style-name="a805" draw:name="Straight Connector 9">
        <svg:title/>
        <svg:desc/>
      </draw:connector>
      <draw:frame draw:id="id84" draw:layer="Master1-bg" presentation:style-name="a808" draw:name="Title 1" svg:x="0.91667in" svg:y="0.55696in" svg:width="3.5in" svg:height="6.14304in" presentation:class="title" presentation:placeholder="false">
        <draw:text-box>
          <text:p text:style-name="a807" text:class-names="" text:cond-style-name=""><text:span text:style-name="a806" text:class-names="">Click to add title</text:span></text:p>
        </draw:text-box>
        <svg:title/>
        <svg:desc/>
      </draw:frame>
      <draw:frame draw:id="id85" draw:layer="Master1-bg" presentation:style-name="a823" draw:name="Content Placeholder 2" svg:x="5.49367in" svg:y="0.55696in" svg:width="4.73418in" svg:height="6.14304in" presentation:class="object" presentation:placeholder="false">
        <draw:text-box>
          <text:p text:style-name="a810" text:class-names="" text:cond-style-name=""><text:span text:style-name="a809" text:class-names="">Click to add text</text:span></text:p>
          <text:list text:style-name="a813">
            <text:list-item>
              <text:list text:style-name="a813">
                <text:list-item>
                  <text:p text:style-name="a812" text:class-names="" text:cond-style-name=""><text:span text:style-name="a811" text:class-names="">Second level</text:span></text:p>
                </text:list-item>
              </text:list>
            </text:list-item>
          </text:list>
          <text:list text:style-name="a816">
            <text:list-item>
              <text:list text:style-name="a816">
                <text:list-item>
                  <text:list text:style-name="a816">
                    <text:list-item>
                      <text:p text:style-name="a815" text:class-names="" text:cond-style-name=""><text:span text:style-name="a814" text:class-names="">Third level</text:span></text:p>
                    </text:list-item>
                  </text:list>
                </text:list-item>
              </text:list>
            </text:list-item>
          </text:list>
          <text:list text:style-name="a819">
            <text:list-item>
              <text:list text:style-name="a819">
                <text:list-item>
                  <text:list text:style-name="a819">
                    <text:list-item>
                      <text:list text:style-name="a819">
                        <text:list-item>
                          <text:p text:style-name="a818" text:class-names="" text:cond-style-name=""><text:span text:style-name="a8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22">
            <text:list-item>
              <text:list text:style-name="a822">
                <text:list-item>
                  <text:list text:style-name="a822">
                    <text:list-item>
                      <text:list text:style-name="a822">
                        <text:list-item>
                          <text:list text:style-name="a822">
                            <text:list-item>
                              <text:p text:style-name="a821" text:class-names="" text:cond-style-name=""><text:span text:style-name="a82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draw:layer="Master1-bg" presentation:style-name="a826" draw:name="Picture Placeholder 13" svg:x="10.44271in" svg:y="-0.025in" svg:width="2.9in" svg:height="7.55in" presentation:class="graphic" presentation:placeholder="false">
        <draw:text-box>
          <text:p text:style-name="a825" text:class-names="" text:cond-style-name=""><text:span text:style-name="a824" text:class-names="">Click icon to add picture</text:span></text:p>
        </draw:text-box>
        <svg:title/>
        <svg:desc/>
      </draw:frame>
      <draw:frame draw:id="id87" presentation:style-name="a831" draw:name="Date Placeholder 3" svg:x="8.02395in" svg:y="6.9979in" svg:width="4.58651in" svg:height="0.39931in" presentation:class="date-time" presentation:placeholder="false">
        <draw:text-box>
          <text:p text:style-name="a830" text:class-names="" text:cond-style-name=""><text:span text:style-name="a827" text:class-names=""><text:date text:fixed="false" style:data-style-name="a828">3/21/2026</text:date></text:span><text:span text:style-name="a829" text:class-names=""/></text:p>
        </draw:text-box>
        <svg:title/>
        <svg:desc/>
      </draw:frame>
      <draw:frame draw:id="id88" presentation:style-name="a834" draw:name="Footer Placeholder 4" svg:x="0.16889in" svg:y="6.9979in" svg:width="4.91832in" svg:height="0.39931in" presentation:class="footer" presentation:placeholder="false">
        <draw:text-box>
          <text:p text:style-name="a833" text:class-names="" text:cond-style-name=""><text:span text:style-name="a832" text:class-names=""/></text:p>
        </draw:text-box>
        <svg:title/>
        <svg:desc/>
      </draw:frame>
      <draw:frame draw:id="id89" presentation:style-name="a838" draw:name="Slide Number Placeholder 5" svg:x="12.68862in" svg:y="6.9979in" svg:width="0.51497in" svg:height="0.39931in" presentation:class="page-number" presentation:placeholder="false">
        <draw:text-box>
          <text:p text:style-name="a837" text:class-names="" text:cond-style-name=""><text:span text:style-name="a835" text:class-names=""><text:page-number style:num-format="1" text:fixed="false">‹N›</text:page-number></text:span><text:span text:style-name="a836" text:class-names=""/></text:p>
        </draw:text-box>
        <svg:title/>
        <svg:desc/>
      </draw:frame>
      <presentation:notes style:page-layout-name="pageLayout2" draw:style-name="a870">
        <draw:frame draw:id="id12" presentation:style-name="a841" draw:name="Header Placeholder 1" svg:x="0in" svg:y="0in" svg:width="3.25in" svg:height="0.50174in" presentation:class="header" presentation:placeholder="false">
          <draw:text-box>
            <text:p text:style-name="a840" text:class-names="" text:cond-style-name=""><text:span text:style-name="a839" text:class-names=""/></text:p>
          </draw:text-box>
          <svg:title/>
          <svg:desc/>
        </draw:frame>
        <draw:frame draw:id="id13" presentation:style-name="a846" draw:name="Date Placeholder 2" svg:x="4.24826in" svg:y="0in" svg:width="3.25in" svg:height="0.50174in" presentation:class="date-time" presentation:placeholder="false">
          <draw:text-box>
            <text:p text:style-name="a845" text:class-names="" text:cond-style-name=""><text:span text:style-name="a842" text:class-names=""><text:date text:fixed="false" style:data-style-name="a843">3/21/2026</text:date></text:span><text:span text:style-name="a844" text:class-names=""/></text:p>
          </draw:text-box>
          <svg:title/>
          <svg:desc/>
        </draw:frame>
        <draw:page-thumbnail svg:x="0.75in" svg:y="1.25in" svg:width="6in" svg:height="3.375in" presentation:class="page" draw:id="id14" presentation:style-name="a847" draw:name="Slide Image Placeholder 3">
          <svg:title/>
          <svg:desc/>
        </draw:page-thumbnail>
        <draw:frame draw:id="id15" presentation:style-name="a862" draw:name="Notes Placeholder 4" svg:x="0.75in" svg:y="4.8125in" svg:width="6in" svg:height="3.9375in" presentation:class="notes" presentation:placeholder="false">
          <draw:text-box>
            <text:p text:style-name="a849" text:class-names="" text:cond-style-name=""><text:span text:style-name="a848" text:class-names="">Click to edit Master text styles</text:span></text:p>
            <text:list text:style-name="a852">
              <text:list-item>
                <text:list text:style-name="a852">
                  <text:list-item>
                    <text:p text:style-name="a851" text:class-names="" text:cond-style-name=""><text:span text:style-name="a850" text:class-names="">Second level</text:span></text:p>
                  </text:list-item>
                </text:list>
              </text:list-item>
            </text:list>
            <text:list text:style-name="a855">
              <text:list-item>
                <text:list text:style-name="a855">
                  <text:list-item>
                    <text:list text:style-name="a855">
                      <text:list-item>
                        <text:p text:style-name="a854" text:class-names="" text:cond-style-name=""><text:span text:style-name="a85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58">
              <text:list-item>
                <text:list text:style-name="a858">
                  <text:list-item>
                    <text:list text:style-name="a858">
                      <text:list-item>
                        <text:list text:style-name="a858">
                          <text:list-item>
                            <text:p text:style-name="a857" text:class-names="" text:cond-style-name=""><text:span text:style-name="a85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61">
              <text:list-item>
                <text:list text:style-name="a861">
                  <text:list-item>
                    <text:list text:style-name="a861">
                      <text:list-item>
                        <text:list text:style-name="a861">
                          <text:list-item>
                            <text:list text:style-name="a861">
                              <text:list-item>
                                <text:p text:style-name="a860" text:class-names="" text:cond-style-name=""><text:span text:style-name="a85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865" draw:name="Footer Placeholder 5" svg:x="0in" svg:y="9.49826in" svg:width="3.25in" svg:height="0.50174in" presentation:class="footer" presentation:placeholder="false">
          <draw:text-box>
            <text:p text:style-name="a864" text:class-names="" text:cond-style-name=""><text:span text:style-name="a863" text:class-names=""/></text:p>
          </draw:text-box>
          <svg:title/>
          <svg:desc/>
        </draw:frame>
        <draw:frame draw:id="id17" presentation:style-name="a869" draw:name="Slide Number Placeholder 6" svg:x="4.24826in" svg:y="9.49826in" svg:width="3.25in" svg:height="0.50174in" presentation:class="page-number" presentation:placeholder="false">
          <draw:text-box>
            <text:p text:style-name="a868" text:class-names="" text:cond-style-name=""><text:span text:style-name="a866" text:class-names=""><text:page-number style:num-format="1" text:fixed="false">‹N›</text:page-number></text:span><text:span text:style-name="a867" text:class-names=""/></text:p>
          </draw:text-box>
          <svg:title/>
          <svg:desc/>
        </draw:frame>
      </presentation:notes>
    </style:master-page>
    <style:master-page style:name="Master1-Layout14-cust-Title-+-picture" style:page-layout-name="pageLayout1" draw:style-name="a871">
      <draw:connector draw:type="line" svg:x1="3.41177in" svg:y1="0in" svg:x2="0in" svg:y2="0.75in" draw:id="id90" draw:layer="Master1-bg" draw:style-name="a872" draw:name="Straight Connector 1">
        <svg:title/>
        <svg:desc/>
      </draw:connector>
      <draw:connector draw:type="line" svg:x1="13.33333in" svg:y1="4.65698in" svg:x2="11.79085in" svg:y2="0in" draw:id="id91" draw:layer="Master1-bg" draw:style-name="a873" draw:name="Straight Connector 2">
        <svg:title/>
        <svg:desc/>
      </draw:connector>
      <draw:connector draw:type="line" svg:x1="13.33333in" svg:y1="1.01401in" svg:x2="7.14063in" svg:y2="-0.00521in" draw:id="id92" draw:layer="Master1-bg" draw:style-name="a874" draw:name="Straight Connector 6">
        <svg:title/>
        <svg:desc/>
      </draw:connector>
      <draw:connector draw:type="line" svg:x1="0.98837in" svg:y1="0in" svg:x2="0in" svg:y2="7.15625in" draw:id="id93" draw:layer="Master1-bg" draw:style-name="a875" draw:name="Straight Connector 8">
        <svg:title/>
        <svg:desc/>
      </draw:connector>
      <draw:frame draw:id="id94" draw:layer="Master1-bg" presentation:style-name="a878" draw:name="Title 1" svg:x="1.66667in" svg:y="0.81329in" svg:width="10in" svg:height="3.67591in" presentation:class="title" presentation:placeholder="false">
        <draw:text-box>
          <text:p text:style-name="a877" text:class-names="" text:cond-style-name=""><text:span text:style-name="a876" text:class-names="">Click to add title</text:span></text:p>
        </draw:text-box>
        <svg:title/>
        <svg:desc/>
      </draw:frame>
      <draw:frame draw:id="id95" draw:layer="Master1-bg" presentation:style-name="a881" draw:name="Picture Placeholder 7" svg:x="-0.00833in" svg:y="5.21264in" svg:width="13.35in" svg:height="2.32in" presentation:class="graphic" presentation:placeholder="false">
        <draw:text-box>
          <text:p text:style-name="a880" text:class-names="" text:cond-style-name=""><text:span text:style-name="a879" text:class-names="">Click icon to add picture</text:span></text:p>
        </draw:text-box>
        <svg:title/>
        <svg:desc/>
      </draw:frame>
      <presentation:notes style:page-layout-name="pageLayout2" draw:style-name="a913">
        <draw:frame draw:id="id12" presentation:style-name="a884" draw:name="Header Placeholder 1" svg:x="0in" svg:y="0in" svg:width="3.25in" svg:height="0.50174in" presentation:class="header" presentation:placeholder="false">
          <draw:text-box>
            <text:p text:style-name="a883" text:class-names="" text:cond-style-name=""><text:span text:style-name="a882" text:class-names=""/></text:p>
          </draw:text-box>
          <svg:title/>
          <svg:desc/>
        </draw:frame>
        <draw:frame draw:id="id13" presentation:style-name="a889" draw:name="Date Placeholder 2" svg:x="4.24826in" svg:y="0in" svg:width="3.25in" svg:height="0.50174in" presentation:class="date-time" presentation:placeholder="false">
          <draw:text-box>
            <text:p text:style-name="a888" text:class-names="" text:cond-style-name=""><text:span text:style-name="a885" text:class-names=""><text:date text:fixed="false" style:data-style-name="a886">3/21/2026</text:date></text:span><text:span text:style-name="a887" text:class-names=""/></text:p>
          </draw:text-box>
          <svg:title/>
          <svg:desc/>
        </draw:frame>
        <draw:page-thumbnail svg:x="0.75in" svg:y="1.25in" svg:width="6in" svg:height="3.375in" presentation:class="page" draw:id="id14" presentation:style-name="a890" draw:name="Slide Image Placeholder 3">
          <svg:title/>
          <svg:desc/>
        </draw:page-thumbnail>
        <draw:frame draw:id="id15" presentation:style-name="a905" draw:name="Notes Placeholder 4" svg:x="0.75in" svg:y="4.8125in" svg:width="6in" svg:height="3.9375in" presentation:class="notes" presentation:placeholder="false">
          <draw:text-box>
            <text:p text:style-name="a892" text:class-names="" text:cond-style-name=""><text:span text:style-name="a891" text:class-names="">Click to edit Master text styles</text:span></text:p>
            <text:list text:style-name="a895">
              <text:list-item>
                <text:list text:style-name="a895">
                  <text:list-item>
                    <text:p text:style-name="a894" text:class-names="" text:cond-style-name=""><text:span text:style-name="a893" text:class-names="">Second level</text:span></text:p>
                  </text:list-item>
                </text:list>
              </text:list-item>
            </text:list>
            <text:list text:style-name="a898">
              <text:list-item>
                <text:list text:style-name="a898">
                  <text:list-item>
                    <text:list text:style-name="a898">
                      <text:list-item>
                        <text:p text:style-name="a897" text:class-names="" text:cond-style-name=""><text:span text:style-name="a89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01">
              <text:list-item>
                <text:list text:style-name="a901">
                  <text:list-item>
                    <text:list text:style-name="a901">
                      <text:list-item>
                        <text:list text:style-name="a901">
                          <text:list-item>
                            <text:p text:style-name="a900" text:class-names="" text:cond-style-name=""><text:span text:style-name="a89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04">
              <text:list-item>
                <text:list text:style-name="a904">
                  <text:list-item>
                    <text:list text:style-name="a904">
                      <text:list-item>
                        <text:list text:style-name="a904">
                          <text:list-item>
                            <text:list text:style-name="a904">
                              <text:list-item>
                                <text:p text:style-name="a903" text:class-names="" text:cond-style-name=""><text:span text:style-name="a90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908" draw:name="Footer Placeholder 5" svg:x="0in" svg:y="9.49826in" svg:width="3.25in" svg:height="0.50174in" presentation:class="footer" presentation:placeholder="false">
          <draw:text-box>
            <text:p text:style-name="a907" text:class-names="" text:cond-style-name=""><text:span text:style-name="a906" text:class-names=""/></text:p>
          </draw:text-box>
          <svg:title/>
          <svg:desc/>
        </draw:frame>
        <draw:frame draw:id="id17" presentation:style-name="a912" draw:name="Slide Number Placeholder 6" svg:x="4.24826in" svg:y="9.49826in" svg:width="3.25in" svg:height="0.50174in" presentation:class="page-number" presentation:placeholder="false">
          <draw:text-box>
            <text:p text:style-name="a911" text:class-names="" text:cond-style-name=""><text:span text:style-name="a909" text:class-names=""><text:page-number style:num-format="1" text:fixed="false">‹N›</text:page-number></text:span><text:span text:style-name="a910" text:class-names=""/></text:p>
          </draw:text-box>
          <svg:title/>
          <svg:desc/>
        </draw:frame>
      </presentation:notes>
    </style:master-page>
    <style:master-page style:name="Master1-Layout15-cust-Title-+-subtitle-+-picture" style:page-layout-name="pageLayout1" draw:style-name="a914">
      <draw:connector draw:type="line" svg:x1="3.41177in" svg:y1="0in" svg:x2="0in" svg:y2="0.75in" draw:id="id96" draw:layer="Master1-bg" draw:style-name="a915" draw:name="Straight Connector 7">
        <svg:title/>
        <svg:desc/>
      </draw:connector>
      <draw:connector draw:type="line" svg:x1="6.82813in" svg:y1="7.5in" svg:x2="-0.04688in" svg:y2="6.33333in" draw:id="id97" draw:layer="Master1-bg" draw:style-name="a916" draw:name="Straight Connector 8">
        <svg:title/>
        <svg:desc/>
      </draw:connector>
      <draw:connector draw:type="line" svg:x1="0.98837in" svg:y1="0in" svg:x2="0in" svg:y2="7.15625in" draw:id="id98" draw:layer="Master1-bg" draw:style-name="a917" draw:name="Straight Connector 9">
        <svg:title/>
        <svg:desc/>
      </draw:connector>
      <draw:frame draw:id="id99" draw:layer="Master1-bg" presentation:style-name="a920" draw:name="Title 1" svg:x="1.32882in" svg:y="0.57778in" svg:width="5.49931in" svg:height="3.66906in" presentation:class="title" presentation:placeholder="false">
        <draw:text-box>
          <text:p text:style-name="a919" text:class-names="" text:cond-style-name=""><text:span text:style-name="a918" text:class-names=""/></text:p>
        </draw:text-box>
        <svg:title/>
        <svg:desc/>
      </draw:frame>
      <draw:frame draw:id="id100" draw:layer="Master1-bg" presentation:style-name="a923" draw:name="Subtitle 2" svg:x="1.32882in" svg:y="4.40507in" svg:width="5.49931in" svg:height="2.07237in" presentation:class="subtitle" presentation:placeholder="false">
        <draw:text-box>
          <text:p text:style-name="a922" text:class-names="" text:cond-style-name=""><text:span text:style-name="a921" text:class-names="">Click to add subtitle</text:span></text:p>
        </draw:text-box>
        <svg:title/>
        <svg:desc/>
      </draw:frame>
      <draw:frame draw:id="id101" draw:layer="Master1-bg" presentation:style-name="a926" draw:name="Picture Placeholder 7" svg:x="7.93671in" svg:y="-0.01266in" svg:width="5.40928in" svg:height="7.55in" presentation:class="graphic" presentation:placeholder="false">
        <draw:text-box>
          <text:p text:style-name="a925" text:class-names="" text:cond-style-name=""><text:span text:style-name="a924" text:class-names="">Click icon to add picture</text:span></text:p>
        </draw:text-box>
        <svg:title/>
        <svg:desc/>
      </draw:frame>
      <presentation:notes style:page-layout-name="pageLayout2" draw:style-name="a958">
        <draw:frame draw:id="id12" presentation:style-name="a929" draw:name="Header Placeholder 1" svg:x="0in" svg:y="0in" svg:width="3.25in" svg:height="0.50174in" presentation:class="header" presentation:placeholder="false">
          <draw:text-box>
            <text:p text:style-name="a928" text:class-names="" text:cond-style-name=""><text:span text:style-name="a927" text:class-names=""/></text:p>
          </draw:text-box>
          <svg:title/>
          <svg:desc/>
        </draw:frame>
        <draw:frame draw:id="id13" presentation:style-name="a934" draw:name="Date Placeholder 2" svg:x="4.24826in" svg:y="0in" svg:width="3.25in" svg:height="0.50174in" presentation:class="date-time" presentation:placeholder="false">
          <draw:text-box>
            <text:p text:style-name="a933" text:class-names="" text:cond-style-name=""><text:span text:style-name="a930" text:class-names=""><text:date text:fixed="false" style:data-style-name="a931">3/21/2026</text:date></text:span><text:span text:style-name="a932" text:class-names=""/></text:p>
          </draw:text-box>
          <svg:title/>
          <svg:desc/>
        </draw:frame>
        <draw:page-thumbnail svg:x="0.75in" svg:y="1.25in" svg:width="6in" svg:height="3.375in" presentation:class="page" draw:id="id14" presentation:style-name="a935" draw:name="Slide Image Placeholder 3">
          <svg:title/>
          <svg:desc/>
        </draw:page-thumbnail>
        <draw:frame draw:id="id15" presentation:style-name="a950" draw:name="Notes Placeholder 4" svg:x="0.75in" svg:y="4.8125in" svg:width="6in" svg:height="3.9375in" presentation:class="notes" presentation:placeholder="false">
          <draw:text-box>
            <text:p text:style-name="a937" text:class-names="" text:cond-style-name=""><text:span text:style-name="a936" text:class-names="">Click to edit Master text styles</text:span></text:p>
            <text:list text:style-name="a940">
              <text:list-item>
                <text:list text:style-name="a940">
                  <text:list-item>
                    <text:p text:style-name="a939" text:class-names="" text:cond-style-name=""><text:span text:style-name="a938" text:class-names="">Second level</text:span></text:p>
                  </text:list-item>
                </text:list>
              </text:list-item>
            </text:list>
            <text:list text:style-name="a943">
              <text:list-item>
                <text:list text:style-name="a943">
                  <text:list-item>
                    <text:list text:style-name="a943">
                      <text:list-item>
                        <text:p text:style-name="a942" text:class-names="" text:cond-style-name=""><text:span text:style-name="a94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46">
              <text:list-item>
                <text:list text:style-name="a946">
                  <text:list-item>
                    <text:list text:style-name="a946">
                      <text:list-item>
                        <text:list text:style-name="a946">
                          <text:list-item>
                            <text:p text:style-name="a945" text:class-names="" text:cond-style-name=""><text:span text:style-name="a94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49">
              <text:list-item>
                <text:list text:style-name="a949">
                  <text:list-item>
                    <text:list text:style-name="a949">
                      <text:list-item>
                        <text:list text:style-name="a949">
                          <text:list-item>
                            <text:list text:style-name="a949">
                              <text:list-item>
                                <text:p text:style-name="a948" text:class-names="" text:cond-style-name=""><text:span text:style-name="a94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953" draw:name="Footer Placeholder 5" svg:x="0in" svg:y="9.49826in" svg:width="3.25in" svg:height="0.50174in" presentation:class="footer" presentation:placeholder="false">
          <draw:text-box>
            <text:p text:style-name="a952" text:class-names="" text:cond-style-name=""><text:span text:style-name="a951" text:class-names=""/></text:p>
          </draw:text-box>
          <svg:title/>
          <svg:desc/>
        </draw:frame>
        <draw:frame draw:id="id17" presentation:style-name="a957" draw:name="Slide Number Placeholder 6" svg:x="4.24826in" svg:y="9.49826in" svg:width="3.25in" svg:height="0.50174in" presentation:class="page-number" presentation:placeholder="false">
          <draw:text-box>
            <text:p text:style-name="a956" text:class-names="" text:cond-style-name=""><text:span text:style-name="a954" text:class-names=""><text:page-number style:num-format="1" text:fixed="false">‹N›</text:page-number></text:span><text:span text:style-name="a955" text:class-names=""/></text:p>
          </draw:text-box>
          <svg:title/>
          <svg:desc/>
        </draw:frame>
      </presentation:notes>
    </style:master-page>
    <style:master-page style:name="Master1-Layout16-cust-Content-1" style:page-layout-name="pageLayout1" draw:style-name="a959">
      <draw:connector draw:type="line" svg:x1="6.82813in" svg:y1="7.5in" svg:x2="-0.04688in" svg:y2="6.33333in" draw:id="id102" draw:layer="Master1-bg" draw:style-name="a960" draw:name="Straight Connector 6">
        <svg:title/>
        <svg:desc/>
      </draw:connector>
      <draw:connector draw:type="line" svg:x1="12.93241in" svg:y1="0in" svg:x2="11.93331in" svg:y2="7.5in" draw:id="id103" draw:layer="Master1-bg" draw:style-name="a961" draw:name="Straight Connector 7">
        <svg:title/>
        <svg:desc/>
      </draw:connector>
      <draw:frame draw:id="id104" draw:layer="Master1-bg" presentation:style-name="a964" draw:name="Title 1" svg:x="4.34177in" svg:y="0.20253in" svg:width="7.57966in" svg:height="1.64643in" presentation:class="title" presentation:placeholder="false">
        <draw:text-box>
          <text:p text:style-name="a963" text:class-names="" text:cond-style-name=""><text:span text:style-name="a962" text:class-names="">Click to add title</text:span></text:p>
        </draw:text-box>
        <svg:title/>
        <svg:desc/>
      </draw:frame>
      <draw:frame draw:id="id105" draw:layer="Master1-bg" presentation:style-name="a967" draw:name="Picture Placeholder 11" svg:x="-0.02055in" svg:y="-0.025in" svg:width="3.6in" svg:height="7.55in" presentation:class="graphic" presentation:placeholder="false">
        <draw:text-box>
          <text:p text:style-name="a966" text:class-names="" text:cond-style-name=""><text:span text:style-name="a965" text:class-names="">Click icon to add picture</text:span></text:p>
        </draw:text-box>
        <svg:title/>
        <svg:desc/>
      </draw:frame>
      <draw:frame draw:id="id106" draw:layer="Master1-bg" presentation:style-name="a983" draw:name="Content Placeholder 3" svg:x="4.34177in" svg:y="2.21172in" svg:width="7.59154in" svg:height="4.7in" presentation:class="object" presentation:placeholder="false">
        <draw:text-box>
          <text:list text:style-name="a970">
            <text:list-item>
              <text:p text:style-name="a969" text:class-names="" text:cond-style-name=""><text:span text:style-name="a968" text:class-names="">Click to add text</text:span></text:p>
            </text:list-item>
          </text:list>
          <text:list text:style-name="a973">
            <text:list-item>
              <text:list text:style-name="a973">
                <text:list-item>
                  <text:p text:style-name="a972" text:class-names="" text:cond-style-name=""><text:span text:style-name="a971" text:class-names="">Second level</text:span></text:p>
                </text:list-item>
              </text:list>
            </text:list-item>
          </text:list>
          <text:list text:style-name="a976">
            <text:list-item>
              <text:list text:style-name="a976">
                <text:list-item>
                  <text:list text:style-name="a976">
                    <text:list-item>
                      <text:p text:style-name="a975" text:class-names="" text:cond-style-name=""><text:span text:style-name="a974" text:class-names="">Third level</text:span></text:p>
                    </text:list-item>
                  </text:list>
                </text:list-item>
              </text:list>
            </text:list-item>
          </text:list>
          <text:list text:style-name="a979">
            <text:list-item>
              <text:list text:style-name="a979">
                <text:list-item>
                  <text:list text:style-name="a979">
                    <text:list-item>
                      <text:list text:style-name="a979">
                        <text:list-item>
                          <text:p text:style-name="a978" text:class-names="" text:cond-style-name=""><text:span text:style-name="a97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82">
            <text:list-item>
              <text:list text:style-name="a982">
                <text:list-item>
                  <text:list text:style-name="a982">
                    <text:list-item>
                      <text:list text:style-name="a982">
                        <text:list-item>
                          <text:list text:style-name="a982">
                            <text:list-item>
                              <text:p text:style-name="a981" text:class-names="" text:cond-style-name=""><text:span text:style-name="a98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015">
        <draw:frame draw:id="id12" presentation:style-name="a986" draw:name="Header Placeholder 1" svg:x="0in" svg:y="0in" svg:width="3.25in" svg:height="0.50174in" presentation:class="header" presentation:placeholder="false">
          <draw:text-box>
            <text:p text:style-name="a985" text:class-names="" text:cond-style-name=""><text:span text:style-name="a984" text:class-names=""/></text:p>
          </draw:text-box>
          <svg:title/>
          <svg:desc/>
        </draw:frame>
        <draw:frame draw:id="id13" presentation:style-name="a991" draw:name="Date Placeholder 2" svg:x="4.24826in" svg:y="0in" svg:width="3.25in" svg:height="0.50174in" presentation:class="date-time" presentation:placeholder="false">
          <draw:text-box>
            <text:p text:style-name="a990" text:class-names="" text:cond-style-name=""><text:span text:style-name="a987" text:class-names=""><text:date text:fixed="false" style:data-style-name="a988">3/21/2026</text:date></text:span><text:span text:style-name="a989" text:class-names=""/></text:p>
          </draw:text-box>
          <svg:title/>
          <svg:desc/>
        </draw:frame>
        <draw:page-thumbnail svg:x="0.75in" svg:y="1.25in" svg:width="6in" svg:height="3.375in" presentation:class="page" draw:id="id14" presentation:style-name="a992" draw:name="Slide Image Placeholder 3">
          <svg:title/>
          <svg:desc/>
        </draw:page-thumbnail>
        <draw:frame draw:id="id15" presentation:style-name="a1007" draw:name="Notes Placeholder 4" svg:x="0.75in" svg:y="4.8125in" svg:width="6in" svg:height="3.9375in" presentation:class="notes" presentation:placeholder="false">
          <draw:text-box>
            <text:p text:style-name="a994" text:class-names="" text:cond-style-name=""><text:span text:style-name="a993" text:class-names="">Click to edit Master text styles</text:span></text:p>
            <text:list text:style-name="a997">
              <text:list-item>
                <text:list text:style-name="a997">
                  <text:list-item>
                    <text:p text:style-name="a996" text:class-names="" text:cond-style-name=""><text:span text:style-name="a995" text:class-names="">Second level</text:span></text:p>
                  </text:list-item>
                </text:list>
              </text:list-item>
            </text:list>
            <text:list text:style-name="a1000">
              <text:list-item>
                <text:list text:style-name="a1000">
                  <text:list-item>
                    <text:list text:style-name="a1000">
                      <text:list-item>
                        <text:p text:style-name="a999" text:class-names="" text:cond-style-name=""><text:span text:style-name="a99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03">
              <text:list-item>
                <text:list text:style-name="a1003">
                  <text:list-item>
                    <text:list text:style-name="a1003">
                      <text:list-item>
                        <text:list text:style-name="a1003">
                          <text:list-item>
                            <text:p text:style-name="a1002" text:class-names="" text:cond-style-name=""><text:span text:style-name="a100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06">
              <text:list-item>
                <text:list text:style-name="a1006">
                  <text:list-item>
                    <text:list text:style-name="a1006">
                      <text:list-item>
                        <text:list text:style-name="a1006">
                          <text:list-item>
                            <text:list text:style-name="a1006">
                              <text:list-item>
                                <text:p text:style-name="a1005" text:class-names="" text:cond-style-name=""><text:span text:style-name="a100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1010" draw:name="Footer Placeholder 5" svg:x="0in" svg:y="9.49826in" svg:width="3.25in" svg:height="0.50174in" presentation:class="footer" presentation:placeholder="false">
          <draw:text-box>
            <text:p text:style-name="a1009" text:class-names="" text:cond-style-name=""><text:span text:style-name="a1008" text:class-names=""/></text:p>
          </draw:text-box>
          <svg:title/>
          <svg:desc/>
        </draw:frame>
        <draw:frame draw:id="id17" presentation:style-name="a1014" draw:name="Slide Number Placeholder 6" svg:x="4.24826in" svg:y="9.49826in" svg:width="3.25in" svg:height="0.50174in" presentation:class="page-number" presentation:placeholder="false">
          <draw:text-box>
            <text:p text:style-name="a1013" text:class-names="" text:cond-style-name=""><text:span text:style-name="a1011" text:class-names=""><text:page-number style:num-format="1" text:fixed="false">‹N›</text:page-number></text:span><text:span text:style-name="a1012" text:class-names=""/></text:p>
          </draw:text-box>
          <svg:title/>
          <svg:desc/>
        </draw:frame>
      </presentation:notes>
    </style:master-page>
    <style:master-page style:name="Master1-Layout17-cust-Title-+-subtitle" style:page-layout-name="pageLayout1" draw:style-name="a1016">
      <draw:custom-shape svg:x="0in" svg:y="0in" svg:width="8.17016in" svg:height="7.5in" draw:id="id107" draw:layer="Master1-bg" draw:style-name="a1019" draw:name="Freeform 10">
        <svg:title/>
        <svg:desc/>
        <text:p text:style-name="a1018" text:class-names="" text:cond-style-name=""><text:span text:style-name="a1017" text:class-names=""/></text:p>
        <draw:enhanced-geometry xmlns:dr3d="urn:oasis:names:tc:opendocument:xmlns:dr3d:1.0" draw:type="non-primitive" svg:viewBox="0 0 7470792 6858000" draw:enhanced-path="M 0 0 L 7470792 0 5633197 6858000 0 6858000 Z N" draw:text-areas="?f18 ?f20 ?f19 ?f21" draw:glue-points="?f13 ?f14 ?f15 ?f14 ?f16 ?f17 ?f13 ?f17" draw:glue-point-leaving-directions="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7470792"/>
          <draw:equation draw:name="f7" draw:formula="?f4 / 6858000"/>
          <draw:equation draw:name="f8" draw:formula="0 * ?f5 / 7470792"/>
          <draw:equation draw:name="f9" draw:formula="0 * ?f4 / 6858000"/>
          <draw:equation draw:name="f10" draw:formula="7470792 * ?f5 / 7470792"/>
          <draw:equation draw:name="f11" draw:formula="5633197 * ?f5 / 7470792"/>
          <draw:equation draw:name="f12" draw:formula="6858000 * ?f4 / 6858000"/>
          <draw:equation draw:name="f13" draw:formula="?f8 / ?f6"/>
          <draw:equation draw:name="f14" draw:formula="?f9 / ?f7"/>
          <draw:equation draw:name="f15" draw:formula="?f10 / ?f6"/>
          <draw:equation draw:name="f16" draw:formula="?f11 / ?f6"/>
          <draw:equation draw:name="f17" draw:formula="?f12 / ?f7"/>
          <draw:equation draw:name="f18" draw:formula="?f0 / ?f6"/>
          <draw:equation draw:name="f19" draw:formula="?f1 / ?f6"/>
          <draw:equation draw:name="f20" draw:formula="?f2 / ?f7"/>
          <draw:equation draw:name="f21" draw:formula="?f3 / ?f7"/>
        </draw:enhanced-geometry>
      </draw:custom-shape>
      <draw:connector draw:type="line" svg:x1="3.41177in" svg:y1="0in" svg:x2="0in" svg:y2="0.75in" draw:id="id108" draw:layer="Master1-bg" draw:style-name="a1020" draw:name="Straight Connector 7">
        <svg:title/>
        <svg:desc/>
      </draw:connector>
      <draw:connector draw:type="line" svg:x1="0.98837in" svg:y1="0in" svg:x2="0in" svg:y2="7.15625in" draw:id="id109" draw:layer="Master1-bg" draw:style-name="a1021" draw:name="Straight Connector 8">
        <svg:title/>
        <svg:desc/>
      </draw:connector>
      <draw:connector draw:type="line" svg:x1="6.82813in" svg:y1="7.5in" svg:x2="-0.04688in" svg:y2="6.33333in" draw:id="id110" draw:layer="Master1-bg" draw:style-name="a1022" draw:name="Straight Connector 9">
        <svg:title/>
        <svg:desc/>
      </draw:connector>
      <draw:connector draw:type="line" svg:x1="13.33333in" svg:y1="6.39583in" svg:x2="9.25521in" svg:y2="7.5in" draw:id="id111" draw:layer="Master1-bg" draw:style-name="a1023" draw:name="Straight Connector 10">
        <svg:title/>
        <svg:desc/>
      </draw:connector>
      <draw:connector draw:type="line" svg:x1="13.33333in" svg:y1="1.80208in" svg:x2="12.62375in" svg:y2="7.5in" draw:id="id112" draw:layer="Master1-bg" draw:style-name="a1024" draw:name="Straight Connector 11">
        <svg:title/>
        <svg:desc/>
      </draw:connector>
      <draw:connector draw:type="line" svg:x1="13.33333in" svg:y1="4.65698in" svg:x2="11.79085in" svg:y2="0in" draw:id="id113" draw:layer="Master1-bg" draw:style-name="a1025" draw:name="Straight Connector 12">
        <svg:title/>
        <svg:desc/>
      </draw:connector>
      <draw:connector draw:type="line" svg:x1="13.33333in" svg:y1="1.01401in" svg:x2="7.14063in" svg:y2="-0.00521in" draw:id="id114" draw:style-name="a1026" draw:name="Straight Connector 13">
        <svg:title/>
        <svg:desc/>
      </draw:connector>
      <draw:frame draw:id="id115" presentation:style-name="a1029" draw:name="Title 1" svg:x="1.66667in" svg:y="0.75in" svg:width="10in" svg:height="3.43038in" presentation:class="title" presentation:placeholder="false">
        <draw:text-box>
          <text:p text:style-name="a1028" text:class-names="" text:cond-style-name=""><text:span text:style-name="a1027" text:class-names="">Click to add title</text:span></text:p>
        </draw:text-box>
        <svg:title/>
        <svg:desc/>
      </draw:frame>
      <draw:frame draw:id="id116" presentation:style-name="a1032" draw:name="Subtitle 2" svg:x="1.66667in" svg:y="4.35127in" svg:width="10in" svg:height="2.15in" presentation:class="subtitle" presentation:placeholder="false">
        <draw:text-box>
          <text:p text:style-name="a1031" text:class-names="" text:cond-style-name=""><text:span text:style-name="a1030" text:class-names="">Click to add subtitle</text:span></text:p>
        </draw:text-box>
        <svg:title/>
        <svg:desc/>
      </draw:frame>
      <presentation:notes style:page-layout-name="pageLayout2" draw:style-name="a1064">
        <draw:frame draw:id="id12" presentation:style-name="a1035" draw:name="Header Placeholder 1" svg:x="0in" svg:y="0in" svg:width="3.25in" svg:height="0.50174in" presentation:class="header" presentation:placeholder="false">
          <draw:text-box>
            <text:p text:style-name="a1034" text:class-names="" text:cond-style-name=""><text:span text:style-name="a1033" text:class-names=""/></text:p>
          </draw:text-box>
          <svg:title/>
          <svg:desc/>
        </draw:frame>
        <draw:frame draw:id="id13" presentation:style-name="a1040" draw:name="Date Placeholder 2" svg:x="4.24826in" svg:y="0in" svg:width="3.25in" svg:height="0.50174in" presentation:class="date-time" presentation:placeholder="false">
          <draw:text-box>
            <text:p text:style-name="a1039" text:class-names="" text:cond-style-name=""><text:span text:style-name="a1036" text:class-names=""><text:date text:fixed="false" style:data-style-name="a1037">3/21/2026</text:date></text:span><text:span text:style-name="a1038" text:class-names=""/></text:p>
          </draw:text-box>
          <svg:title/>
          <svg:desc/>
        </draw:frame>
        <draw:page-thumbnail svg:x="0.75in" svg:y="1.25in" svg:width="6in" svg:height="3.375in" presentation:class="page" draw:id="id14" presentation:style-name="a1041" draw:name="Slide Image Placeholder 3">
          <svg:title/>
          <svg:desc/>
        </draw:page-thumbnail>
        <draw:frame draw:id="id15" presentation:style-name="a1056" draw:name="Notes Placeholder 4" svg:x="0.75in" svg:y="4.8125in" svg:width="6in" svg:height="3.9375in" presentation:class="notes" presentation:placeholder="false">
          <draw:text-box>
            <text:p text:style-name="a1043" text:class-names="" text:cond-style-name=""><text:span text:style-name="a1042" text:class-names="">Click to edit Master text styles</text:span></text:p>
            <text:list text:style-name="a1046">
              <text:list-item>
                <text:list text:style-name="a1046">
                  <text:list-item>
                    <text:p text:style-name="a1045" text:class-names="" text:cond-style-name=""><text:span text:style-name="a1044" text:class-names="">Second level</text:span></text:p>
                  </text:list-item>
                </text:list>
              </text:list-item>
            </text:list>
            <text:list text:style-name="a1049">
              <text:list-item>
                <text:list text:style-name="a1049">
                  <text:list-item>
                    <text:list text:style-name="a1049">
                      <text:list-item>
                        <text:p text:style-name="a1048" text:class-names="" text:cond-style-name=""><text:span text:style-name="a104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52">
              <text:list-item>
                <text:list text:style-name="a1052">
                  <text:list-item>
                    <text:list text:style-name="a1052">
                      <text:list-item>
                        <text:list text:style-name="a1052">
                          <text:list-item>
                            <text:p text:style-name="a1051" text:class-names="" text:cond-style-name=""><text:span text:style-name="a105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5">
              <text:list-item>
                <text:list text:style-name="a1055">
                  <text:list-item>
                    <text:list text:style-name="a1055">
                      <text:list-item>
                        <text:list text:style-name="a1055">
                          <text:list-item>
                            <text:list text:style-name="a1055">
                              <text:list-item>
                                <text:p text:style-name="a1054" text:class-names="" text:cond-style-name=""><text:span text:style-name="a105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1059" draw:name="Footer Placeholder 5" svg:x="0in" svg:y="9.49826in" svg:width="3.25in" svg:height="0.50174in" presentation:class="footer" presentation:placeholder="false">
          <draw:text-box>
            <text:p text:style-name="a1058" text:class-names="" text:cond-style-name=""><text:span text:style-name="a1057" text:class-names=""/></text:p>
          </draw:text-box>
          <svg:title/>
          <svg:desc/>
        </draw:frame>
        <draw:frame draw:id="id17" presentation:style-name="a1063" draw:name="Slide Number Placeholder 6" svg:x="4.24826in" svg:y="9.49826in" svg:width="3.25in" svg:height="0.50174in" presentation:class="page-number" presentation:placeholder="false">
          <draw:text-box>
            <text:p text:style-name="a1062" text:class-names="" text:cond-style-name=""><text:span text:style-name="a1060" text:class-names=""><text:page-number style:num-format="1" text:fixed="false">‹N›</text:page-number></text:span><text:span text:style-name="a1061" text:class-names=""/></text:p>
          </draw:text-box>
          <svg:title/>
          <svg:desc/>
        </draw:frame>
      </presentation:notes>
    </style:master-page>
    <style:master-page style:name="Master1-Layout18-cust-Two-Content-1" style:page-layout-name="pageLayout1" draw:style-name="a1065">
      <draw:connector draw:type="line" svg:x1="3.41177in" svg:y1="0in" svg:x2="0in" svg:y2="0.75in" draw:id="id117" draw:layer="Master1-bg" draw:style-name="a1066" draw:name="Straight Connector 7">
        <svg:title/>
        <svg:desc/>
      </draw:connector>
      <draw:connector draw:type="line" svg:x1="0.98837in" svg:y1="0in" svg:x2="0in" svg:y2="7.15625in" draw:id="id118" draw:layer="Master1-bg" draw:style-name="a1067" draw:name="Straight Connector 8">
        <svg:title/>
        <svg:desc/>
      </draw:connector>
      <draw:connector draw:type="line" svg:x1="6.82813in" svg:y1="7.5in" svg:x2="-0.04688in" svg:y2="6.33333in" draw:id="id119" draw:layer="Master1-bg" draw:style-name="a1068" draw:name="Straight Connector 9">
        <svg:title/>
        <svg:desc/>
      </draw:connector>
      <draw:connector draw:type="line" svg:x1="13.33333in" svg:y1="6.39583in" svg:x2="9.25521in" svg:y2="7.5in" draw:id="id120" draw:layer="Master1-bg" draw:style-name="a1069" draw:name="Straight Connector 10">
        <svg:title/>
        <svg:desc/>
      </draw:connector>
      <draw:connector draw:type="line" svg:x1="13.33333in" svg:y1="1.80208in" svg:x2="12.62375in" svg:y2="7.5in" draw:id="id121" draw:layer="Master1-bg" draw:style-name="a1070" draw:name="Straight Connector 11">
        <svg:title/>
        <svg:desc/>
      </draw:connector>
      <draw:connector draw:type="line" svg:x1="13.33333in" svg:y1="4.65698in" svg:x2="11.79085in" svg:y2="0in" draw:id="id122" draw:layer="Master1-bg" draw:style-name="a1071" draw:name="Straight Connector 12">
        <svg:title/>
        <svg:desc/>
      </draw:connector>
      <draw:connector draw:type="line" svg:x1="13.33333in" svg:y1="1.01401in" svg:x2="7.14063in" svg:y2="-0.00521in" draw:id="id123" draw:layer="Master1-bg" draw:style-name="a1072" draw:name="Straight Connector 13">
        <svg:title/>
        <svg:desc/>
      </draw:connector>
      <draw:frame draw:id="id124" presentation:style-name="a1075" draw:name="Title 1" svg:x="1.25in" svg:y="0.58333in" svg:width="10.83333in" svg:height="1.51154in" presentation:class="title" presentation:placeholder="false">
        <draw:text-box>
          <text:p text:style-name="a1074" text:class-names="" text:cond-style-name=""><text:span text:style-name="a1073" text:class-names="">Click to add title</text:span></text:p>
        </draw:text-box>
        <svg:title/>
        <svg:desc/>
      </draw:frame>
      <draw:frame draw:id="id125" presentation:style-name="a1090" draw:name="Content Placeholder 3" svg:x="0.91312in" svg:y="2.22295in" svg:width="4.8808in" svg:height="4.44826in" presentation:class="object" presentation:placeholder="false">
        <draw:text-box>
          <text:p text:style-name="a1077" text:class-names="" text:cond-style-name=""><text:span text:style-name="a1076" text:class-names="">Click to add text</text:span></text:p>
          <text:list text:style-name="a1080">
            <text:list-item>
              <text:list text:style-name="a1080">
                <text:list-item>
                  <text:p text:style-name="a1079" text:class-names="" text:cond-style-name=""><text:span text:style-name="a1078" text:class-names="">Second level</text:span></text:p>
                </text:list-item>
              </text:list>
            </text:list-item>
          </text:list>
          <text:list text:style-name="a1083">
            <text:list-item>
              <text:list text:style-name="a1083">
                <text:list-item>
                  <text:list text:style-name="a1083">
                    <text:list-item>
                      <text:p text:style-name="a1082" text:class-names="" text:cond-style-name=""><text:span text:style-name="a1081" text:class-names="">Third level</text:span></text:p>
                    </text:list-item>
                  </text:list>
                </text:list-item>
              </text:list>
            </text:list-item>
          </text:list>
          <text:list text:style-name="a1086">
            <text:list-item>
              <text:list text:style-name="a1086">
                <text:list-item>
                  <text:list text:style-name="a1086">
                    <text:list-item>
                      <text:list text:style-name="a1086">
                        <text:list-item>
                          <text:p text:style-name="a1085" text:class-names="" text:cond-style-name=""><text:span text:style-name="a108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89">
            <text:list-item>
              <text:list text:style-name="a1089">
                <text:list-item>
                  <text:list text:style-name="a1089">
                    <text:list-item>
                      <text:list text:style-name="a1089">
                        <text:list-item>
                          <text:list text:style-name="a1089">
                            <text:list-item>
                              <text:p text:style-name="a1088" text:class-names="" text:cond-style-name=""><text:span text:style-name="a108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6" presentation:style-name="a1105" draw:name="Content Placeholder 3" svg:x="6.71667in" svg:y="2.22295in" svg:width="5.7in" svg:height="4.44826in" presentation:class="object" presentation:placeholder="false">
        <draw:text-box>
          <text:p text:style-name="a1092" text:class-names="" text:cond-style-name=""><text:span text:style-name="a1091" text:class-names="">Click to add text</text:span></text:p>
          <text:list text:style-name="a1095">
            <text:list-item>
              <text:list text:style-name="a1095">
                <text:list-item>
                  <text:p text:style-name="a1094" text:class-names="" text:cond-style-name=""><text:span text:style-name="a1093" text:class-names="">Second level</text:span></text:p>
                </text:list-item>
              </text:list>
            </text:list-item>
          </text:list>
          <text:list text:style-name="a1098">
            <text:list-item>
              <text:list text:style-name="a1098">
                <text:list-item>
                  <text:list text:style-name="a1098">
                    <text:list-item>
                      <text:p text:style-name="a1097" text:class-names="" text:cond-style-name=""><text:span text:style-name="a1096" text:class-names="">Third level</text:span></text:p>
                    </text:list-item>
                  </text:list>
                </text:list-item>
              </text:list>
            </text:list-item>
          </text:list>
          <text:list text:style-name="a1101">
            <text:list-item>
              <text:list text:style-name="a1101">
                <text:list-item>
                  <text:list text:style-name="a1101">
                    <text:list-item>
                      <text:list text:style-name="a1101">
                        <text:list-item>
                          <text:p text:style-name="a1100" text:class-names="" text:cond-style-name=""><text:span text:style-name="a109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04">
            <text:list-item>
              <text:list text:style-name="a1104">
                <text:list-item>
                  <text:list text:style-name="a1104">
                    <text:list-item>
                      <text:list text:style-name="a1104">
                        <text:list-item>
                          <text:list text:style-name="a1104">
                            <text:list-item>
                              <text:p text:style-name="a1103" text:class-names="" text:cond-style-name=""><text:span text:style-name="a110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7" presentation:style-name="a1110" draw:name="Date Placeholder 4" svg:x="8.02395in" svg:y="6.9979in" svg:width="4.58651in" svg:height="0.39931in" presentation:class="date-time" presentation:placeholder="false">
        <draw:text-box>
          <text:p text:style-name="a1109" text:class-names="" text:cond-style-name=""><text:span text:style-name="a1106" text:class-names=""><text:date text:fixed="false" style:data-style-name="a1107">3/21/2026</text:date></text:span><text:span text:style-name="a1108" text:class-names=""/></text:p>
        </draw:text-box>
        <svg:title/>
        <svg:desc/>
      </draw:frame>
      <draw:frame draw:id="id128" presentation:style-name="a1113" draw:name="Footer Placeholder 5" svg:x="0.16889in" svg:y="6.9979in" svg:width="4.91832in" svg:height="0.39931in" presentation:class="footer" presentation:placeholder="false">
        <draw:text-box>
          <text:p text:style-name="a1112" text:class-names="" text:cond-style-name=""><text:span text:style-name="a1111" text:class-names=""/></text:p>
        </draw:text-box>
        <svg:title/>
        <svg:desc/>
      </draw:frame>
      <draw:frame draw:id="id129" presentation:style-name="a1117" draw:name="Slide Number Placeholder 6" svg:x="12.68862in" svg:y="6.9979in" svg:width="0.51497in" svg:height="0.39931in" presentation:class="page-number" presentation:placeholder="false">
        <draw:text-box>
          <text:p text:style-name="a1116" text:class-names="" text:cond-style-name=""><text:span text:style-name="a1114" text:class-names=""><text:page-number style:num-format="1" text:fixed="false">‹N›</text:page-number></text:span><text:span text:style-name="a1115" text:class-names=""/></text:p>
        </draw:text-box>
        <svg:title/>
        <svg:desc/>
      </draw:frame>
      <presentation:notes style:page-layout-name="pageLayout2" draw:style-name="a1149">
        <draw:frame draw:id="id12" presentation:style-name="a1120" draw:name="Header Placeholder 1" svg:x="0in" svg:y="0in" svg:width="3.25in" svg:height="0.50174in" presentation:class="header" presentation:placeholder="false">
          <draw:text-box>
            <text:p text:style-name="a1119" text:class-names="" text:cond-style-name=""><text:span text:style-name="a1118" text:class-names=""/></text:p>
          </draw:text-box>
          <svg:title/>
          <svg:desc/>
        </draw:frame>
        <draw:frame draw:id="id13" presentation:style-name="a1125" draw:name="Date Placeholder 2" svg:x="4.24826in" svg:y="0in" svg:width="3.25in" svg:height="0.50174in" presentation:class="date-time" presentation:placeholder="false">
          <draw:text-box>
            <text:p text:style-name="a1124" text:class-names="" text:cond-style-name=""><text:span text:style-name="a1121" text:class-names=""><text:date text:fixed="false" style:data-style-name="a1122">3/21/2026</text:date></text:span><text:span text:style-name="a1123" text:class-names=""/></text:p>
          </draw:text-box>
          <svg:title/>
          <svg:desc/>
        </draw:frame>
        <draw:page-thumbnail svg:x="0.75in" svg:y="1.25in" svg:width="6in" svg:height="3.375in" presentation:class="page" draw:id="id14" presentation:style-name="a1126" draw:name="Slide Image Placeholder 3">
          <svg:title/>
          <svg:desc/>
        </draw:page-thumbnail>
        <draw:frame draw:id="id15" presentation:style-name="a1141" draw:name="Notes Placeholder 4" svg:x="0.75in" svg:y="4.8125in" svg:width="6in" svg:height="3.9375in" presentation:class="notes" presentation:placeholder="false">
          <draw:text-box>
            <text:p text:style-name="a1128" text:class-names="" text:cond-style-name=""><text:span text:style-name="a1127" text:class-names="">Click to edit Master text styles</text:span></text:p>
            <text:list text:style-name="a1131">
              <text:list-item>
                <text:list text:style-name="a1131">
                  <text:list-item>
                    <text:p text:style-name="a1130" text:class-names="" text:cond-style-name=""><text:span text:style-name="a1129" text:class-names="">Second level</text:span></text:p>
                  </text:list-item>
                </text:list>
              </text:list-item>
            </text:list>
            <text:list text:style-name="a1134">
              <text:list-item>
                <text:list text:style-name="a1134">
                  <text:list-item>
                    <text:list text:style-name="a1134">
                      <text:list-item>
                        <text:p text:style-name="a1133" text:class-names="" text:cond-style-name=""><text:span text:style-name="a113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37">
              <text:list-item>
                <text:list text:style-name="a1137">
                  <text:list-item>
                    <text:list text:style-name="a1137">
                      <text:list-item>
                        <text:list text:style-name="a1137">
                          <text:list-item>
                            <text:p text:style-name="a1136" text:class-names="" text:cond-style-name=""><text:span text:style-name="a113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40">
              <text:list-item>
                <text:list text:style-name="a1140">
                  <text:list-item>
                    <text:list text:style-name="a1140">
                      <text:list-item>
                        <text:list text:style-name="a1140">
                          <text:list-item>
                            <text:list text:style-name="a1140">
                              <text:list-item>
                                <text:p text:style-name="a1139" text:class-names="" text:cond-style-name=""><text:span text:style-name="a113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1144" draw:name="Footer Placeholder 5" svg:x="0in" svg:y="9.49826in" svg:width="3.25in" svg:height="0.50174in" presentation:class="footer" presentation:placeholder="false">
          <draw:text-box>
            <text:p text:style-name="a1143" text:class-names="" text:cond-style-name=""><text:span text:style-name="a1142" text:class-names=""/></text:p>
          </draw:text-box>
          <svg:title/>
          <svg:desc/>
        </draw:frame>
        <draw:frame draw:id="id17" presentation:style-name="a1148" draw:name="Slide Number Placeholder 6" svg:x="4.24826in" svg:y="9.49826in" svg:width="3.25in" svg:height="0.50174in" presentation:class="page-number" presentation:placeholder="false">
          <draw:text-box>
            <text:p text:style-name="a1147" text:class-names="" text:cond-style-name=""><text:span text:style-name="a1145" text:class-names=""><text:page-number style:num-format="1" text:fixed="false">‹N›</text:page-number></text:span><text:span text:style-name="a1146" text:class-names=""/></text:p>
          </draw:text-box>
          <svg:title/>
          <svg:desc/>
        </draw:frame>
      </presentation:notes>
    </style:master-page>
    <style:master-page style:name="Master1-Layout19-cust-Two-Content-2" style:page-layout-name="pageLayout1" draw:style-name="a1150">
      <draw:connector draw:type="line" svg:x1="3.41177in" svg:y1="0in" svg:x2="0in" svg:y2="0.75in" draw:id="id130" draw:layer="Master1-bg" draw:style-name="a1151" draw:name="Straight Connector 7">
        <svg:title/>
        <svg:desc/>
      </draw:connector>
      <draw:connector draw:type="line" svg:x1="0.98837in" svg:y1="0in" svg:x2="0in" svg:y2="7.15625in" draw:id="id131" draw:layer="Master1-bg" draw:style-name="a1152" draw:name="Straight Connector 8">
        <svg:title/>
        <svg:desc/>
      </draw:connector>
      <draw:connector draw:type="line" svg:x1="6.82813in" svg:y1="7.5in" svg:x2="-0.04688in" svg:y2="6.33333in" draw:id="id132" draw:layer="Master1-bg" draw:style-name="a1153" draw:name="Straight Connector 9">
        <svg:title/>
        <svg:desc/>
      </draw:connector>
      <draw:connector draw:type="line" svg:x1="13.33333in" svg:y1="6.39583in" svg:x2="9.25521in" svg:y2="7.5in" draw:id="id133" draw:layer="Master1-bg" draw:style-name="a1154" draw:name="Straight Connector 10">
        <svg:title/>
        <svg:desc/>
      </draw:connector>
      <draw:connector draw:type="line" svg:x1="13.33333in" svg:y1="1.80208in" svg:x2="12.62375in" svg:y2="7.5in" draw:id="id134" draw:layer="Master1-bg" draw:style-name="a1155" draw:name="Straight Connector 11">
        <svg:title/>
        <svg:desc/>
      </draw:connector>
      <draw:connector draw:type="line" svg:x1="13.33333in" svg:y1="4.65698in" svg:x2="11.79085in" svg:y2="0in" draw:id="id135" draw:layer="Master1-bg" draw:style-name="a1156" draw:name="Straight Connector 12">
        <svg:title/>
        <svg:desc/>
      </draw:connector>
      <draw:connector draw:type="line" svg:x1="13.33333in" svg:y1="1.01401in" svg:x2="7.14063in" svg:y2="-0.00521in" draw:id="id136" draw:layer="Master1-bg" draw:style-name="a1157" draw:name="Straight Connector 13">
        <svg:title/>
        <svg:desc/>
      </draw:connector>
      <draw:frame draw:id="id137" presentation:style-name="a1160" draw:name="Title 1" svg:x="1.25in" svg:y="0.58333in" svg:width="10.83333in" svg:height="1.51154in" presentation:class="title" presentation:placeholder="false">
        <draw:text-box>
          <text:p text:style-name="a1159" text:class-names="" text:cond-style-name=""><text:span text:style-name="a1158" text:class-names="">Click to add title</text:span></text:p>
        </draw:text-box>
        <svg:title/>
        <svg:desc/>
      </draw:frame>
      <draw:frame draw:id="id138" presentation:style-name="a1176" draw:name="Content Placeholder 3" svg:x="0.91667in" svg:y="2.27358in" svg:width="3.75725in" svg:height="4.44826in" presentation:class="object" presentation:placeholder="false">
        <draw:text-box>
          <text:list text:style-name="a1163">
            <text:list-item>
              <text:p text:style-name="a1162" text:class-names="" text:cond-style-name=""><text:span text:style-name="a1161" text:class-names="">Click to add text</text:span></text:p>
            </text:list-item>
          </text:list>
          <text:list text:style-name="a1166">
            <text:list-item>
              <text:list text:style-name="a1166">
                <text:list-item>
                  <text:p text:style-name="a1165" text:class-names="" text:cond-style-name=""><text:span text:style-name="a1164" text:class-names="">Second level</text:span></text:p>
                </text:list-item>
              </text:list>
            </text:list-item>
          </text:list>
          <text:list text:style-name="a1169">
            <text:list-item>
              <text:list text:style-name="a1169">
                <text:list-item>
                  <text:list text:style-name="a1169">
                    <text:list-item>
                      <text:p text:style-name="a1168" text:class-names="" text:cond-style-name=""><text:span text:style-name="a1167" text:class-names="">Third level</text:span></text:p>
                    </text:list-item>
                  </text:list>
                </text:list-item>
              </text:list>
            </text:list-item>
          </text:list>
          <text:list text:style-name="a1172">
            <text:list-item>
              <text:list text:style-name="a1172">
                <text:list-item>
                  <text:list text:style-name="a1172">
                    <text:list-item>
                      <text:list text:style-name="a1172">
                        <text:list-item>
                          <text:p text:style-name="a1171" text:class-names="" text:cond-style-name=""><text:span text:style-name="a117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75">
            <text:list-item>
              <text:list text:style-name="a1175">
                <text:list-item>
                  <text:list text:style-name="a1175">
                    <text:list-item>
                      <text:list text:style-name="a1175">
                        <text:list-item>
                          <text:list text:style-name="a1175">
                            <text:list-item>
                              <text:p text:style-name="a1174" text:class-names="" text:cond-style-name=""><text:span text:style-name="a117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9" presentation:style-name="a1191" draw:name="Content Placeholder 3" svg:x="5.43038in" svg:y="2.28272in" svg:width="6.56962in" svg:height="4.44826in" presentation:class="object" presentation:placeholder="false">
        <draw:text-box>
          <text:p text:style-name="a1178" text:class-names="" text:cond-style-name=""><text:span text:style-name="a1177" text:class-names="">Click to add text</text:span></text:p>
          <text:list text:style-name="a1181">
            <text:list-item>
              <text:list text:style-name="a1181">
                <text:list-item>
                  <text:p text:style-name="a1180" text:class-names="" text:cond-style-name=""><text:span text:style-name="a1179" text:class-names="">Second level</text:span></text:p>
                </text:list-item>
              </text:list>
            </text:list-item>
          </text:list>
          <text:list text:style-name="a1184">
            <text:list-item>
              <text:list text:style-name="a1184">
                <text:list-item>
                  <text:list text:style-name="a1184">
                    <text:list-item>
                      <text:p text:style-name="a1183" text:class-names="" text:cond-style-name=""><text:span text:style-name="a1182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7">
            <text:list-item>
              <text:list text:style-name="a1187">
                <text:list-item>
                  <text:list text:style-name="a1187">
                    <text:list-item>
                      <text:list text:style-name="a1187">
                        <text:list-item>
                          <text:p text:style-name="a1186" text:class-names="" text:cond-style-name=""><text:span text:style-name="a11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90">
            <text:list-item>
              <text:list text:style-name="a1190">
                <text:list-item>
                  <text:list text:style-name="a1190">
                    <text:list-item>
                      <text:list text:style-name="a1190">
                        <text:list-item>
                          <text:list text:style-name="a1190">
                            <text:list-item>
                              <text:p text:style-name="a1189" text:class-names="" text:cond-style-name=""><text:span text:style-name="a118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0" presentation:style-name="a1196" draw:name="Date Placeholder 4" svg:x="8.02395in" svg:y="6.9979in" svg:width="4.58651in" svg:height="0.39931in" presentation:class="date-time" presentation:placeholder="false">
        <draw:text-box>
          <text:p text:style-name="a1195" text:class-names="" text:cond-style-name=""><text:span text:style-name="a1192" text:class-names=""><text:date text:fixed="false" style:data-style-name="a1193">3/21/2026</text:date></text:span><text:span text:style-name="a1194" text:class-names=""/></text:p>
        </draw:text-box>
        <svg:title/>
        <svg:desc/>
      </draw:frame>
      <draw:frame draw:id="id141" presentation:style-name="a1199" draw:name="Footer Placeholder 5" svg:x="0.16889in" svg:y="6.9979in" svg:width="4.91832in" svg:height="0.39931in" presentation:class="footer" presentation:placeholder="false">
        <draw:text-box>
          <text:p text:style-name="a1198" text:class-names="" text:cond-style-name=""><text:span text:style-name="a1197" text:class-names=""/></text:p>
        </draw:text-box>
        <svg:title/>
        <svg:desc/>
      </draw:frame>
      <draw:frame draw:id="id142" presentation:style-name="a1203" draw:name="Slide Number Placeholder 6" svg:x="12.68862in" svg:y="6.9979in" svg:width="0.51497in" svg:height="0.39931in" presentation:class="page-number" presentation:placeholder="false">
        <draw:text-box>
          <text:p text:style-name="a1202" text:class-names="" text:cond-style-name=""><text:span text:style-name="a1200" text:class-names=""><text:page-number style:num-format="1" text:fixed="false">‹N›</text:page-number></text:span><text:span text:style-name="a1201" text:class-names=""/></text:p>
        </draw:text-box>
        <svg:title/>
        <svg:desc/>
      </draw:frame>
      <presentation:notes style:page-layout-name="pageLayout2" draw:style-name="a1235">
        <draw:frame draw:id="id12" presentation:style-name="a1206" draw:name="Header Placeholder 1" svg:x="0in" svg:y="0in" svg:width="3.25in" svg:height="0.50174in" presentation:class="header" presentation:placeholder="false">
          <draw:text-box>
            <text:p text:style-name="a1205" text:class-names="" text:cond-style-name=""><text:span text:style-name="a1204" text:class-names=""/></text:p>
          </draw:text-box>
          <svg:title/>
          <svg:desc/>
        </draw:frame>
        <draw:frame draw:id="id13" presentation:style-name="a1211" draw:name="Date Placeholder 2" svg:x="4.24826in" svg:y="0in" svg:width="3.25in" svg:height="0.50174in" presentation:class="date-time" presentation:placeholder="false">
          <draw:text-box>
            <text:p text:style-name="a1210" text:class-names="" text:cond-style-name=""><text:span text:style-name="a1207" text:class-names=""><text:date text:fixed="false" style:data-style-name="a1208">3/21/2026</text:date></text:span><text:span text:style-name="a1209" text:class-names=""/></text:p>
          </draw:text-box>
          <svg:title/>
          <svg:desc/>
        </draw:frame>
        <draw:page-thumbnail svg:x="0.75in" svg:y="1.25in" svg:width="6in" svg:height="3.375in" presentation:class="page" draw:id="id14" presentation:style-name="a1212" draw:name="Slide Image Placeholder 3">
          <svg:title/>
          <svg:desc/>
        </draw:page-thumbnail>
        <draw:frame draw:id="id15" presentation:style-name="a1227" draw:name="Notes Placeholder 4" svg:x="0.75in" svg:y="4.8125in" svg:width="6in" svg:height="3.9375in" presentation:class="notes" presentation:placeholder="false">
          <draw:text-box>
            <text:p text:style-name="a1214" text:class-names="" text:cond-style-name=""><text:span text:style-name="a1213" text:class-names="">Click to edit Master text styles</text:span></text:p>
            <text:list text:style-name="a1217">
              <text:list-item>
                <text:list text:style-name="a1217">
                  <text:list-item>
                    <text:p text:style-name="a1216" text:class-names="" text:cond-style-name=""><text:span text:style-name="a1215" text:class-names="">Second level</text:span></text:p>
                  </text:list-item>
                </text:list>
              </text:list-item>
            </text:list>
            <text:list text:style-name="a1220">
              <text:list-item>
                <text:list text:style-name="a1220">
                  <text:list-item>
                    <text:list text:style-name="a1220">
                      <text:list-item>
                        <text:p text:style-name="a1219" text:class-names="" text:cond-style-name=""><text:span text:style-name="a121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23">
              <text:list-item>
                <text:list text:style-name="a1223">
                  <text:list-item>
                    <text:list text:style-name="a1223">
                      <text:list-item>
                        <text:list text:style-name="a1223">
                          <text:list-item>
                            <text:p text:style-name="a1222" text:class-names="" text:cond-style-name=""><text:span text:style-name="a122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26">
              <text:list-item>
                <text:list text:style-name="a1226">
                  <text:list-item>
                    <text:list text:style-name="a1226">
                      <text:list-item>
                        <text:list text:style-name="a1226">
                          <text:list-item>
                            <text:list text:style-name="a1226">
                              <text:list-item>
                                <text:p text:style-name="a1225" text:class-names="" text:cond-style-name=""><text:span text:style-name="a122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1230" draw:name="Footer Placeholder 5" svg:x="0in" svg:y="9.49826in" svg:width="3.25in" svg:height="0.50174in" presentation:class="footer" presentation:placeholder="false">
          <draw:text-box>
            <text:p text:style-name="a1229" text:class-names="" text:cond-style-name=""><text:span text:style-name="a1228" text:class-names=""/></text:p>
          </draw:text-box>
          <svg:title/>
          <svg:desc/>
        </draw:frame>
        <draw:frame draw:id="id17" presentation:style-name="a1234" draw:name="Slide Number Placeholder 6" svg:x="4.24826in" svg:y="9.49826in" svg:width="3.25in" svg:height="0.50174in" presentation:class="page-number" presentation:placeholder="false">
          <draw:text-box>
            <text:p text:style-name="a1233" text:class-names="" text:cond-style-name=""><text:span text:style-name="a1231" text:class-names=""><text:page-number style:num-format="1" text:fixed="false">‹N›</text:page-number></text:span><text:span text:style-name="a1232" text:class-names=""/></text:p>
          </draw:text-box>
          <svg:title/>
          <svg:desc/>
        </draw:frame>
      </presentation:notes>
    </style:master-page>
    <style:master-page style:name="Master1-Layout20-cust-Content-+-picture-" style:page-layout-name="pageLayout1" draw:style-name="a1236">
      <draw:connector draw:type="line" svg:x1="3.41177in" svg:y1="0in" svg:x2="0in" svg:y2="0.75in" draw:id="id143" draw:layer="Master1-bg" draw:style-name="a1237" draw:name="Straight Connector 3">
        <svg:title/>
        <svg:desc/>
      </draw:connector>
      <draw:connector draw:type="line" svg:x1="0.98837in" svg:y1="0in" svg:x2="0in" svg:y2="7.15625in" draw:id="id144" draw:layer="Master1-bg" draw:style-name="a1238" draw:name="Straight Connector 8">
        <svg:title/>
        <svg:desc/>
      </draw:connector>
      <draw:connector draw:type="line" svg:x1="6.82813in" svg:y1="7.5in" svg:x2="-0.04688in" svg:y2="6.33333in" draw:id="id145" draw:layer="Master1-bg" draw:style-name="a1239" draw:name="Straight Connector 9">
        <svg:title/>
        <svg:desc/>
      </draw:connector>
      <draw:frame draw:id="id146" draw:layer="Master1-bg" presentation:style-name="a1242" draw:name="Title 1" svg:x="0.91667in" svg:y="0.39931in" svg:width="7.26812in" svg:height="1.44965in" presentation:class="title" presentation:placeholder="false">
        <draw:text-box>
          <text:p text:style-name="a1241" text:class-names="" text:cond-style-name=""><text:span text:style-name="a1240" text:class-names=""/></text:p>
        </draw:text-box>
        <svg:title/>
        <svg:desc/>
      </draw:frame>
      <draw:frame draw:id="id147" draw:layer="Master1-bg" presentation:style-name="a1257" draw:name="Content Placeholder 2" svg:x="0.91667in" svg:y="2.24826in" svg:width="6.32246in" svg:height="4.44826in" presentation:class="object" presentation:placeholder="false">
        <draw:text-box>
          <text:p text:style-name="a1244" text:class-names="" text:cond-style-name=""><text:span text:style-name="a1243" text:class-names="">Click to add text</text:span></text:p>
          <text:list text:style-name="a1247">
            <text:list-item>
              <text:list text:style-name="a1247">
                <text:list-item>
                  <text:p text:style-name="a1246" text:class-names="" text:cond-style-name=""><text:span text:style-name="a1245" text:class-names="">Second level</text:span></text:p>
                </text:list-item>
              </text:list>
            </text:list-item>
          </text:list>
          <text:list text:style-name="a1250">
            <text:list-item>
              <text:list text:style-name="a1250">
                <text:list-item>
                  <text:list text:style-name="a1250">
                    <text:list-item>
                      <text:p text:style-name="a1249" text:class-names="" text:cond-style-name=""><text:span text:style-name="a1248" text:class-names="">Third level</text:span></text:p>
                    </text:list-item>
                  </text:list>
                </text:list-item>
              </text:list>
            </text:list-item>
          </text:list>
          <text:list text:style-name="a1253">
            <text:list-item>
              <text:list text:style-name="a1253">
                <text:list-item>
                  <text:list text:style-name="a1253">
                    <text:list-item>
                      <text:list text:style-name="a1253">
                        <text:list-item>
                          <text:p text:style-name="a1252" text:class-names="" text:cond-style-name=""><text:span text:style-name="a125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56">
            <text:list-item>
              <text:list text:style-name="a1256">
                <text:list-item>
                  <text:list text:style-name="a1256">
                    <text:list-item>
                      <text:list text:style-name="a1256">
                        <text:list-item>
                          <text:list text:style-name="a1256">
                            <text:list-item>
                              <text:p text:style-name="a1255" text:class-names="" text:cond-style-name=""><text:span text:style-name="a125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8" draw:layer="Master1-bg" presentation:style-name="a1260" draw:name="Picture Placeholder 7" svg:x="8.27536in" svg:y="-0.025in" svg:width="5.05797in" svg:height="7.55in" presentation:class="graphic" presentation:placeholder="false">
        <draw:text-box>
          <text:p text:style-name="a1259" text:class-names="" text:cond-style-name=""><text:span text:style-name="a1258" text:class-names="">Click icon to add picture</text:span></text:p>
        </draw:text-box>
        <svg:title/>
        <svg:desc/>
      </draw:frame>
      <draw:frame draw:id="id149" draw:layer="Master1-bg" presentation:style-name="a1265" draw:name="Date Placeholder 4" svg:x="8.02395in" svg:y="6.9979in" svg:width="4.58651in" svg:height="0.39931in" presentation:class="date-time" presentation:placeholder="false">
        <draw:text-box>
          <text:p text:style-name="a1264" text:class-names="" text:cond-style-name=""><text:span text:style-name="a1261" text:class-names=""><text:date text:fixed="false" style:data-style-name="a1262">3/21/2026</text:date></text:span><text:span text:style-name="a1263" text:class-names=""/></text:p>
        </draw:text-box>
        <svg:title/>
        <svg:desc/>
      </draw:frame>
      <draw:frame draw:id="id150" presentation:style-name="a1268" draw:name="Footer Placeholder 5" svg:x="0.16889in" svg:y="6.9979in" svg:width="4.91832in" svg:height="0.39931in" presentation:class="footer" presentation:placeholder="false">
        <draw:text-box>
          <text:p text:style-name="a1267" text:class-names="" text:cond-style-name=""><text:span text:style-name="a1266" text:class-names=""/></text:p>
        </draw:text-box>
        <svg:title/>
        <svg:desc/>
      </draw:frame>
      <draw:frame draw:id="id151" presentation:style-name="a1272" draw:name="Slide Number Placeholder 6" svg:x="12.68862in" svg:y="6.9979in" svg:width="0.51497in" svg:height="0.39931in" presentation:class="page-number" presentation:placeholder="false">
        <draw:text-box>
          <text:p text:style-name="a1271" text:class-names="" text:cond-style-name=""><text:span text:style-name="a1269" text:class-names=""><text:page-number style:num-format="1" text:fixed="false">‹N›</text:page-number></text:span><text:span text:style-name="a1270" text:class-names=""/></text:p>
        </draw:text-box>
        <svg:title/>
        <svg:desc/>
      </draw:frame>
      <presentation:notes style:page-layout-name="pageLayout2" draw:style-name="a1304">
        <draw:frame draw:id="id12" presentation:style-name="a1275" draw:name="Header Placeholder 1" svg:x="0in" svg:y="0in" svg:width="3.25in" svg:height="0.50174in" presentation:class="header" presentation:placeholder="false">
          <draw:text-box>
            <text:p text:style-name="a1274" text:class-names="" text:cond-style-name=""><text:span text:style-name="a1273" text:class-names=""/></text:p>
          </draw:text-box>
          <svg:title/>
          <svg:desc/>
        </draw:frame>
        <draw:frame draw:id="id13" presentation:style-name="a1280" draw:name="Date Placeholder 2" svg:x="4.24826in" svg:y="0in" svg:width="3.25in" svg:height="0.50174in" presentation:class="date-time" presentation:placeholder="false">
          <draw:text-box>
            <text:p text:style-name="a1279" text:class-names="" text:cond-style-name=""><text:span text:style-name="a1276" text:class-names=""><text:date text:fixed="false" style:data-style-name="a1277">3/21/2026</text:date></text:span><text:span text:style-name="a1278" text:class-names=""/></text:p>
          </draw:text-box>
          <svg:title/>
          <svg:desc/>
        </draw:frame>
        <draw:page-thumbnail svg:x="0.75in" svg:y="1.25in" svg:width="6in" svg:height="3.375in" presentation:class="page" draw:id="id14" presentation:style-name="a1281" draw:name="Slide Image Placeholder 3">
          <svg:title/>
          <svg:desc/>
        </draw:page-thumbnail>
        <draw:frame draw:id="id15" presentation:style-name="a1296" draw:name="Notes Placeholder 4" svg:x="0.75in" svg:y="4.8125in" svg:width="6in" svg:height="3.9375in" presentation:class="notes" presentation:placeholder="false">
          <draw:text-box>
            <text:p text:style-name="a1283" text:class-names="" text:cond-style-name=""><text:span text:style-name="a1282" text:class-names="">Click to edit Master text styles</text:span></text:p>
            <text:list text:style-name="a1286">
              <text:list-item>
                <text:list text:style-name="a1286">
                  <text:list-item>
                    <text:p text:style-name="a1285" text:class-names="" text:cond-style-name=""><text:span text:style-name="a1284" text:class-names="">Second level</text:span></text:p>
                  </text:list-item>
                </text:list>
              </text:list-item>
            </text:list>
            <text:list text:style-name="a1289">
              <text:list-item>
                <text:list text:style-name="a1289">
                  <text:list-item>
                    <text:list text:style-name="a1289">
                      <text:list-item>
                        <text:p text:style-name="a1288" text:class-names="" text:cond-style-name=""><text:span text:style-name="a128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92">
              <text:list-item>
                <text:list text:style-name="a1292">
                  <text:list-item>
                    <text:list text:style-name="a1292">
                      <text:list-item>
                        <text:list text:style-name="a1292">
                          <text:list-item>
                            <text:p text:style-name="a1291" text:class-names="" text:cond-style-name=""><text:span text:style-name="a129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95">
              <text:list-item>
                <text:list text:style-name="a1295">
                  <text:list-item>
                    <text:list text:style-name="a1295">
                      <text:list-item>
                        <text:list text:style-name="a1295">
                          <text:list-item>
                            <text:list text:style-name="a1295">
                              <text:list-item>
                                <text:p text:style-name="a1294" text:class-names="" text:cond-style-name=""><text:span text:style-name="a129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1299" draw:name="Footer Placeholder 5" svg:x="0in" svg:y="9.49826in" svg:width="3.25in" svg:height="0.50174in" presentation:class="footer" presentation:placeholder="false">
          <draw:text-box>
            <text:p text:style-name="a1298" text:class-names="" text:cond-style-name=""><text:span text:style-name="a1297" text:class-names=""/></text:p>
          </draw:text-box>
          <svg:title/>
          <svg:desc/>
        </draw:frame>
        <draw:frame draw:id="id17" presentation:style-name="a1303" draw:name="Slide Number Placeholder 6" svg:x="4.24826in" svg:y="9.49826in" svg:width="3.25in" svg:height="0.50174in" presentation:class="page-number" presentation:placeholder="false">
          <draw:text-box>
            <text:p text:style-name="a1302" text:class-names="" text:cond-style-name=""><text:span text:style-name="a1300" text:class-names=""><text:page-number style:num-format="1" text:fixed="false">‹N›</text:page-number></text:span><text:span text:style-name="a1301" text:class-names=""/></text:p>
          </draw:text-box>
          <svg:title/>
          <svg:desc/>
        </draw:frame>
      </presentation:notes>
    </style:master-page>
    <style:master-page style:name="Master1-Layout21-cust-Content-+-table" style:page-layout-name="pageLayout1" draw:style-name="a1305">
      <draw:connector draw:type="line" svg:x1="3.41177in" svg:y1="0.01266in" svg:x2="0in" svg:y2="0.76266in" draw:id="id152" draw:layer="Master1-bg" draw:style-name="a1306" draw:name="Straight Connector 3">
        <svg:title/>
        <svg:desc/>
      </draw:connector>
      <draw:connector draw:type="line" svg:x1="0.98837in" svg:y1="0.01266in" svg:x2="0in" svg:y2="7.16891in" draw:id="id153" draw:layer="Master1-bg" draw:style-name="a1307" draw:name="Straight Connector 8">
        <svg:title/>
        <svg:desc/>
      </draw:connector>
      <draw:connector draw:type="line" svg:x1="6.82813in" svg:y1="7.51266in" svg:x2="-0.04688in" svg:y2="6.34599in" draw:id="id154" draw:layer="Master1-bg" draw:style-name="a1308" draw:name="Straight Connector 9">
        <svg:title/>
        <svg:desc/>
      </draw:connector>
      <draw:connector draw:type="line" svg:x1="13.33333in" svg:y1="6.40849in" svg:x2="9.25521in" svg:y2="7.51266in" draw:id="id155" draw:layer="Master1-bg" draw:style-name="a1309" draw:name="Straight Connector 10">
        <svg:title/>
        <svg:desc/>
      </draw:connector>
      <draw:connector draw:type="line" svg:x1="13.33333in" svg:y1="1.81474in" svg:x2="12.62375in" svg:y2="7.51266in" draw:id="id156" draw:layer="Master1-bg" draw:style-name="a1310" draw:name="Straight Connector 11">
        <svg:title/>
        <svg:desc/>
      </draw:connector>
      <draw:connector draw:type="line" svg:x1="13.33333in" svg:y1="4.66964in" svg:x2="11.79085in" svg:y2="0.01266in" draw:id="id157" draw:layer="Master1-bg" draw:style-name="a1311" draw:name="Straight Connector 12">
        <svg:title/>
        <svg:desc/>
      </draw:connector>
      <draw:connector draw:type="line" svg:x1="13.33333in" svg:y1="1.02667in" svg:x2="7.14063in" svg:y2="0.00745in" draw:id="id158" draw:layer="Master1-bg" draw:style-name="a1312" draw:name="Straight Connector 13">
        <svg:title/>
        <svg:desc/>
      </draw:connector>
      <draw:frame draw:id="id159" presentation:style-name="a1315" draw:name="Title 1" svg:x="0.91667in" svg:y="0.39931in" svg:width="11.29747in" svg:height="1.44965in" presentation:class="title" presentation:placeholder="false">
        <draw:text-box>
          <text:p text:style-name="a1314" text:class-names="" text:cond-style-name=""><text:span text:style-name="a1313" text:class-names="">Click to add title</text:span></text:p>
        </draw:text-box>
        <svg:title/>
        <svg:desc/>
      </draw:frame>
      <draw:frame draw:id="id160" presentation:style-name="a1330" draw:name="Content Placeholder 2" svg:x="0.91667in" svg:y="2.33712in" svg:width="3.08in" svg:height="4.35941in" presentation:class="object" presentation:placeholder="false">
        <draw:text-box>
          <text:p text:style-name="a1317" text:class-names="" text:cond-style-name=""><text:span text:style-name="a1316" text:class-names="">Click to add text</text:span></text:p>
          <text:list text:style-name="a1320">
            <text:list-item>
              <text:list text:style-name="a1320">
                <text:list-item>
                  <text:p text:style-name="a1319" text:class-names="" text:cond-style-name=""><text:span text:style-name="a1318" text:class-names="">Second level</text:span></text:p>
                </text:list-item>
              </text:list>
            </text:list-item>
          </text:list>
          <text:list text:style-name="a1323">
            <text:list-item>
              <text:list text:style-name="a1323">
                <text:list-item>
                  <text:list text:style-name="a1323">
                    <text:list-item>
                      <text:p text:style-name="a1322" text:class-names="" text:cond-style-name=""><text:span text:style-name="a13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6">
            <text:list-item>
              <text:list text:style-name="a1326">
                <text:list-item>
                  <text:list text:style-name="a1326">
                    <text:list-item>
                      <text:list text:style-name="a1326">
                        <text:list-item>
                          <text:p text:style-name="a1325" text:class-names="" text:cond-style-name=""><text:span text:style-name="a13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29">
            <text:list-item>
              <text:list text:style-name="a1329">
                <text:list-item>
                  <text:list text:style-name="a1329">
                    <text:list-item>
                      <text:list text:style-name="a1329">
                        <text:list-item>
                          <text:list text:style-name="a1329">
                            <text:list-item>
                              <text:p text:style-name="a1328" text:class-names="" text:cond-style-name=""><text:span text:style-name="a132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1" presentation:style-name="a1333" draw:name="Table Placeholder 7" svg:x="4.49367in" svg:y="2.33712in" svg:width="7.72046in" svg:height="4.35941in" presentation:class="table" presentation:placeholder="false">
        <draw:text-box>
          <text:p text:style-name="a1332" text:class-names="" text:cond-style-name=""><text:span text:style-name="a1331" text:class-names="">Click icon to add table</text:span></text:p>
        </draw:text-box>
        <svg:title/>
        <svg:desc/>
      </draw:frame>
      <draw:frame draw:id="id162" presentation:style-name="a1338" draw:name="Date Placeholder 4" svg:x="8.02395in" svg:y="6.9979in" svg:width="4.58651in" svg:height="0.39931in" presentation:class="date-time" presentation:placeholder="false">
        <draw:text-box>
          <text:p text:style-name="a1337" text:class-names="" text:cond-style-name=""><text:span text:style-name="a1334" text:class-names=""><text:date text:fixed="false" style:data-style-name="a1335">3/21/2026</text:date></text:span><text:span text:style-name="a1336" text:class-names=""/></text:p>
        </draw:text-box>
        <svg:title/>
        <svg:desc/>
      </draw:frame>
      <draw:frame draw:id="id163" presentation:style-name="a1341" draw:name="Footer Placeholder 5" svg:x="0.16889in" svg:y="6.9979in" svg:width="4.91832in" svg:height="0.39931in" presentation:class="footer" presentation:placeholder="false">
        <draw:text-box>
          <text:p text:style-name="a1340" text:class-names="" text:cond-style-name=""><text:span text:style-name="a1339" text:class-names=""/></text:p>
        </draw:text-box>
        <svg:title/>
        <svg:desc/>
      </draw:frame>
      <draw:frame draw:id="id164" presentation:style-name="a1345" draw:name="Slide Number Placeholder 6" svg:x="12.68862in" svg:y="6.9979in" svg:width="0.51497in" svg:height="0.39931in" presentation:class="page-number" presentation:placeholder="false">
        <draw:text-box>
          <text:p text:style-name="a1344" text:class-names="" text:cond-style-name=""><text:span text:style-name="a1342" text:class-names=""><text:page-number style:num-format="1" text:fixed="false">‹N›</text:page-number></text:span><text:span text:style-name="a1343" text:class-names=""/></text:p>
        </draw:text-box>
        <svg:title/>
        <svg:desc/>
      </draw:frame>
      <presentation:notes style:page-layout-name="pageLayout2" draw:style-name="a1377">
        <draw:frame draw:id="id12" presentation:style-name="a1348" draw:name="Header Placeholder 1" svg:x="0in" svg:y="0in" svg:width="3.25in" svg:height="0.50174in" presentation:class="header" presentation:placeholder="false">
          <draw:text-box>
            <text:p text:style-name="a1347" text:class-names="" text:cond-style-name=""><text:span text:style-name="a1346" text:class-names=""/></text:p>
          </draw:text-box>
          <svg:title/>
          <svg:desc/>
        </draw:frame>
        <draw:frame draw:id="id13" presentation:style-name="a1353" draw:name="Date Placeholder 2" svg:x="4.24826in" svg:y="0in" svg:width="3.25in" svg:height="0.50174in" presentation:class="date-time" presentation:placeholder="false">
          <draw:text-box>
            <text:p text:style-name="a1352" text:class-names="" text:cond-style-name=""><text:span text:style-name="a1349" text:class-names=""><text:date text:fixed="false" style:data-style-name="a1350">3/21/2026</text:date></text:span><text:span text:style-name="a1351" text:class-names=""/></text:p>
          </draw:text-box>
          <svg:title/>
          <svg:desc/>
        </draw:frame>
        <draw:page-thumbnail svg:x="0.75in" svg:y="1.25in" svg:width="6in" svg:height="3.375in" presentation:class="page" draw:id="id14" presentation:style-name="a1354" draw:name="Slide Image Placeholder 3">
          <svg:title/>
          <svg:desc/>
        </draw:page-thumbnail>
        <draw:frame draw:id="id15" presentation:style-name="a1369" draw:name="Notes Placeholder 4" svg:x="0.75in" svg:y="4.8125in" svg:width="6in" svg:height="3.9375in" presentation:class="notes" presentation:placeholder="false">
          <draw:text-box>
            <text:p text:style-name="a1356" text:class-names="" text:cond-style-name=""><text:span text:style-name="a1355" text:class-names="">Click to edit Master text styles</text:span></text:p>
            <text:list text:style-name="a1359">
              <text:list-item>
                <text:list text:style-name="a1359">
                  <text:list-item>
                    <text:p text:style-name="a1358" text:class-names="" text:cond-style-name=""><text:span text:style-name="a1357" text:class-names="">Second level</text:span></text:p>
                  </text:list-item>
                </text:list>
              </text:list-item>
            </text:list>
            <text:list text:style-name="a1362">
              <text:list-item>
                <text:list text:style-name="a1362">
                  <text:list-item>
                    <text:list text:style-name="a1362">
                      <text:list-item>
                        <text:p text:style-name="a1361" text:class-names="" text:cond-style-name=""><text:span text:style-name="a136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365">
              <text:list-item>
                <text:list text:style-name="a1365">
                  <text:list-item>
                    <text:list text:style-name="a1365">
                      <text:list-item>
                        <text:list text:style-name="a1365">
                          <text:list-item>
                            <text:p text:style-name="a1364" text:class-names="" text:cond-style-name=""><text:span text:style-name="a136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68">
              <text:list-item>
                <text:list text:style-name="a1368">
                  <text:list-item>
                    <text:list text:style-name="a1368">
                      <text:list-item>
                        <text:list text:style-name="a1368">
                          <text:list-item>
                            <text:list text:style-name="a1368">
                              <text:list-item>
                                <text:p text:style-name="a1367" text:class-names="" text:cond-style-name=""><text:span text:style-name="a136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1372" draw:name="Footer Placeholder 5" svg:x="0in" svg:y="9.49826in" svg:width="3.25in" svg:height="0.50174in" presentation:class="footer" presentation:placeholder="false">
          <draw:text-box>
            <text:p text:style-name="a1371" text:class-names="" text:cond-style-name=""><text:span text:style-name="a1370" text:class-names=""/></text:p>
          </draw:text-box>
          <svg:title/>
          <svg:desc/>
        </draw:frame>
        <draw:frame draw:id="id17" presentation:style-name="a1376" draw:name="Slide Number Placeholder 6" svg:x="4.24826in" svg:y="9.49826in" svg:width="3.25in" svg:height="0.50174in" presentation:class="page-number" presentation:placeholder="false">
          <draw:text-box>
            <text:p text:style-name="a1375" text:class-names="" text:cond-style-name=""><text:span text:style-name="a1373" text:class-names=""><text:page-number style:num-format="1" text:fixed="false">‹N›</text:page-number></text:span><text:span text:style-name="a1374" text:class-names=""/></text:p>
          </draw:text-box>
          <svg:title/>
          <svg:desc/>
        </draw:frame>
      </presentation:notes>
    </style:master-page>
    <style:master-page style:name="Master1-Layout22-cust-Two-Content-3" style:page-layout-name="pageLayout1" draw:style-name="a1378">
      <draw:connector draw:type="line" svg:x1="3.41177in" svg:y1="0.01266in" svg:x2="0in" svg:y2="0.76266in" draw:id="id165" draw:layer="Master1-bg" draw:style-name="a1379" draw:name="Straight Connector 7">
        <svg:title/>
        <svg:desc/>
      </draw:connector>
      <draw:connector draw:type="line" svg:x1="0.98837in" svg:y1="0.01266in" svg:x2="0in" svg:y2="7.16891in" draw:id="id166" draw:layer="Master1-bg" draw:style-name="a1380" draw:name="Straight Connector 8">
        <svg:title/>
        <svg:desc/>
      </draw:connector>
      <draw:connector draw:type="line" svg:x1="6.82813in" svg:y1="7.51266in" svg:x2="-0.04688in" svg:y2="6.34599in" draw:id="id167" draw:layer="Master1-bg" draw:style-name="a1381" draw:name="Straight Connector 9">
        <svg:title/>
        <svg:desc/>
      </draw:connector>
      <draw:connector draw:type="line" svg:x1="13.33333in" svg:y1="6.40849in" svg:x2="9.25521in" svg:y2="7.51266in" draw:id="id168" draw:layer="Master1-bg" draw:style-name="a1382" draw:name="Straight Connector 10">
        <svg:title/>
        <svg:desc/>
      </draw:connector>
      <draw:connector draw:type="line" svg:x1="13.33333in" svg:y1="1.81474in" svg:x2="12.62375in" svg:y2="7.51266in" draw:id="id169" draw:layer="Master1-bg" draw:style-name="a1383" draw:name="Straight Connector 11">
        <svg:title/>
        <svg:desc/>
      </draw:connector>
      <draw:connector draw:type="line" svg:x1="13.33333in" svg:y1="4.66964in" svg:x2="11.79085in" svg:y2="0.01266in" draw:id="id170" draw:layer="Master1-bg" draw:style-name="a1384" draw:name="Straight Connector 12">
        <svg:title/>
        <svg:desc/>
      </draw:connector>
      <draw:connector draw:type="line" svg:x1="13.33333in" svg:y1="1.02667in" svg:x2="7.14063in" svg:y2="0.00745in" draw:id="id171" draw:layer="Master1-bg" draw:style-name="a1385" draw:name="Straight Connector 13">
        <svg:title/>
        <svg:desc/>
      </draw:connector>
      <draw:frame draw:id="id172" presentation:style-name="a1388" draw:name="Title 1" svg:x="1.25in" svg:y="0.58333in" svg:width="10.83333in" svg:height="1.51154in" presentation:class="title" presentation:placeholder="false">
        <draw:text-box>
          <text:p text:style-name="a1387" text:class-names="" text:cond-style-name=""><text:span text:style-name="a1386" text:class-names="">Click to add title</text:span></text:p>
        </draw:text-box>
        <svg:title/>
        <svg:desc/>
      </draw:frame>
      <draw:frame draw:id="id173" presentation:style-name="a1403" draw:name="Content Placeholder 3" svg:x="0.91667in" svg:y="2.17374in" svg:width="7.62764in" svg:height="4.7in" presentation:class="object" presentation:placeholder="false">
        <draw:text-box>
          <text:p text:style-name="a1390" text:class-names="" text:cond-style-name=""><text:span text:style-name="a1389" text:class-names="">Click to add text</text:span></text:p>
          <text:list text:style-name="a1393">
            <text:list-item>
              <text:list text:style-name="a1393">
                <text:list-item>
                  <text:p text:style-name="a1392" text:class-names="" text:cond-style-name=""><text:span text:style-name="a1391" text:class-names="">Second level</text:span></text:p>
                </text:list-item>
              </text:list>
            </text:list-item>
          </text:list>
          <text:list text:style-name="a1396">
            <text:list-item>
              <text:list text:style-name="a1396">
                <text:list-item>
                  <text:list text:style-name="a1396">
                    <text:list-item>
                      <text:p text:style-name="a1395" text:class-names="" text:cond-style-name=""><text:span text:style-name="a1394" text:class-names="">Third level</text:span></text:p>
                    </text:list-item>
                  </text:list>
                </text:list-item>
              </text:list>
            </text:list-item>
          </text:list>
          <text:list text:style-name="a1399">
            <text:list-item>
              <text:list text:style-name="a1399">
                <text:list-item>
                  <text:list text:style-name="a1399">
                    <text:list-item>
                      <text:list text:style-name="a1399">
                        <text:list-item>
                          <text:p text:style-name="a1398" text:class-names="" text:cond-style-name=""><text:span text:style-name="a139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02">
            <text:list-item>
              <text:list text:style-name="a1402">
                <text:list-item>
                  <text:list text:style-name="a1402">
                    <text:list-item>
                      <text:list text:style-name="a1402">
                        <text:list-item>
                          <text:list text:style-name="a1402">
                            <text:list-item>
                              <text:p text:style-name="a1401" text:class-names="" text:cond-style-name=""><text:span text:style-name="a140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4" presentation:style-name="a1418" draw:name="Content Placeholder 3" svg:x="8.65823in" svg:y="2.17374in" svg:width="3.75844in" svg:height="4.7in" presentation:class="object" presentation:placeholder="false">
        <draw:text-box>
          <text:p text:style-name="a1405" text:class-names="" text:cond-style-name=""><text:span text:style-name="a1404" text:class-names="">Click to add text</text:span></text:p>
          <text:list text:style-name="a1408">
            <text:list-item>
              <text:list text:style-name="a1408">
                <text:list-item>
                  <text:p text:style-name="a1407" text:class-names="" text:cond-style-name=""><text:span text:style-name="a1406" text:class-names="">Second level</text:span></text:p>
                </text:list-item>
              </text:list>
            </text:list-item>
          </text:list>
          <text:list text:style-name="a1411">
            <text:list-item>
              <text:list text:style-name="a1411">
                <text:list-item>
                  <text:list text:style-name="a1411">
                    <text:list-item>
                      <text:p text:style-name="a1410" text:class-names="" text:cond-style-name=""><text:span text:style-name="a1409" text:class-names="">Third level</text:span></text:p>
                    </text:list-item>
                  </text:list>
                </text:list-item>
              </text:list>
            </text:list-item>
          </text:list>
          <text:list text:style-name="a1414">
            <text:list-item>
              <text:list text:style-name="a1414">
                <text:list-item>
                  <text:list text:style-name="a1414">
                    <text:list-item>
                      <text:list text:style-name="a1414">
                        <text:list-item>
                          <text:p text:style-name="a1413" text:class-names="" text:cond-style-name=""><text:span text:style-name="a141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17">
            <text:list-item>
              <text:list text:style-name="a1417">
                <text:list-item>
                  <text:list text:style-name="a1417">
                    <text:list-item>
                      <text:list text:style-name="a1417">
                        <text:list-item>
                          <text:list text:style-name="a1417">
                            <text:list-item>
                              <text:p text:style-name="a1416" text:class-names="" text:cond-style-name=""><text:span text:style-name="a141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5" presentation:style-name="a1423" draw:name="Date Placeholder 4" svg:x="8.02395in" svg:y="6.9979in" svg:width="4.58651in" svg:height="0.39931in" presentation:class="date-time" presentation:placeholder="false">
        <draw:text-box>
          <text:p text:style-name="a1422" text:class-names="" text:cond-style-name=""><text:span text:style-name="a1419" text:class-names=""><text:date text:fixed="false" style:data-style-name="a1420">3/21/2026</text:date></text:span><text:span text:style-name="a1421" text:class-names=""/></text:p>
        </draw:text-box>
        <svg:title/>
        <svg:desc/>
      </draw:frame>
      <draw:frame draw:id="id176" presentation:style-name="a1426" draw:name="Footer Placeholder 5" svg:x="0.16889in" svg:y="6.9979in" svg:width="4.91832in" svg:height="0.39931in" presentation:class="footer" presentation:placeholder="false">
        <draw:text-box>
          <text:p text:style-name="a1425" text:class-names="" text:cond-style-name=""><text:span text:style-name="a1424" text:class-names=""/></text:p>
        </draw:text-box>
        <svg:title/>
        <svg:desc/>
      </draw:frame>
      <draw:frame draw:id="id177" presentation:style-name="a1430" draw:name="Slide Number Placeholder 6" svg:x="12.68862in" svg:y="6.9979in" svg:width="0.51497in" svg:height="0.39931in" presentation:class="page-number" presentation:placeholder="false">
        <draw:text-box>
          <text:p text:style-name="a1429" text:class-names="" text:cond-style-name=""><text:span text:style-name="a1427" text:class-names=""><text:page-number style:num-format="1" text:fixed="false">‹N›</text:page-number></text:span><text:span text:style-name="a1428" text:class-names=""/></text:p>
        </draw:text-box>
        <svg:title/>
        <svg:desc/>
      </draw:frame>
      <presentation:notes style:page-layout-name="pageLayout2" draw:style-name="a1462">
        <draw:frame draw:id="id12" presentation:style-name="a1433" draw:name="Header Placeholder 1" svg:x="0in" svg:y="0in" svg:width="3.25in" svg:height="0.50174in" presentation:class="header" presentation:placeholder="false">
          <draw:text-box>
            <text:p text:style-name="a1432" text:class-names="" text:cond-style-name=""><text:span text:style-name="a1431" text:class-names=""/></text:p>
          </draw:text-box>
          <svg:title/>
          <svg:desc/>
        </draw:frame>
        <draw:frame draw:id="id13" presentation:style-name="a1438" draw:name="Date Placeholder 2" svg:x="4.24826in" svg:y="0in" svg:width="3.25in" svg:height="0.50174in" presentation:class="date-time" presentation:placeholder="false">
          <draw:text-box>
            <text:p text:style-name="a1437" text:class-names="" text:cond-style-name=""><text:span text:style-name="a1434" text:class-names=""><text:date text:fixed="false" style:data-style-name="a1435">3/21/2026</text:date></text:span><text:span text:style-name="a1436" text:class-names=""/></text:p>
          </draw:text-box>
          <svg:title/>
          <svg:desc/>
        </draw:frame>
        <draw:page-thumbnail svg:x="0.75in" svg:y="1.25in" svg:width="6in" svg:height="3.375in" presentation:class="page" draw:id="id14" presentation:style-name="a1439" draw:name="Slide Image Placeholder 3">
          <svg:title/>
          <svg:desc/>
        </draw:page-thumbnail>
        <draw:frame draw:id="id15" presentation:style-name="a1454" draw:name="Notes Placeholder 4" svg:x="0.75in" svg:y="4.8125in" svg:width="6in" svg:height="3.9375in" presentation:class="notes" presentation:placeholder="false">
          <draw:text-box>
            <text:p text:style-name="a1441" text:class-names="" text:cond-style-name=""><text:span text:style-name="a1440" text:class-names="">Click to edit Master text styles</text:span></text:p>
            <text:list text:style-name="a1444">
              <text:list-item>
                <text:list text:style-name="a1444">
                  <text:list-item>
                    <text:p text:style-name="a1443" text:class-names="" text:cond-style-name=""><text:span text:style-name="a1442" text:class-names="">Second level</text:span></text:p>
                  </text:list-item>
                </text:list>
              </text:list-item>
            </text:list>
            <text:list text:style-name="a1447">
              <text:list-item>
                <text:list text:style-name="a1447">
                  <text:list-item>
                    <text:list text:style-name="a1447">
                      <text:list-item>
                        <text:p text:style-name="a1446" text:class-names="" text:cond-style-name=""><text:span text:style-name="a14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450">
              <text:list-item>
                <text:list text:style-name="a1450">
                  <text:list-item>
                    <text:list text:style-name="a1450">
                      <text:list-item>
                        <text:list text:style-name="a1450">
                          <text:list-item>
                            <text:p text:style-name="a1449" text:class-names="" text:cond-style-name=""><text:span text:style-name="a14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53">
              <text:list-item>
                <text:list text:style-name="a1453">
                  <text:list-item>
                    <text:list text:style-name="a1453">
                      <text:list-item>
                        <text:list text:style-name="a1453">
                          <text:list-item>
                            <text:list text:style-name="a1453">
                              <text:list-item>
                                <text:p text:style-name="a1452" text:class-names="" text:cond-style-name=""><text:span text:style-name="a145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1457" draw:name="Footer Placeholder 5" svg:x="0in" svg:y="9.49826in" svg:width="3.25in" svg:height="0.50174in" presentation:class="footer" presentation:placeholder="false">
          <draw:text-box>
            <text:p text:style-name="a1456" text:class-names="" text:cond-style-name=""><text:span text:style-name="a1455" text:class-names=""/></text:p>
          </draw:text-box>
          <svg:title/>
          <svg:desc/>
        </draw:frame>
        <draw:frame draw:id="id17" presentation:style-name="a1461" draw:name="Slide Number Placeholder 6" svg:x="4.24826in" svg:y="9.49826in" svg:width="3.25in" svg:height="0.50174in" presentation:class="page-number" presentation:placeholder="false">
          <draw:text-box>
            <text:p text:style-name="a1460" text:class-names="" text:cond-style-name=""><text:span text:style-name="a1458" text:class-names=""><text:page-number style:num-format="1" text:fixed="false">‹N›</text:page-number></text:span><text:span text:style-name="a1459" text:class-names=""/></text:p>
          </draw:text-box>
          <svg:title/>
          <svg:desc/>
        </draw:frame>
      </presentation:notes>
    </style:master-page>
    <style:master-page style:name="Master1-Layout23-cust-Table" style:page-layout-name="pageLayout1" draw:style-name="a1463">
      <draw:connector draw:type="line" svg:x1="3.41177in" svg:y1="0.01266in" svg:x2="0in" svg:y2="0.76266in" draw:id="id178" draw:layer="Master1-bg" draw:style-name="a1464" draw:name="Straight Connector 2">
        <svg:title/>
        <svg:desc/>
      </draw:connector>
      <draw:connector draw:type="line" svg:x1="0.98837in" svg:y1="0.01266in" svg:x2="0in" svg:y2="7.16891in" draw:id="id179" draw:layer="Master1-bg" draw:style-name="a1465" draw:name="Straight Connector 6">
        <svg:title/>
        <svg:desc/>
      </draw:connector>
      <draw:connector draw:type="line" svg:x1="6.82813in" svg:y1="7.51266in" svg:x2="-0.04688in" svg:y2="6.34599in" draw:id="id180" draw:layer="Master1-bg" draw:style-name="a1466" draw:name="Straight Connector 8">
        <svg:title/>
        <svg:desc/>
      </draw:connector>
      <draw:connector draw:type="line" svg:x1="13.33333in" svg:y1="6.40849in" svg:x2="9.25521in" svg:y2="7.51266in" draw:id="id181" draw:layer="Master1-bg" draw:style-name="a1467" draw:name="Straight Connector 9">
        <svg:title/>
        <svg:desc/>
      </draw:connector>
      <draw:connector draw:type="line" svg:x1="13.33333in" svg:y1="1.81474in" svg:x2="12.62375in" svg:y2="7.51266in" draw:id="id182" draw:layer="Master1-bg" draw:style-name="a1468" draw:name="Straight Connector 10">
        <svg:title/>
        <svg:desc/>
      </draw:connector>
      <draw:connector draw:type="line" svg:x1="13.33333in" svg:y1="4.66964in" svg:x2="11.79085in" svg:y2="0.01266in" draw:id="id183" draw:layer="Master1-bg" draw:style-name="a1469" draw:name="Straight Connector 11">
        <svg:title/>
        <svg:desc/>
      </draw:connector>
      <draw:connector draw:type="line" svg:x1="13.33333in" svg:y1="1.02667in" svg:x2="7.14063in" svg:y2="0.00745in" draw:id="id184" draw:layer="Master1-bg" draw:style-name="a1470" draw:name="Straight Connector 12">
        <svg:title/>
        <svg:desc/>
      </draw:connector>
      <draw:frame draw:id="id185" presentation:style-name="a1473" draw:name="Title 1" svg:x="1.25in" svg:y="0.58333in" svg:width="10.83333in" svg:height="1.51154in" presentation:class="title" presentation:placeholder="false">
        <draw:text-box>
          <text:p text:style-name="a1472" text:class-names="" text:cond-style-name=""><text:span text:style-name="a1471" text:class-names="">Click to add title</text:span></text:p>
        </draw:text-box>
        <svg:title/>
        <svg:desc/>
      </draw:frame>
      <draw:frame draw:id="id186" presentation:style-name="a1476" draw:name="Table Placeholder 7" svg:x="0.91667in" svg:y="2.32421in" svg:width="11.5in" svg:height="4.02006in" presentation:class="table" presentation:placeholder="false">
        <draw:text-box>
          <text:p text:style-name="a1475" text:class-names="" text:cond-style-name=""><text:span text:style-name="a1474" text:class-names="">Click icon to add table</text:span></text:p>
        </draw:text-box>
        <svg:title/>
        <svg:desc/>
      </draw:frame>
      <draw:frame draw:id="id187" presentation:style-name="a1481" draw:name="Date Placeholder 3" svg:x="8.02395in" svg:y="6.9979in" svg:width="4.58651in" svg:height="0.39931in" presentation:class="date-time" presentation:placeholder="false">
        <draw:text-box>
          <text:p text:style-name="a1480" text:class-names="" text:cond-style-name=""><text:span text:style-name="a1477" text:class-names=""><text:date text:fixed="false" style:data-style-name="a1478">3/21/2026</text:date></text:span><text:span text:style-name="a1479" text:class-names=""/></text:p>
        </draw:text-box>
        <svg:title/>
        <svg:desc/>
      </draw:frame>
      <draw:frame draw:id="id188" presentation:style-name="a1484" draw:name="Footer Placeholder 4" svg:x="0.16889in" svg:y="6.9979in" svg:width="4.91832in" svg:height="0.39931in" presentation:class="footer" presentation:placeholder="false">
        <draw:text-box>
          <text:p text:style-name="a1483" text:class-names="" text:cond-style-name=""><text:span text:style-name="a1482" text:class-names=""/></text:p>
        </draw:text-box>
        <svg:title/>
        <svg:desc/>
      </draw:frame>
      <draw:frame draw:id="id189" presentation:style-name="a1488" draw:name="Slide Number Placeholder 5" svg:x="12.68862in" svg:y="6.9979in" svg:width="0.51497in" svg:height="0.39931in" presentation:class="page-number" presentation:placeholder="false">
        <draw:text-box>
          <text:p text:style-name="a1487" text:class-names="" text:cond-style-name=""><text:span text:style-name="a1485" text:class-names=""><text:page-number style:num-format="1" text:fixed="false">‹N›</text:page-number></text:span><text:span text:style-name="a1486" text:class-names=""/></text:p>
        </draw:text-box>
        <svg:title/>
        <svg:desc/>
      </draw:frame>
      <presentation:notes style:page-layout-name="pageLayout2" draw:style-name="a1520">
        <draw:frame draw:id="id12" presentation:style-name="a1491" draw:name="Header Placeholder 1" svg:x="0in" svg:y="0in" svg:width="3.25in" svg:height="0.50174in" presentation:class="header" presentation:placeholder="false">
          <draw:text-box>
            <text:p text:style-name="a1490" text:class-names="" text:cond-style-name=""><text:span text:style-name="a1489" text:class-names=""/></text:p>
          </draw:text-box>
          <svg:title/>
          <svg:desc/>
        </draw:frame>
        <draw:frame draw:id="id13" presentation:style-name="a1496" draw:name="Date Placeholder 2" svg:x="4.24826in" svg:y="0in" svg:width="3.25in" svg:height="0.50174in" presentation:class="date-time" presentation:placeholder="false">
          <draw:text-box>
            <text:p text:style-name="a1495" text:class-names="" text:cond-style-name=""><text:span text:style-name="a1492" text:class-names=""><text:date text:fixed="false" style:data-style-name="a1493">3/21/2026</text:date></text:span><text:span text:style-name="a1494" text:class-names=""/></text:p>
          </draw:text-box>
          <svg:title/>
          <svg:desc/>
        </draw:frame>
        <draw:page-thumbnail svg:x="0.75in" svg:y="1.25in" svg:width="6in" svg:height="3.375in" presentation:class="page" draw:id="id14" presentation:style-name="a1497" draw:name="Slide Image Placeholder 3">
          <svg:title/>
          <svg:desc/>
        </draw:page-thumbnail>
        <draw:frame draw:id="id15" presentation:style-name="a1512" draw:name="Notes Placeholder 4" svg:x="0.75in" svg:y="4.8125in" svg:width="6in" svg:height="3.9375in" presentation:class="notes" presentation:placeholder="false">
          <draw:text-box>
            <text:p text:style-name="a1499" text:class-names="" text:cond-style-name=""><text:span text:style-name="a1498" text:class-names="">Click to edit Master text styles</text:span></text:p>
            <text:list text:style-name="a1502">
              <text:list-item>
                <text:list text:style-name="a1502">
                  <text:list-item>
                    <text:p text:style-name="a1501" text:class-names="" text:cond-style-name=""><text:span text:style-name="a1500" text:class-names="">Second level</text:span></text:p>
                  </text:list-item>
                </text:list>
              </text:list-item>
            </text:list>
            <text:list text:style-name="a1505">
              <text:list-item>
                <text:list text:style-name="a1505">
                  <text:list-item>
                    <text:list text:style-name="a1505">
                      <text:list-item>
                        <text:p text:style-name="a1504" text:class-names="" text:cond-style-name=""><text:span text:style-name="a150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508">
              <text:list-item>
                <text:list text:style-name="a1508">
                  <text:list-item>
                    <text:list text:style-name="a1508">
                      <text:list-item>
                        <text:list text:style-name="a1508">
                          <text:list-item>
                            <text:p text:style-name="a1507" text:class-names="" text:cond-style-name=""><text:span text:style-name="a150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11">
              <text:list-item>
                <text:list text:style-name="a1511">
                  <text:list-item>
                    <text:list text:style-name="a1511">
                      <text:list-item>
                        <text:list text:style-name="a1511">
                          <text:list-item>
                            <text:list text:style-name="a1511">
                              <text:list-item>
                                <text:p text:style-name="a1510" text:class-names="" text:cond-style-name=""><text:span text:style-name="a150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1515" draw:name="Footer Placeholder 5" svg:x="0in" svg:y="9.49826in" svg:width="3.25in" svg:height="0.50174in" presentation:class="footer" presentation:placeholder="false">
          <draw:text-box>
            <text:p text:style-name="a1514" text:class-names="" text:cond-style-name=""><text:span text:style-name="a1513" text:class-names=""/></text:p>
          </draw:text-box>
          <svg:title/>
          <svg:desc/>
        </draw:frame>
        <draw:frame draw:id="id17" presentation:style-name="a1519" draw:name="Slide Number Placeholder 6" svg:x="4.24826in" svg:y="9.49826in" svg:width="3.25in" svg:height="0.50174in" presentation:class="page-number" presentation:placeholder="false">
          <draw:text-box>
            <text:p text:style-name="a1518" text:class-names="" text:cond-style-name=""><text:span text:style-name="a1516" text:class-names=""><text:page-number style:num-format="1" text:fixed="false">‹N›</text:page-number></text:span><text:span text:style-name="a1517" text:class-names=""/></text:p>
          </draw:text-box>
          <svg:title/>
          <svg:desc/>
        </draw:frame>
      </presentation:notes>
    </style:master-page>
    <style:master-page style:name="Master1-Layout24-cust-Content-3" style:page-layout-name="pageLayout1" draw:style-name="a1521">
      <draw:connector draw:type="line" svg:x1="13.33333in" svg:y1="6.39583in" svg:x2="9.25521in" svg:y2="7.5in" draw:id="id190" draw:layer="Master1-bg" draw:style-name="a1522" draw:name="Straight Connector 6">
        <svg:title/>
        <svg:desc/>
      </draw:connector>
      <draw:connector draw:type="line" svg:x1="13.33333in" svg:y1="1.80208in" svg:x2="12.62375in" svg:y2="7.5in" draw:id="id191" draw:layer="Master1-bg" draw:style-name="a1523" draw:name="Straight Connector 7">
        <svg:title/>
        <svg:desc/>
      </draw:connector>
      <draw:connector draw:type="line" svg:x1="13.33333in" svg:y1="4.65698in" svg:x2="11.79085in" svg:y2="0in" draw:id="id192" draw:layer="Master1-bg" draw:style-name="a1524" draw:name="Straight Connector 8">
        <svg:title/>
        <svg:desc/>
      </draw:connector>
      <draw:connector draw:type="line" svg:x1="13.33333in" svg:y1="1.01401in" svg:x2="7.14063in" svg:y2="-0.00521in" draw:id="id193" draw:layer="Master1-bg" draw:style-name="a1525" draw:name="Straight Connector 9">
        <svg:title/>
        <svg:desc/>
      </draw:connector>
      <draw:frame draw:id="id194" draw:layer="Master1-bg" presentation:style-name="a1528" draw:name="Picture Placeholder 13" svg:x="0.00417in" svg:y="0in" svg:width="8.54877in" svg:height="7.5in" presentation:class="graphic" presentation:placeholder="false">
        <draw:text-box>
          <text:p text:style-name="a1527" text:class-names="" text:cond-style-name=""><text:span text:style-name="a1526" text:class-names="">Click icon to add picture</text:span></text:p>
        </draw:text-box>
        <svg:title/>
        <svg:desc/>
      </draw:frame>
      <draw:frame draw:id="id195" draw:layer="Master1-bg" presentation:style-name="a1531" draw:name="Title 1" svg:x="6.65025in" svg:y="0.80005in" svg:width="5.36181in" svg:height="3.85693in" presentation:class="title" presentation:placeholder="false">
        <draw:text-box>
          <text:p text:style-name="a1530" text:class-names="" text:cond-style-name=""><text:span text:style-name="a1529" text:class-names=""/></text:p>
        </draw:text-box>
        <svg:title/>
        <svg:desc/>
      </draw:frame>
      <draw:frame draw:id="id196" draw:layer="Master1-bg" presentation:style-name="a1546" draw:name="Content Placeholder 2" svg:x="6.65025in" svg:y="4.78261in" svg:width="5.36181in" svg:height="1.91735in" presentation:class="object" presentation:placeholder="false">
        <draw:text-box>
          <text:p text:style-name="a1533" text:class-names="" text:cond-style-name=""><text:span text:style-name="a1532" text:class-names="">Click to add text</text:span></text:p>
          <text:list text:style-name="a1536">
            <text:list-item>
              <text:list text:style-name="a1536">
                <text:list-item>
                  <text:p text:style-name="a1535" text:class-names="" text:cond-style-name=""><text:span text:style-name="a1534" text:class-names="">Second level</text:span></text:p>
                </text:list-item>
              </text:list>
            </text:list-item>
          </text:list>
          <text:list text:style-name="a1539">
            <text:list-item>
              <text:list text:style-name="a1539">
                <text:list-item>
                  <text:list text:style-name="a1539">
                    <text:list-item>
                      <text:p text:style-name="a1538" text:class-names="" text:cond-style-name=""><text:span text:style-name="a1537" text:class-names="">Third level</text:span></text:p>
                    </text:list-item>
                  </text:list>
                </text:list-item>
              </text:list>
            </text:list-item>
          </text:list>
          <text:list text:style-name="a1542">
            <text:list-item>
              <text:list text:style-name="a1542">
                <text:list-item>
                  <text:list text:style-name="a1542">
                    <text:list-item>
                      <text:list text:style-name="a1542">
                        <text:list-item>
                          <text:p text:style-name="a1541" text:class-names="" text:cond-style-name=""><text:span text:style-name="a15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45">
            <text:list-item>
              <text:list text:style-name="a1545">
                <text:list-item>
                  <text:list text:style-name="a1545">
                    <text:list-item>
                      <text:list text:style-name="a1545">
                        <text:list-item>
                          <text:list text:style-name="a1545">
                            <text:list-item>
                              <text:p text:style-name="a1544" text:class-names="" text:cond-style-name=""><text:span text:style-name="a154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578">
        <draw:frame draw:id="id12" presentation:style-name="a1549" draw:name="Header Placeholder 1" svg:x="0in" svg:y="0in" svg:width="3.25in" svg:height="0.50174in" presentation:class="header" presentation:placeholder="false">
          <draw:text-box>
            <text:p text:style-name="a1548" text:class-names="" text:cond-style-name=""><text:span text:style-name="a1547" text:class-names=""/></text:p>
          </draw:text-box>
          <svg:title/>
          <svg:desc/>
        </draw:frame>
        <draw:frame draw:id="id13" presentation:style-name="a1554" draw:name="Date Placeholder 2" svg:x="4.24826in" svg:y="0in" svg:width="3.25in" svg:height="0.50174in" presentation:class="date-time" presentation:placeholder="false">
          <draw:text-box>
            <text:p text:style-name="a1553" text:class-names="" text:cond-style-name=""><text:span text:style-name="a1550" text:class-names=""><text:date text:fixed="false" style:data-style-name="a1551">3/21/2026</text:date></text:span><text:span text:style-name="a1552" text:class-names=""/></text:p>
          </draw:text-box>
          <svg:title/>
          <svg:desc/>
        </draw:frame>
        <draw:page-thumbnail svg:x="0.75in" svg:y="1.25in" svg:width="6in" svg:height="3.375in" presentation:class="page" draw:id="id14" presentation:style-name="a1555" draw:name="Slide Image Placeholder 3">
          <svg:title/>
          <svg:desc/>
        </draw:page-thumbnail>
        <draw:frame draw:id="id15" presentation:style-name="a1570" draw:name="Notes Placeholder 4" svg:x="0.75in" svg:y="4.8125in" svg:width="6in" svg:height="3.9375in" presentation:class="notes" presentation:placeholder="false">
          <draw:text-box>
            <text:p text:style-name="a1557" text:class-names="" text:cond-style-name=""><text:span text:style-name="a1556" text:class-names="">Click to edit Master text styles</text:span></text:p>
            <text:list text:style-name="a1560">
              <text:list-item>
                <text:list text:style-name="a1560">
                  <text:list-item>
                    <text:p text:style-name="a1559" text:class-names="" text:cond-style-name=""><text:span text:style-name="a1558" text:class-names="">Second level</text:span></text:p>
                  </text:list-item>
                </text:list>
              </text:list-item>
            </text:list>
            <text:list text:style-name="a1563">
              <text:list-item>
                <text:list text:style-name="a1563">
                  <text:list-item>
                    <text:list text:style-name="a1563">
                      <text:list-item>
                        <text:p text:style-name="a1562" text:class-names="" text:cond-style-name=""><text:span text:style-name="a156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566">
              <text:list-item>
                <text:list text:style-name="a1566">
                  <text:list-item>
                    <text:list text:style-name="a1566">
                      <text:list-item>
                        <text:list text:style-name="a1566">
                          <text:list-item>
                            <text:p text:style-name="a1565" text:class-names="" text:cond-style-name=""><text:span text:style-name="a156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69">
              <text:list-item>
                <text:list text:style-name="a1569">
                  <text:list-item>
                    <text:list text:style-name="a1569">
                      <text:list-item>
                        <text:list text:style-name="a1569">
                          <text:list-item>
                            <text:list text:style-name="a1569">
                              <text:list-item>
                                <text:p text:style-name="a1568" text:class-names="" text:cond-style-name=""><text:span text:style-name="a156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1573" draw:name="Footer Placeholder 5" svg:x="0in" svg:y="9.49826in" svg:width="3.25in" svg:height="0.50174in" presentation:class="footer" presentation:placeholder="false">
          <draw:text-box>
            <text:p text:style-name="a1572" text:class-names="" text:cond-style-name=""><text:span text:style-name="a1571" text:class-names=""/></text:p>
          </draw:text-box>
          <svg:title/>
          <svg:desc/>
        </draw:frame>
        <draw:frame draw:id="id17" presentation:style-name="a1577" draw:name="Slide Number Placeholder 6" svg:x="4.24826in" svg:y="9.49826in" svg:width="3.25in" svg:height="0.50174in" presentation:class="page-number" presentation:placeholder="false">
          <draw:text-box>
            <text:p text:style-name="a1576" text:class-names="" text:cond-style-name=""><text:span text:style-name="a1574" text:class-names=""><text:page-number style:num-format="1" text:fixed="false">‹N›</text:page-number></text:span><text:span text:style-name="a1575" text:class-names=""/></text:p>
          </draw:text-box>
          <svg:title/>
          <svg:desc/>
        </draw:frame>
      </presentation:notes>
    </style:master-page>
    <style:handout-master style:page-layout-name="pageLayout3" draw:style-name="a1579">
      <draw:frame draw:id="id197" presentation:style-name="a1582" draw:name="Header Placeholder 1" svg:x="0in" svg:y="0in" svg:width="3.25in" svg:height="0.50174in" presentation:class="header" presentation:placeholder="false">
        <draw:text-box>
          <text:p text:style-name="a1581" text:class-names="" text:cond-style-name=""><text:span text:style-name="a1580" text:class-names=""/></text:p>
        </draw:text-box>
        <svg:title/>
        <svg:desc/>
      </draw:frame>
      <draw:frame draw:id="id198" presentation:style-name="a1587" draw:name="Date Placeholder 2" svg:x="4.24826in" svg:y="0in" svg:width="3.25in" svg:height="0.50174in" presentation:class="date-time" presentation:placeholder="false">
        <draw:text-box>
          <text:p text:style-name="a1586" text:class-names="" text:cond-style-name=""><text:span text:style-name="a1583" text:class-names=""><text:date text:fixed="false" style:data-style-name="a1584">3/21/2026</text:date></text:span><text:span text:style-name="a1585" text:class-names=""/></text:p>
        </draw:text-box>
        <svg:title/>
        <svg:desc/>
      </draw:frame>
      <draw:frame draw:id="id199" presentation:style-name="a1590" draw:name="Footer Placeholder 3" svg:x="0in" svg:y="9.49826in" svg:width="3.25in" svg:height="0.50174in" presentation:class="footer" presentation:placeholder="false">
        <draw:text-box>
          <text:p text:style-name="a1589" text:class-names="" text:cond-style-name=""><text:span text:style-name="a1588" text:class-names=""/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/>
    <dc:creator/>
    <meta:creation-date>2026-03-12T15:36:16Z</meta:creation-date>
    <dc:date>2026-05-27T08:55:25Z</dc:date>
    <meta:template xlink:href="AngleLinesVTI" xlink:type="simple"/>
    <meta:editing-cycles>554</meta:editing-cycles>
    <meta:editing-duration>PT0S</meta:editing-duration>
    <meta:user-defined meta:name="ContentTypeId">0x01010079F111ED35F8CC479449609E8A0923A6</meta:user-defined>
    <meta:document-statistic meta:paragraph-count="123" meta:word-count="428"/>
  </office:meta>
</office:document-meta>
</file>